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 style:list-style-name="">
      <style:paragraph-properties fo:line-height="150%" fo:text-align="center" style:justify-single-word="false" fo:hyphenation-ladder-count="no-limit" fo:hyphenation-keep="auto" loext:hyphenation-keep-type="column" loext:hyphenation-keep-line="false"/>
      <style:text-properties style:font-name="Times New Roman" fo:font-size="14pt" style:font-name-asian="Times New Roman1" style:font-size-asian="14pt" style:language-asian="ar" style:country-asian="SA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style:language-asian="ar" style:country-asian="SA" style:font-size-complex="10pt"/>
    </style:style>
    <style:style style:name="P3" style:family="paragraph" style:parent-style-name="Text_20_body" style:list-style-name="L1">
      <style:paragraph-properties fo:line-height="150%" fo:text-align="justify" style:justify-single-word="false"/>
      <style:text-properties style:language-asian="ar" style:country-asian="SA" style:font-size-complex="10pt"/>
    </style:style>
    <style:style style:name="P4" style:family="paragraph" style:parent-style-name="Text_20_body" style:list-style-name="L1">
      <style:paragraph-properties fo:margin-top="0cm" fo:margin-bottom="0.499cm" style:contextual-spacing="false" fo:line-height="150%" fo:text-align="justify" style:justify-single-word="false"/>
      <style:text-properties style:language-asian="ar" style:country-asian="SA" style:font-size-complex="10pt"/>
    </style:style>
    <style:style style:name="P5" style:family="paragraph" style:parent-style-name="Standard" style:list-style-name="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ЗАКЛЮЧЕНИЕ</text:h>
      <text:p text:style-name="P2">В ходе выполнения курсового проекта была разработана информационная система для учёта посещений в ветеринарной клинике, реализующая автоматизацию основных процессов взаимодействия клиентов и врачей клиники.</text:p>
      <text:p text:style-name="P2">В рамках выполнения проекта были решены следующие задачи:</text:p>
      <text:list text:style-name="L1">
        <text:list-item>
          <text:p text:style-name="P3">спроектирована структура базы данных, обеспечивающая хранение информации о клиентах, питомцах, врачах, услугах, записях на приём, диагнозах и медицинских протоколах; </text:p>
        </text:list-item>
        <text:list-item>
          <text:p text:style-name="P3">разработана архитектура серверного приложения на языке программирования Go с использованием фреймворка Gin и библиотеки GORM, построенная по слоистому принципу с разделением на модели, репозитории, сервисы и обработчики запросов; </text:p>
        </text:list-item>
        <text:list-item>
          <text:p text:style-name="P3">реализована система регистрации и авторизации пользователей с разделением ролей (клиент, врач) на основе JWT-токенов; </text:p>
        </text:list-item>
        <text:list-item>
          <text:p text:style-name="P3">реализован функционал записи клиента на приём с выбором питомца, врача, услуги и времени, с проверкой доступности времени врача; </text:p>
        </text:list-item>
        <text:list-item>
          <text:p text:style-name="P3">реализован функционал завершения приёма врачом с фиксацией веса питомца, диагнозов, лечения и медикаментов, а также справочник диагнозов с возможностью выбора нескольких диагнозов для одного приёма; </text:p>
        </text:list-item>
        <text:list-item>
          <text:p text:style-name="P3">реализован функционал ведения карточек питомцев, просмотра истории посещений с экспортом медицинского протокола в PDF, а также статистики динамики веса питомца; </text:p>
        </text:list-item>
        <text:list-item>
          <text:p text:style-name="P3">реализован функционал поиска пациентов и просмотра медицинской истории клиента для врача; </text:p>
        </text:list-item>
        <text:list-item>
          <text:p text:style-name="P3">реализован интернет-магазин товаров для животных с функциями корзины и оформления заказов; </text:p>
        </text:list-item>
        <text:list-item>
          <text:p text:style-name="P3">разработано клиентское веб-приложение на языке программирования TypeScript с использованием фреймворка Vue 3, реализующее два рабочих пространства — для клиента и для врача клиники; </text:p>
        </text:list-item>
        <text:list-item>
          <text:p text:style-name="P4"><text:soft-page-break/>проведено тестирование разработанной системы на корректных и некорректных данных, подтвердившее её работоспособность. </text:p>
        </text:list-item>
      </text:list>
      <text:p text:style-name="P2">Разработанная информационная система решает поставленные задачи по автоматизации учёта посещений ветеринарной клиники, обеспечивая удобное взаимодействие между клиентами и врачами, централизованное хранение медицинских данных питомцев и сокращение времени на ведение документации.</text:p>
      <text:p text:style-name="P2">В качестве направлений дальнейшего развития системы можно выделить: добавление push-уведомлений о предстоящих приёмах, реализацию онлайн-оплаты услуг и товаров, добавление ролей администратора и регистратора клиники, а также разработку мобильного приложения для платформ Android и iOS.</text:p>
      <text:h text:style-name="P5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379cm" fo:margin-top="0.284cm" fo:margin-bottom="0cm" style:contextual-spacing="false" fo:text-indent="0.998cm" style:auto-text-indent="fals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 style:font-charset="x-symbol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family-generic="roman" style:font-pitch="variable" style:font-charset="x-symbo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74cm" fo:margin-left="2.38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504cm" fo:margin-left="1.37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2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17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8.05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94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83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71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5.6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64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8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8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8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6cm" fo:text-indent="-0.318cm" fo:margin-left="4.0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7cm" fo:text-indent="-0.318cm" fo:margin-left="7.8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68cm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</meta:editing-cycles>
    <meta:creation-date>2026-06-21T13:58:29.064493145</meta:creation-date>
    <meta:editing-duration>PT32S</meta:editing-duration>
    <meta:generator>LibreOffice/26.2.4.2$Linux_X86_64 LibreOffice_project/f4d82cf4d44730936b3f1a72d05a6253f577d3e9</meta:generator>
    <dc:title>Задание</dc:title>
    <dc:date>2026-06-21T13:59:00.645806657</dc:date>
    <meta:document-statistic meta:table-count="0" meta:image-count="0" meta:object-count="0" meta:page-count="2" meta:paragraph-count="15" meta:word-count="287" meta:character-count="2332" meta:non-whitespace-character-count="2059"/>
    <meta:user-defined meta:name="AppVersion">16.0000</meta:user-defined>
    <meta:template xlink:type="simple" xlink:actuate="onRequest" xlink:title="Задание" xlink:href="../../../../.config/libreoffice/4/user/template/Задание.ott" meta:date="2026-06-21T13:58:28.298787813"/>
  </office:meta>
</office:document-meta>
</file>