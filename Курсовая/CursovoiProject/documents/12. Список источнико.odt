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" style:list-style-name="L1">
      <style:paragraph-properties fo:line-height="150%" fo:text-align="justify" style:justify-single-word="false"/>
      <style:text-properties style:language-asian="ar" style:country-asian="SA" style:font-size-complex="10pt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 fo:text-align="justify" style:justify-single-word="false"/>
      <style:text-properties style:language-asian="ar" style:country-asian="SA" style:font-size-complex="10pt"/>
    </style:style>
    <style:style style:name="P4" style:family="paragraph" style:parent-style-name="Standard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СПИСОК ИСПОЛЬЗОВАННЫХ ИСТОЧНИКОВ</text:h>
      <text:list text:style-name="L1">
        <text:list-item>
          <text:p text:style-name="P2">Хорстманн, К. Принципы программирования на Go : учебник / К. Хорстманн. — Москва : ДМК Пресс, 2022. — 480 с. </text:p>
        </text:list-item>
        <text:list-item>
          <text:p text:style-name="P2">Дронов, В. А. JavaScript и Vue.js : разработка веб-приложений : учебник для студ. учреждений сред. проф. образования / В. А. Дронов. — Москва : Издательский центр «Академия», 2023. — 416 с. </text:p>
        </text:list-item>
        <text:list-item>
          <text:p text:style-name="P2">Кумскова, И. А. Базы данных : учебник / И. А. Кумскова. — Москва : КноРус, 2021. — 400 с. — ISBN 978-5-406-08303-1. — URL: <text:a xlink:type="simple" xlink:href="https://book.ru/book/940108" text:style-name="Internet_20_link" text:visited-style-name="Visited_20_Internet_20_Link">https://book.ru/book/940108</text:a> (дата обращения: 21.06.2026). — Текст : электронный. </text:p>
        </text:list-item>
        <text:list-item>
          <text:p text:style-name="P2">GORM Documentation [Электронный ресурс]. — URL: <text:a xlink:type="simple" xlink:href="https://gorm.io/docs/" text:style-name="Internet_20_link" text:visited-style-name="Visited_20_Internet_20_Link">https://gorm.io/docs/</text:a> (дата обращения: 21.06.2026). — Режим доступа: свободный. — Текст : электронный. </text:p>
        </text:list-item>
        <text:list-item>
          <text:p text:style-name="P3">Vue.js Documentation [Электронный ресурс]. — URL: <text:a xlink:type="simple" xlink:href="https://vuejs.org/guide/" text:style-name="Internet_20_link" text:visited-style-name="Visited_20_Internet_20_Link">https://vuejs.org/guide/</text:a> (дата обращения: 21.06.2026). — Режим доступа: свободный. — Текст : электронный.</text:p>
        </text:list-item>
      </text:list>
      <text:h text:style-name="P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6-21T14:04:00.664833990</meta:creation-date>
    <meta:editing-duration>PT1M15S</meta:editing-duration>
    <meta:generator>LibreOffice/26.2.4.2$Linux_X86_64 LibreOffice_project/f4d82cf4d44730936b3f1a72d05a6253f577d3e9</meta:generator>
    <dc:title>Задание1</dc:title>
    <dc:date>2026-06-21T14:05:16.516298030</dc:date>
    <meta:document-statistic meta:table-count="0" meta:image-count="0" meta:object-count="0" meta:page-count="1" meta:paragraph-count="6" meta:word-count="112" meta:character-count="851" meta:non-whitespace-character-count="731"/>
    <meta:user-defined meta:name="AppVersion">16.0000</meta:user-defined>
    <meta:template xlink:type="simple" xlink:actuate="onRequest" xlink:title="Задание1" xlink:href="../../../../.config/libreoffice/4/user/template/Задание1.ott" meta:date="2026-06-21T14:04:00.117456579"/>
  </office:meta>
</office:document-meta>
</file>