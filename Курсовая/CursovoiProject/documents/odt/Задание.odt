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3cm" fo:margin-left="0cm" fo:margin-top="0cm" fo:margin-bottom="0cm" table:align="left" style:writing-mode="page"/>
    </style:style>
    <style:style style:name="Таблица1.A" style:family="table-column">
      <style:table-column-properties style:column-width="9.172cm"/>
    </style:style>
    <style:style style:name="Таблица1.B" style:family="table-column">
      <style:table-column-properties style:column-width="9.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.706cm" style:contextual-spacing="false" fo:text-align="center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.176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176cm" style:contextual-spacing="false" fo:text-align="center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.353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353cm" fo:margin-bottom="0.353cm" style:contextual-spacing="false" fo:text-align="center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cm" fo:margin-bottom="0.176cm" style:contextual-spacing="false" fo:text-align="justify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cm" fo:margin-bottom="0.141cm" style:contextual-spacing="false" fo:text-align="justify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1.27cm" fo:margin-top="0cm" fo:margin-bottom="0.141cm" style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1.27cm" fo:margin-top="0cm" fo:margin-bottom="0.141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.282cm" fo:margin-bottom="0.176cm" style:contextual-spacing="false" fo:text-align="justify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.282cm" fo:margin-bottom="0.176cm" style:contextual-spacing="false" fo:text-align="justify" style:justify-single-word="false"/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top="0cm" fo:margin-bottom="0.141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top="0cm" fo:margin-bottom="0.141cm" style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weight="normal" officeooo:rsid="000fd4eb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fd4eb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28_3182779655"/>Министерство образования и науки Республики Башкортостан</text:p>
      <text:p text:style-name="P1">Государственное автономное профессиональное образовательное учреждение</text:p>
      <text:p text:style-name="P2">Уфимский колледж статистики, информатики и вычислительной техники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УТВЕРЖДАЮ</text:p>
            <text:p text:style-name="P4">Заместитель директора</text:p>
            <text:p text:style-name="P4">по учебной работе</text:p>
            <text:p text:style-name="P3"><text:span text:style-name="T1">_______________</text:span><text:span text:style-name="T2">______</text:span><text:span text:style-name="T1"> З.З. Курмашева</text:span></text:p>
            <text:p text:style-name="P5"><text:span text:style-name="T1">«___» </text:span><text:bookmark-start text:name="__DdeLink__195_3687222538"/><text:span text:style-name="T1">_____________</text:span><text:span text:style-name="T2">___________</text:span><text:span text:style-name="T1">202</text:span><text:span text:style-name="T2">6</text:span><text:bookmark-end text:name="__DdeLink__195_3687222538"/><text:span text:style-name="T1"> г.</text:span></text:p>
          </table:table-cell>
        </table:table-row>
      </table:table>
      <text:p text:style-name="P6">ЗАДАНИЕ</text:p>
      <text:p text:style-name="P7">на курсовой проект студенту дневного отделения, группы 23П-4, специальности 09.02.07 Информационные системы и программирование.</text:p>
      <text:p text:style-name="P3"><text:span text:style-name="T1">Фамилия, имя, отчество:</text:span><text:span text:style-name="T3"> </text:span><text:span text:style-name="T1">Хабибуллин Артём Альбертович</text:span></text:p>
      <text:p text:style-name="P5"><text:span text:style-name="T1">Тема:</text:span><text:span text:style-name="T3"> </text:span><text:span text:style-name="T1">«Информационная система ветеринарной клиники».</text:span></text:p>
      <text:p text:style-name="P7">Текст задания:</text:p>
      <text:p text:style-name="P8">при выполнении курсового проекта должны быть решены следующие задачи:</text:p>
      <text:p text:style-name="P9">- спроектирована база данных ветеринарной клиники;</text:p>
      <text:p text:style-name="P9">- разработана структура программного продукта (API-сервис и веб-интерфейс);</text:p>
      <text:p text:style-name="P9">- для клиента реализованы функции: регистрация и авторизация, управление данными питомцев, запись на приём к ветеринару, просмотр истории приёмов, заказ медикаментов в интернет-магазине, получение и печать документов (чеки, результаты исследований);</text:p>
      <text:p text:style-name="P10"><text:span text:style-name="T4">- для врача реализованы функции: просмотр расписания на рабочий день, </text:span><text:span text:style-name="T5">просмотр</text:span><text:span text:style-name="T4"> запис</text:span><text:span text:style-name="T5">ей</text:span><text:span text:style-name="T4"> пациентов, обработка и подписание приёмов непосредственно в интерфейсе;</text:span></text:p>
      <text:p text:style-name="P9">- реализован интуитивно понятный пользовательский интерфейс с разграничением прав доступа для клиента и врача;</text:p>
      <text:p text:style-name="P9">- обеспечена возможность печати документов и чеков в один клик.</text:p>
      <text:p text:style-name="P11">В результате выполнения курсового проекта должны быть представлены:</text:p>
      <text:p text:style-name="P9">- пояснительная записка, состоящая из следующих разделов: Введение, 1 Постановка задачи, 2 Экспериментальный раздел, Заключение, Список использованных источников;</text:p>
      <text:p text:style-name="P9">- электронный носитель, содержащий разработанный программный продукт и пояснительную записку;</text:p>
      <text:p text:style-name="P9">- графическая часть — 6 листов формата А4;</text:p>
      <text:p text:style-name="P9">- презентация курсового проекта в электронном виде.</text:p>
      <text:p text:style-name="P12">Список рекомендуемых источников:</text:p>
      <text:p text:style-name="P13"><text:span text:style-name="T4">1</text:span><text:span text:style-name="T5">.</text:span><text:span text:style-name="T4"> Кумскова И.А. Базы данных: учебник / Кумскова И.А. — Москва : КноРус, 2021. — </text:span><text:soft-page-break/><text:span text:style-name="T4">400 с. — ISBN 978-5-406-08303-1. — URL: https://book.ru/book/940108. — Текст: электронный.</text:span></text:p>
      <text:p text:style-name="P13"><text:span text:style-name="T4">2 Федорова Г.Н. Разработка модулей программного обеспечения для компьютерных систем : учебник / Г.Н. Федорова. — 4-е изд., перераб. — Москва : Академия, 2020. — 384 с. — ISBN 978-5-4468-9443-7. — Текст: электронный.</text:span></text:p>
      <text:p text:style-name="P14">3 Документация Go (Golang): официальный сайт, 2024. — URL: https://go.dev/doc/. — Режим доступа: свободный. — Текст: электронный.</text:p>
      <text:p text:style-name="P14">4 Документация Vue.js: официальный сайт, 2024. — URL: https://vuejs.org/guide/. — Режим доступа: свободный. — Текст: электронный.</text:p>
      <text:p text:style-name="P14">5 Документация Gin Web Framework: официальный сайт, 2024. — URL: https://gin-gonic.com/docs/. — Режим доступа: свободный. — Текст: электронный.<text:bookmark-end text:name="__DdeLink__228_31827796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9</meta:editing-cycles>
    <meta:creation-date>2026-05-23T15:14:09.899000000</meta:creation-date>
    <dc:date>2026-05-24T13:56:14.762182775</dc:date>
    <meta:editing-duration>PT14M31S</meta:editing-duration>
    <meta:generator>LibreOffice/26.2.3.2$Linux_X86_64 LibreOffice_project/7d74455cffae7a589951233f185ae0303c082020</meta:generator>
    <meta:document-statistic meta:table-count="1" meta:image-count="0" meta:object-count="0" meta:page-count="2" meta:paragraph-count="31" meta:word-count="299" meta:character-count="2571" meta:non-whitespace-character-count="2283"/>
  </office:meta>
</office:document-meta>
</file>