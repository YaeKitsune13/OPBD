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b87fb" style:font-size-asian="14pt" style:language-asian="ar" style:country-asian="SA" style:font-size-complex="14pt"/>
    </style:style>
    <style:style style:name="P5" style:family="paragraph">
      <loext:graphic-properties draw:fill="none"/>
      <style:paragraph-properties fo:text-align="left"/>
      <style:text-properties fo:font-size="11pt"/>
    </style:style>
    <style:style style:name="P6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P7" style:family="paragraph">
      <loext:graphic-properties draw:fill="none"/>
      <style:paragraph-properties fo:text-align="left"/>
      <style:text-properties fo:font-size="12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1cc78f" officeooo:paragraph-rsid="001cc78f"/>
    </style:style>
    <style:style style:name="P10" style:family="paragraph" style:parent-style-name="Text_20_body" style:list-style-name="L1">
      <style:paragraph-properties fo:line-height="150%" fo:text-align="justify" style:justify-single-word="false" fo:break-before="page"/>
      <style:text-properties style:font-name="Times New Roman" fo:font-size="14pt" officeooo:paragraph-rsid="001b87fb" style:font-size-asian="14pt" style:language-asian="ar" style:country-asian="SA" style:font-size-complex="14pt"/>
    </style:style>
    <style:style style:name="P11" style:family="paragraph" style:parent-style-name="Text_20_body" style:list-style-name="L1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style:font-name="Times New Roman" fo:font-size="14pt" officeooo:paragraph-rsid="001b87fb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font-size-complex="14pt"/>
    </style:style>
    <style:style style:name="T2" style:family="text">
      <style:text-properties fo:font-size="9pt" style:font-size-asian="9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cc78f" style:font-style-asian="italic"/>
    </style:style>
    <style:style style:name="T5" style:family="text">
      <style:text-properties fo:language="en" fo:country="US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fo:margin-left="0cm" fo:margin-right="0.039cm" fo:margin-top="0cm" fo:margin-bottom="0.03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28.235cm" fo:min-width="18.08cm" fo:padding-top="0.127cm" fo:padding-bottom="0.127cm" fo:padding-left="0.254cm" fo:padding-right="0.254cm" fo:wrap-option="wrap" loext:decorative="false" style:run-through="background"/>
    </style:style>
    <style:style style:name="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859cm" fo:padding-top="0.035cm" fo:padding-bottom="0.035cm" fo:padding-left="0.035cm" fo:padding-right="0.035cm" fo:wrap-option="wrap" loext:decorative="false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321cm" fo:padding-top="0.035cm" fo:padding-bottom="0.035cm" fo:padding-left="0.035cm" fo:padding-right="0.035cm" fo:wrap-option="wrap" loext:decorative="false" style:run-through="background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355cm" fo:padding-top="0.035cm" fo:padding-bottom="0.035cm" fo:padding-left="0.035cm" fo:padding-right="0.035cm" fo:wrap-option="wrap" loext:decorative="false" style:run-through="back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533cm" fo:min-width="0.859cm" fo:padding-top="0.035cm" fo:padding-bottom="0.035cm" fo:padding-left="0.035cm" fo:padding-right="0.035cm" fo:wrap-option="wrap" loext:decorative="false" style:run-through="background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609cm" fo:min-width="10.222cm" fo:padding-top="0.035cm" fo:padding-bottom="0.035cm" fo:padding-left="0.035cm" fo:padding-right="0.035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ВВЕДЕНИЕ</text:span></text:span></text:h>
      <text:p text:style-name="P2">В условиях стремительного развития цифровых технологий и роста спроса на качественные ветеринарные услуги особую актуальность приобретает автоматизация процессов учёта и обслуживания клиентов ветеринарных клиник. Современная ветеринарная практика требует оперативного учёта питомцев, истории их посещений, диагнозов и назначенного лечения, а также удобного взаимодействия между клиентом, врачом и администрацией клиники.</text:p>
      <text:p text:style-name="P2">Актуальность темы обусловлена тем, что традиционные методы ведения учёта посещений — бумажные карты пациентов, журналы записи на приём, устная передача информации между сотрудниками — приводят к потере данных, затрудняют поиск истории болезни питомца и снижают скорость обслуживания клиентов. Внедрение информационной системы позволяет устранить эти недостатки, обеспечив централизованное хранение медицинских данных, автоматизацию записи на приём и оперативный доступ к истории визитов.</text:p>
      <text:p text:style-name="P2">Цель проекта — разработка информационной системы для учёта посещений в ветеринарной клинике, обеспечивающей автоматизацию записи на приём, ведение электронных медицинских карт питомцев и удобное взаимодействие между клиентами и врачами клиники.</text:p>
      <text:p text:style-name="P2">Задачи проекта:</text:p>
      <text:list text:style-name="L1">
        <text:list-item>
          <text:p text:style-name="P3">спроектировать структуру базы данных, обеспечивающую хранение информации о клиентах, питомцах, врачах, услугах, записях на приём и медицинских протоколах; </text:p>
        </text:list-item>
        <text:list-item>
          <text:p text:style-name="P3">разработать архитектуру серверного приложения (REST API) с разделением на слои моделей, репозиториев, бизнес-логики и обработчиков запросов; </text:p>
        </text:list-item>
        <text:list-item>
          <text:p text:style-name="P3">реализовать регистрацию и авторизацию пользователей с разделением ролей (клиент, врач) на основе JWT-токенов; </text:p>
        </text:list-item>
        <text:list-item>
          <text:p text:style-name="P4">реализовать для клиента функции записи на приём с выбором питомца,<draw:g text:anchor-type="char" draw:z-index="0" draw:name="Группа 2" draw:style-name="gr1"><draw:custom-shape draw:name="Rectangle 1" draw:style-name="gr2" draw:text-style-name="P5" svg:width="18.587cm" svg:height="28.488cm" svg:x="1.991cm" svg:y="0.635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" draw:style-name="gr3" draw:text-style-name="P5" svg:x1="3.006cm" svg:y1="27.626cm" svg:x2="3.008cm" svg:y2="29.107cm"><text:p/></draw:line><draw:line draw:name="Line 2" draw:style-name="gr3" draw:text-style-name="P5" svg:x1="2cm" svg:y1="27.615cm" svg:x2="20.557cm" svg:y2="27.616cm"><text:p/></draw:line><draw:line draw:name="Line 3" draw:style-name="gr3" draw:text-style-name="P5" svg:x1="4.022cm" svg:y1="27.626cm" svg:x2="4.024cm" svg:y2="29.107cm"><text:p/></draw:line><draw:line draw:name="Line 4" draw:style-name="gr3" draw:text-style-name="P5" svg:x1="6.562cm" svg:y1="27.626cm" svg:x2="6.564cm" svg:y2="29.107cm"><text:p/></draw:line><draw:line draw:name="Line 5" draw:style-name="gr3" draw:text-style-name="P5" svg:x1="8.085cm" svg:y1="27.64cm" svg:x2="8.086cm" svg:y2="29.107cm"><text:p/></draw:line><draw:line draw:name="Line 6" draw:style-name="gr3" draw:text-style-name="P5" svg:x1="9.099cm" svg:y1="27.626cm" svg:x2="9.101cm" svg:y2="29.093cm"><text:p/></draw:line><draw:line draw:name="Line 7" draw:style-name="gr3" draw:text-style-name="P5" svg:x1="19.561cm" svg:y1="27.626cm" svg:x2="19.564cm" svg:y2="29.107cm"><text:p/></draw:line><draw:line draw:name="Line 8" draw:style-name="gr4" draw:text-style-name="P5" svg:x1="2cm" svg:y1="28.116cm" svg:x2="9.083cm" svg:y2="28.119cm"><text:p/></draw:line><draw:line draw:name="Line 9" draw:style-name="gr3" draw:text-style-name="P5" svg:x1="2cm" svg:y1="28.619cm" svg:x2="9.083cm" svg:y2="28.62cm"><text:p/></draw:line><draw:line draw:name="Line 10" draw:style-name="gr4" draw:text-style-name="P5" svg:x1="19.573cm" svg:y1="28.12cm" svg:x2="20.568cm" svg:y2="28.122cm"><text:p/></draw:line><draw:custom-shape draw:name="Rectangle 2" draw:style-name="gr5" draw:text-style-name="P7" svg:width="0.929cm" svg:height="0.44cm" svg:x="2.042cm" svg:y="28.639cm"><text:p text:style-name="P6" loext:marker-style-name="T2"><text:span text:style-name="T2">Из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5" draw:text-style-name="P7" svg:width="0.929cm" svg:height="0.44cm" svg:x="3.049cm" svg:y="28.639cm"><text:p text:style-name="P6" loext:marker-style-name="T2"><text:bookmark-start text:name="__DdeLink__7869_1468243391 Копия 2"/><text:span text:style-name="T2">Лист</text:span><text:bookmark-end text:name="__DdeLink__7869_1468243391 Копия 2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6" draw:text-style-name="P7" svg:width="2.391cm" svg:height="0.44cm" svg:x="4.099cm" svg:y="28.639cm"><text:p text:style-name="P6" loext:marker-style-name="T2"><text:span text:style-name="T2">№ доку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7" draw:text-style-name="P7" svg:width="1.424cm" svg:height="0.44cm" svg:x="6.623cm" svg:y="28.639cm"><text:p text:style-name="P6" loext:marker-style-name="T2"><text:span text:style-name="T2">Подпись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" draw:style-name="gr5" draw:text-style-name="P7" svg:width="0.929cm" svg:height="0.44cm" svg:x="8.129cm" svg:y="28.639cm"><text:p text:style-name="P6" loext:marker-style-name="T2"><text:span text:style-name="T2">Дата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5" draw:text-style-name="P7" svg:width="0.929cm" svg:height="0.44cm" svg:x="19.602cm" svg:y="27.667cm"><text:p text:style-name="P6" loext:marker-style-name="T2"><text:span text:style-name="T2">Лист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8" draw:text-style-name="P7" svg:width="0.929cm" svg:height="0.602cm" svg:x="19.602cm" svg:y="28.319cm"><text:p text:style-name="Standard" loext:marker-style-name="T3"><text:span text:style-name="T3"><text:s text:c="2"/></text:span><text:span text:style-name="T4">0</text:span></text:p><text:p text:style-name="P8" loext:marker-style-name="T5"/><text:p text:style-name="P8" loext:marker-style-name="T5"/><text:p text:style-name="P8" loext:marker-style-name="T5"/><text:p text:style-name="P8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9" draw:text-style-name="P7" svg:width="10.291cm" svg:height="0.678cm" svg:x="9.189cm" svg:y="28.014cm"><text:p text:style-name="P9" loext:marker-style-name="T6"><text:span text:style-name="T6">код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 </text:p>
          <text:p text:style-name="P10">врача, услуги и времени, просмотра истории визитов с экспортом медицинского протокола в PDF, ведения карточек питомцев и оформления заказов в интернет-магазине товаров; </text:p>
        </text:list-item>
        <text:list-item>
          <text:p text:style-name="P3">реализовать для врача функции просмотра расписания, подтверждения и отклонения записей на приём, завершения приёма с фиксацией веса питомца, диагнозов, лечения и медикаментов, а также просмотра картотеки пациентов; </text:p>
        </text:list-item>
        <text:list-item>
          <text:p text:style-name="P3">реализовать справочник диагнозов с возможностью выбора нескольких диагнозов при завершении приёма; </text:p>
        </text:list-item>
        <text:list-item>
          <text:p text:style-name="P3">реализовать дашборд со статистикой посещений и графиками динамики веса питомцев; </text:p>
        </text:list-item>
        <text:list-item>
          <text:p text:style-name="P11">выполнить тестирование разработанной системы на корректность работы основных сценариев. </text:p>
        </text:list-item>
      </text:list>
      <text:p text:style-name="P12">Область применения результатов работы охватывает частные ветеринарные клиники, заинтересованные в автоматизации внутренних процессов учёта посещений. Внедрение разработанной системы позволит сократить время на регистрацию и поиск медицинской информации, повысить точность ведения истории болезни питомцев и улучшить качество обслуживания клиентов клиники.</text:p>
      <text:h text:style-name="P13" text:outline-level="1"><draw:g text:anchor-type="char" draw:z-index="1" draw:name="Группа 1" draw:style-name="gr1"><draw:custom-shape draw:name="Rectangle 19" draw:style-name="gr2" draw:text-style-name="P5" svg:width="18.587cm" svg:height="28.488cm" svg:x="1.991cm" svg:y="0.635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" draw:style-name="gr3" draw:text-style-name="P5" svg:x1="3.006cm" svg:y1="27.626cm" svg:x2="3.008cm" svg:y2="29.107cm"><text:p/></draw:line><draw:line draw:name="Line 22" draw:style-name="gr3" draw:text-style-name="P5" svg:x1="2cm" svg:y1="27.614cm" svg:x2="20.557cm" svg:y2="27.615cm"><text:p/></draw:line><draw:line draw:name="Line 23" draw:style-name="gr3" draw:text-style-name="P5" svg:x1="4.022cm" svg:y1="27.626cm" svg:x2="4.024cm" svg:y2="29.107cm"><text:p/></draw:line><draw:line draw:name="Line 24" draw:style-name="gr3" draw:text-style-name="P5" svg:x1="6.562cm" svg:y1="27.626cm" svg:x2="6.564cm" svg:y2="29.107cm"><text:p/></draw:line><draw:line draw:name="Line 25" draw:style-name="gr3" draw:text-style-name="P5" svg:x1="8.085cm" svg:y1="27.639cm" svg:x2="8.086cm" svg:y2="29.106cm"><text:p/></draw:line><draw:line draw:name="Line 26" draw:style-name="gr3" draw:text-style-name="P5" svg:x1="9.099cm" svg:y1="27.626cm" svg:x2="9.101cm" svg:y2="29.093cm"><text:p/></draw:line><draw:line draw:name="Line 27" draw:style-name="gr3" draw:text-style-name="P5" svg:x1="19.561cm" svg:y1="27.626cm" svg:x2="19.564cm" svg:y2="29.107cm"><text:p/></draw:line><draw:line draw:name="Line 28" draw:style-name="gr4" draw:text-style-name="P5" svg:x1="2cm" svg:y1="28.115cm" svg:x2="9.083cm" svg:y2="28.118cm"><text:p/></draw:line><draw:line draw:name="Line 29" draw:style-name="gr3" draw:text-style-name="P5" svg:x1="2cm" svg:y1="28.618cm" svg:x2="9.083cm" svg:y2="28.619cm"><text:p/></draw:line><draw:line draw:name="Line 30" draw:style-name="gr4" draw:text-style-name="P5" svg:x1="19.573cm" svg:y1="28.12cm" svg:x2="20.568cm" svg:y2="28.122cm"><text:p/></draw:line><draw:custom-shape draw:name="Rectangle 20" draw:style-name="gr5" draw:text-style-name="P7" svg:width="0.929cm" svg:height="0.44cm" svg:x="2.042cm" svg:y="28.639cm"><text:p text:style-name="P6" loext:marker-style-name="T2"><text:span text:style-name="T2">Из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5" draw:text-style-name="P7" svg:width="0.929cm" svg:height="0.44cm" svg:x="3.049cm" svg:y="28.639cm"><text:p text:style-name="P6" loext:marker-style-name="T2"><text:bookmark-start text:name="__DdeLink__7869_1468243391 Копия 2 Копия 1"/><text:span text:style-name="T2">Лист</text:span><text:bookmark-end text:name="__DdeLink__7869_1468243391 Копия 2 Копия 1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2.391cm" svg:height="0.44cm" svg:x="4.099cm" svg:y="28.639cm"><text:p text:style-name="P6" loext:marker-style-name="T2"><text:span text:style-name="T2">№ доку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1.424cm" svg:height="0.44cm" svg:x="6.623cm" svg:y="28.639cm"><text:p text:style-name="P6" loext:marker-style-name="T2"><text:span text:style-name="T2">Подпись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5" draw:text-style-name="P7" svg:width="0.929cm" svg:height="0.44cm" svg:x="8.129cm" svg:y="28.639cm"><text:p text:style-name="P6" loext:marker-style-name="T2"><text:span text:style-name="T2">Дата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5" draw:text-style-name="P7" svg:width="0.929cm" svg:height="0.44cm" svg:x="19.602cm" svg:y="27.667cm"><text:p text:style-name="P6" loext:marker-style-name="T2"><text:span text:style-name="T2">Лист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8" draw:text-style-name="P7" svg:width="0.929cm" svg:height="0.602cm" svg:x="19.602cm" svg:y="28.319cm"><text:p text:style-name="Standard" loext:marker-style-name="T3"><text:span text:style-name="T3"><text:s text:c="3"/></text:span><text:span text:style-name="T4">0</text:span></text:p><text:p text:style-name="P8" loext:marker-style-name="T5"/><text:p text:style-name="P8" loext:marker-style-name="T5"/><text:p text:style-name="P8" loext:marker-style-name="T5"/><text:p text:style-name="P8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9" draw:text-style-name="P7" svg:width="10.291cm" svg:height="0.678cm" svg:x="9.189cm" svg:y="28.014cm"><text:p text:style-name="P9" loext:marker-style-name="T6"><text:span text:style-name="T6">код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Чертежный" style:family="paragraph">
      <style:paragraph-properties fo:margin-top="0cm" fo:margin-bottom="0cm" style:contextual-spacing="false" fo:line-height="100%" fo:text-align="justify" style:justify-single-word="false" fo:orphans="2" fo:widows="2" style:writing-mode="lr-tb" loext:word-spacing-minimum="75%" loext:word-spacing-maximum="133%"/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26-06-21T01:18:52.164908302</meta:creation-date>
    <meta:editing-duration>PT5M46S</meta:editing-duration>
    <meta:generator>LibreOffice/26.2.4.2$Linux_X86_64 LibreOffice_project/f4d82cf4d44730936b3f1a72d05a6253f577d3e9</meta:generator>
    <dc:title>Задание1</dc:title>
    <dc:date>2026-06-25T10:27:55.615943511</dc:date>
    <meta:document-statistic meta:table-count="0" meta:image-count="0" meta:object-count="0" meta:page-count="2" meta:paragraph-count="31" meta:word-count="340" meta:character-count="2738" meta:non-whitespace-character-count="2421"/>
    <meta:user-defined meta:name="AppVersion">16.0000</meta:user-defined>
    <meta:template xlink:type="simple" xlink:actuate="onRequest" xlink:title="Задание1" xlink:href="../../../../.config/libreoffice/4/user/template/Задание1.ott" meta:date="2026-06-21T01:18:51.210378050"/>
  </office:meta>
</office:document-meta>
</file>