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 style:font-charset="x-symbol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list-style-name="">
      <style:paragraph-properties fo:line-height="150%" fo:text-align="center" style:justify-single-word="false" fo:hyphenation-ladder-count="no-limit" fo:hyphenation-keep="auto" loext:hyphenation-keep-type="column" loext:hyphenation-keep-line="false"/>
      <style:text-properties fo:font-size="14pt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Text_20_body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3" style:family="paragraph" style:parent-style-name="Text_20_body" style:list-style-name="L1">
      <style:paragraph-properties fo:line-height="150%" fo:text-align="justify" style:justify-single-word="false"/>
    </style:style>
    <style:style style:name="P4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5" style:family="paragraph" style:parent-style-name="Text_20_body" style:list-style-name="L1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6" style:family="paragraph" style:parent-style-name="Standard" style:list-style-name="">
      <style:paragraph-properties fo:line-height="150%" fo:text-align="justify" style:justify-single-word="false" fo:hyphenation-ladder-count="no-limit" fo:hyphenation-keep="auto" loext:hyphenation-keep-type="column" loext:hyphenation-keep-line="false"/>
      <style:text-properties style:font-name="Times New Roman" fo:font-size="14pt" style:font-size-asian="14pt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" style:font-size-complex="14pt"/>
    </style:style>
    <style:style style:name="T2" style:family="text">
      <style:text-properties style:font-name="Times New Roman" fo:font-size="14pt" style:font-size-asian="14pt" style:language-asian="ar" style:country-asian="SA" style:font-size-complex="14pt"/>
    </style:style>
    <text:list-style style:name="L1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ВВЕДЕНИЕ</text:span></text:span></text:h>
      <text:p text:style-name="P2">В условиях стремительного развития цифровых технологий и роста спроса на качественные ветеринарные услуги особую актуальность приобретает автоматизация процессов учёта и обслуживания клиентов ветеринарных клиник. Современная ветеринарная практика требует оперативного учёта питомцев, истории их посещений, диагнозов и назначенного лечения, а также удобного взаимодействия между клиентом, врачом и администрацией клиники.</text:p>
      <text:p text:style-name="P2">Актуальность темы обусловлена тем, что традиционные методы ведения учёта посещений — бумажные карты пациентов, журналы записи на приём, устная передача информации между сотрудниками — приводят к потере данных, затрудняют поиск истории болезни питомца и снижают скорость обслуживания клиентов. Внедрение информационной системы позволяет устранить эти недостатки, обеспечив централизованное хранение медицинских данных, автоматизацию записи на приём и оперативный доступ к истории визитов.</text:p>
      <text:p text:style-name="P2">Цель проекта — разработка информационной системы для учёта посещений в ветеринарной клинике, обеспечивающей автоматизацию записи на приём, ведение электронных медицинских карт питомцев и удобное взаимодействие между клиентами и врачами клиники.</text:p>
      <text:p text:style-name="P2">Задачи проекта:</text:p>
      <text:list text:style-name="L1">
        <text:list-item>
          <text:p text:style-name="P3"><text:span text:style-name="T2">спроектировать структуру базы данных, обеспечивающую хранение информации о клиентах, питомцах, врачах, услугах, записях на приём и медицинских протоколах; </text:span></text:p>
        </text:list-item>
        <text:list-item>
          <text:p text:style-name="P4">разработать архитектуру серверного приложения (REST API) с разделением на слои моделей, репозиториев, бизнес-логики и обработчиков запросов; </text:p>
        </text:list-item>
        <text:list-item>
          <text:p text:style-name="P4">реализовать регистрацию и авторизацию пользователей с разделением ролей (клиент, врач) на основе JWT-токенов; </text:p>
        </text:list-item>
        <text:list-item>
          <text:p text:style-name="P4">реализовать для клиента функции записи на приём с выбором питомца, врача, услуги и времени, просмотра истории визитов с экспортом <text:soft-page-break/>медицинского протокола в PDF, ведения карточек питомцев и оформления заказов в интернет-магазине товаров; </text:p>
        </text:list-item>
        <text:list-item>
          <text:p text:style-name="P4">реализовать для врача функции просмотра расписания, подтверждения и отклонения записей на приём, завершения приёма с фиксацией веса питомца, диагнозов, лечения и медикаментов, а также просмотра картотеки пациентов; </text:p>
        </text:list-item>
        <text:list-item>
          <text:p text:style-name="P4">реализовать справочник диагнозов с возможностью выбора нескольких диагнозов при завершении приёма; </text:p>
        </text:list-item>
        <text:list-item>
          <text:p text:style-name="P4">реализовать дашборд со статистикой посещений и графиками динамики веса питомцев; </text:p>
        </text:list-item>
        <text:list-item>
          <text:p text:style-name="P5">выполнить тестирование разработанной системы на корректность работы основных сценариев. </text:p>
        </text:list-item>
      </text:list>
      <text:p text:style-name="P2">Область применения результатов работы охватывает частные ветеринарные клиники, заинтересованные в автоматизации внутренних процессов учёта посещений. Внедрение разработанной системы позволит сократить время на регистрацию и поиск медицинской информации, повысить точность ведения истории болезни питомцев и улучшить качество обслуживания клиентов клиники.</text:p>
      <text:h text:style-name="P6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 style:font-charset="x-symbol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lef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379cm" fo:margin-top="0.284cm" fo:margin-bottom="0cm" style:contextual-spacing="false" fo:text-indent="0.998cm" style:auto-text-indent="false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499cm" fo:margin-top="0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 loext:word-spacing-minimum="75%" loext:word-spacing-maximum="133%">
        <style:tab-stops>
          <style:tab-stop style:position="2cm"/>
          <style:tab-stop style:position="10.478cm"/>
        </style:tab-stops>
      </style:paragraph-properties>
      <style:text-properties fo:font-size="14pt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Абзац_20_списка_20_Знак" style:display-name="Абзац списка Знак" style:family="text" loext:linked-style-name="List_20_Paragraph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="Calibri" fo:font-family="Calibri" style:font-family-generic="roman" style:font-pitch="variable" style:font-charset="x-symbol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Calibri" fo:font-family="Calibri" style:font-family-generic="roman" style:font-pitch="variable" style:font-charset="x-symbol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374cm" fo:margin-left="2.387cm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fo:text-indent="-0.504cm" fo:margin-left="1.379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4.28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6.17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8.05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9.945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1.83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3.71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5.60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648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8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5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8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8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68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8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2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6cm" fo:text-indent="-0.318cm" fo:margin-left="4.0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7cm" fo:text-indent="-0.318cm" fo:margin-left="7.87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68cm" fo:text-indent="-0.318cm" fo:margin-left="11.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4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cm" fo:margin-left="3cm" fo:margin-right="0.9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2</meta:editing-cycles>
    <meta:creation-date>2026-06-21T01:18:52.164908302</meta:creation-date>
    <meta:editing-duration>PT1M19S</meta:editing-duration>
    <meta:generator>LibreOffice/26.2.4.2$Linux_X86_64 LibreOffice_project/f4d82cf4d44730936b3f1a72d05a6253f577d3e9</meta:generator>
    <dc:title>Задание1</dc:title>
    <dc:date>2026-06-21T01:20:10.274712015</dc:date>
    <meta:document-statistic meta:table-count="0" meta:image-count="0" meta:object-count="0" meta:page-count="2" meta:paragraph-count="14" meta:word-count="321" meta:character-count="2662" meta:non-whitespace-character-count="2352"/>
    <meta:user-defined meta:name="AppVersion">16.0000</meta:user-defined>
    <meta:template xlink:type="simple" xlink:actuate="onRequest" xlink:title="Задание1" xlink:href="../../../../.config/libreoffice/4/user/template/Задание1.ott" meta:date="2026-06-21T01:18:51.210378050"/>
  </office:meta>
</office:document-meta>
</file>