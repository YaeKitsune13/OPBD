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80000025B47ACEF74.png" manifest:media-type="image/png"/>
  <manifest:file-entry manifest:full-path="Pictures/10000001000002B20000036FBCBBF128.png" manifest:media-type="image/png"/>
  <manifest:file-entry manifest:full-path="Pictures/100000010000073D0000035F93870F53.png" manifest:media-type="image/png"/>
  <manifest:file-entry manifest:full-path="Pictures/100000010000073D0000035FFE789D85.png" manifest:media-type="image/png"/>
  <manifest:file-entry manifest:full-path="Pictures/100000010000073D0000035F10B4DD14.png" manifest:media-type="image/png"/>
  <manifest:file-entry manifest:full-path="Pictures/10000001000003000000036CC1364F2C.png" manifest:media-type="image/png"/>
  <manifest:file-entry manifest:full-path="Pictures/10000001000002FD000002453CB8738D.png" manifest:media-type="image/png"/>
  <manifest:file-entry manifest:full-path="Pictures/1000000100000734000003DD93996B7B.png" manifest:media-type="image/png"/>
  <manifest:file-entry manifest:full-path="Pictures/1000000100000734000003DDD2C518F7.png" manifest:media-type="image/png"/>
  <manifest:file-entry manifest:full-path="Pictures/100000010000073100000214B54EAFF1.png" manifest:media-type="image/png"/>
  <manifest:file-entry manifest:full-path="Pictures/1000000100000734000003DDCA95F89E.png" manifest:media-type="image/png"/>
  <manifest:file-entry manifest:full-path="Pictures/1000000100000734000003DDDCD57585.png" manifest:media-type="image/png"/>
  <manifest:file-entry manifest:full-path="Pictures/10000001000001E3000001D9D877D5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.499cm" style:contextual-spacing="false" fo:line-height="150%" fo:text-align="center" style:justify-single-word="false" fo:orphans="1" fo:text-indent="0cm" style:auto-text-indent="false"/>
      <style:text-properties style:language-asian="ar" style:country-asian="SA" style:font-size-complex="10pt"/>
    </style:style>
    <style:style style:name="P2" style:family="paragraph" style:parent-style-name="Heading_20_4">
      <style:paragraph-properties fo:margin-top="0cm" fo:margin-bottom="0.499cm" style:contextual-spacing="false" fo:line-height="150%" fo:text-align="center" style:justify-single-word="false" fo:orphans="1"/>
      <style:text-properties style:font-name="Times New Roman" fo:font-size="14pt" style:font-name-asian="Times New Roman1" style:font-size-asian="14pt" style:language-asian="ar" style:country-asian="SA" style:font-name-complex="Times New Roman1" style:font-size-complex="10pt"/>
    </style:style>
    <style:style style:name="P3" style:family="paragraph" style:parent-style-name="Text_20_body">
      <style:paragraph-properties fo:margin-top="0cm" fo:margin-bottom="0.499cm" style:contextual-spacing="false" fo:line-height="150%" fo:text-align="justify" style:justify-single-word="false" fo:orphans="1"/>
      <style:text-properties style:language-asian="ar" style:country-asian="SA" style:font-size-complex="10pt"/>
    </style:style>
    <style:style style:name="P4" style:family="paragraph" style:parent-style-name="Standard" style:list-style-name="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style:font-name-asian="Times New Roman1" style:font-name-complex="Times New Roman1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ПРИЛОЖЕНИЕ В</text:span></text:h>
      <text:h text:style-name="P2" text:outline-level="4">Результат работы программного продукта</text:h>
      <text:p text:style-name="P3">В приложении представлены скриншоты экранов разработанного веб-приложения, демонстрирующие результат работы информационной системы.</text:p>
      <text:p text:style-name="P3"><draw:frame draw:style-name="fr1" draw:name="Изображение1" text:anchor-type="char" svg:width="12.779cm" svg:height="12.515cm" draw:z-index="0"><draw:image xlink:href="Pictures/10000001000001E3000001D9D877D58D.png" xlink:type="simple" xlink:show="embed" xlink:actuate="onLoad" draw:mime-type="image/png"/></draw:frame><text:line-break/>Рисунок В.1 – Форма авторизации пользователя</text:p>
      <text:p text:style-name="P3"><draw:frame draw:style-name="fr2" draw:name="Изображение2" text:anchor-type="char" svg:width="17.002cm" svg:height="9.118cm" draw:z-index="1"><draw:image xlink:href="Pictures/1000000100000734000003DDDCD57585.png" xlink:type="simple" xlink:show="embed" xlink:actuate="onLoad" draw:mime-type="image/png"/></draw:frame><text:soft-page-break/><text:line-break/>Рисунок В.2 – Дашборд клиента</text:p>
      <text:p text:style-name="P3"><draw:frame draw:style-name="fr2" draw:name="Изображение3" text:anchor-type="char" svg:width="17.002cm" svg:height="9.118cm" draw:z-index="2"><draw:image xlink:href="Pictures/1000000100000734000003DDCA95F89E.png" xlink:type="simple" xlink:show="embed" xlink:actuate="onLoad" draw:mime-type="image/png"/></draw:frame><text:line-break/>Рисунок В.3 – Страница «Питомцы»</text:p>
      <text:p text:style-name="P3"><draw:frame draw:style-name="fr2" draw:name="Изображение4" text:anchor-type="char" svg:width="17.002cm" svg:height="9.118cm" draw:z-index="3"><draw:image xlink:href="Pictures/1000000100000734000003DDD2C518F7.png" xlink:type="simple" xlink:show="embed" xlink:actuate="onLoad" draw:mime-type="image/png"/></draw:frame><text:soft-page-break/><text:line-break/>Рисунок В.4 – Форма записи на приём</text:p>
      <text:p text:style-name="P3"><draw:frame draw:style-name="fr3" draw:name="Изображение5" text:anchor-type="char" svg:x="-0.106cm" svg:y="0cm" svg:width="17.002cm" svg:height="9.118cm" draw:z-index="4"><draw:image xlink:href="Pictures/1000000100000734000003DD93996B7B.png" xlink:type="simple" xlink:show="embed" xlink:actuate="onLoad" draw:mime-type="image/png"/></draw:frame><text:line-break/>Рисунок В.5 – История визитов клиента</text:p>
      <text:p text:style-name="P3"><draw:frame draw:style-name="fr2" draw:name="Изображение6" text:anchor-type="char" svg:width="17.002cm" svg:height="12.912cm" draw:z-index="5"><draw:image xlink:href="Pictures/10000001000002FD000002453CB8738D.png" xlink:type="simple" xlink:show="embed" xlink:actuate="onLoad" draw:mime-type="image/png"/></draw:frame><text:soft-page-break/><text:line-break/>Рисунок В.6 – Медицинское заключение визита</text:p>
      <text:p text:style-name="P3"><draw:frame draw:style-name="fr2" draw:name="Изображение7" text:anchor-type="char" svg:width="17.002cm" svg:height="19.392cm" draw:z-index="6"><draw:image xlink:href="Pictures/10000001000003000000036CC1364F2C.png" xlink:type="simple" xlink:show="embed" xlink:actuate="onLoad" draw:mime-type="image/png"/></draw:frame><text:soft-page-break/><text:line-break/>Рисунок В.7 – Медицинское заключение, экспортированное в PDF</text:p>
      <text:p text:style-name="P3"><draw:frame draw:style-name="fr2" draw:name="Изображение8" text:anchor-type="char" svg:width="17.002cm" svg:height="7.918cm" draw:z-index="7"><draw:image xlink:href="Pictures/100000010000073D0000035F10B4DD14.png" xlink:type="simple" xlink:show="embed" xlink:actuate="onLoad" draw:mime-type="image/png"/></draw:frame><text:soft-page-break/><text:line-break/>Рисунок В.8 – Страница «Магазин»</text:p>
      <text:p text:style-name="P3"><draw:frame draw:style-name="fr4" draw:name="Изображение9" text:anchor-type="char" svg:width="17.002cm" svg:height="7.918cm" draw:z-index="8"><draw:image xlink:href="Pictures/100000010000073D0000035F93870F53.png" xlink:type="simple" xlink:show="embed" xlink:actuate="onLoad" draw:mime-type="image/png"/></draw:frame><text:line-break/>Рисунок В.9 – Статистика динамики веса питомца</text:p>
      <text:p text:style-name="P3"><draw:frame draw:style-name="fr2" draw:name="Изображение10" text:anchor-type="char" svg:width="17.002cm" svg:height="7.918cm" draw:z-index="9"><draw:image xlink:href="Pictures/100000010000073D0000035FFE789D85.png" xlink:type="simple" xlink:show="embed" xlink:actuate="onLoad" draw:mime-type="image/png"/></draw:frame><text:soft-page-break/><text:line-break/>Рисунок В.10 – Расписание приёма врача</text:p>
      <text:p text:style-name="P3"><draw:frame draw:style-name="fr1" draw:name="Изображение11" text:anchor-type="char" svg:width="16.589cm" svg:height="13.444cm" draw:z-index="10"><draw:image xlink:href="Pictures/10000001000002E80000025B47ACEF74.png" xlink:type="simple" xlink:show="embed" xlink:actuate="onLoad" draw:mime-type="image/png"/></draw:frame><text:line-break/>Рисунок В.11 – Завершение приёма с указанием диагнозов</text:p>
      <text:p text:style-name="P3"><draw:frame draw:style-name="fr2" draw:name="Изображение12" text:anchor-type="char" svg:width="17.002cm" svg:height="4.912cm" draw:z-index="11"><draw:image xlink:href="Pictures/100000010000073100000214B54EAFF1.png" xlink:type="simple" xlink:show="embed" xlink:actuate="onLoad" draw:mime-type="image/png"/></draw:frame><text:soft-page-break/><text:line-break/>Рисунок В.12 – Картотека пациентов врача</text:p>
      <text:p text:style-name="P3"><draw:frame draw:style-name="fr3" draw:name="Изображение13" text:anchor-type="char" svg:x="1.111cm" svg:y="-0.714cm" svg:width="14.78cm" svg:height="18.69cm" draw:z-index="12"><draw:image xlink:href="Pictures/10000001000002B20000036FBCBBF128.png" xlink:type="simple" xlink:show="embed" xlink:actuate="onLoad" draw:mime-type="image/png"/></draw:frame><text:line-break/>Рисунок В.13 – Медицинская история клиента (вид врача)</text:p>
      <text:h text:style-name="P4" text:outline-level="1"><text:soft-page-break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379cm" fo:margin-top="0.284cm" fo:margin-bottom="0cm" style:contextual-spacing="false" fo:text-indent="0.998cm" style:auto-text-indent="fals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 style:font-charset="x-symbol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 style:font-charset="x-symbo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74cm" fo:margin-left="2.38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504cm" fo:margin-left="1.37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2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17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05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94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83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71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5.6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64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6cm" fo:text-indent="-0.318cm" fo:margin-left="4.0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7cm" fo:text-indent="-0.318cm" fo:margin-left="7.8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68cm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creation-date>2026-06-21T14:27:01.790664431</meta:creation-date>
    <meta:editing-duration>PT9M18S</meta:editing-duration>
    <meta:generator>LibreOffice/26.2.4.2$Linux_X86_64 LibreOffice_project/f4d82cf4d44730936b3f1a72d05a6253f577d3e9</meta:generator>
    <dc:title>Задание</dc:title>
    <dc:date>2026-06-21T14:36:19.711175841</dc:date>
    <meta:document-statistic meta:table-count="0" meta:image-count="13" meta:object-count="0" meta:page-count="9" meta:paragraph-count="16" meta:word-count="88" meta:character-count="738" meta:non-whitespace-character-count="640"/>
    <meta:user-defined meta:name="AppVersion">16.0000</meta:user-defined>
    <meta:template xlink:type="simple" xlink:actuate="onRequest" xlink:title="Задание" xlink:href="../../../../.config/libreoffice/4/user/template/Задание.ott" meta:date="2026-06-21T14:27:01.015800303"/>
  </office:meta>
</office:document-meta>
</file>