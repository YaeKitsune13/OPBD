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288334075BD.png" manifest:media-type="image/png"/>
  <manifest:file-entry manifest:full-path="Pictures/10000001000007360000032D6035CDF9.png" manifest:media-type="image/png"/>
  <manifest:file-entry manifest:full-path="Pictures/100000010000026000000127F8478650.png" manifest:media-type="image/png"/>
  <manifest:file-entry manifest:full-path="Pictures/100000010000049D000002E67C232B77.png" manifest:media-type="image/png"/>
  <manifest:file-entry manifest:full-path="Pictures/10000001000003AE000002F0BA6CD7BF.png" manifest:media-type="image/png"/>
  <manifest:file-entry manifest:full-path="Pictures/100000010000073B000002E66D47D670.png" manifest:media-type="image/png"/>
  <manifest:file-entry manifest:full-path="Pictures/100000010000027C00000219C6242934.png" manifest:media-type="image/png"/>
  <manifest:file-entry manifest:full-path="Pictures/10000001000001E80000022589F0B03C.png" manifest:media-type="image/png"/>
  <manifest:file-entry manifest:full-path="Pictures/10000001000001F5000002CEF8586E4B.png" manifest:media-type="image/png"/>
  <manifest:file-entry manifest:full-path="Pictures/10000001000001D80000014B73A4AF78.png" manifest:media-type="image/png"/>
  <manifest:file-entry manifest:full-path="Pictures/1000000000000D1C0000067268621A46.png" manifest:media-type="image/png"/>
  <manifest:file-entry manifest:full-path="Pictures/10000001000002F70000034803A1638F.png" manifest:media-type="image/png"/>
  <manifest:file-entry manifest:full-path="Pictures/10000001000002EA000001C402B83B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f485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71cm" svg:stroke-color="#d98841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2f485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stroke-dash="Long_20_Dot_20__28_Rounded_29_" svg:stroke-width="0.018cm" svg:stroke-color="#666666" draw:marker-start-width="0.227cm" draw:marker-end-width="0.227cm" svg:stroke-linecap="round" draw:fill="none" draw:opacity="100%" draw:textarea-horizontal-align="center" draw:textarea-vertical-align="middle" draw:shadow="hidden" loext:glow-radius="0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eef3f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8%" loext:shadow-blur="0.212cm" loext:decorative="false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.1cm" svg:stroke-color="#666666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36cm" fo:min-width="11.75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688cm" fo:min-width="28.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width="0cm" draw:fill="solid" draw:fill-color="#5b8c7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left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2f4858"/>
      <style:paragraph-properties fo:text-align="left"/>
      <style:text-properties fo:font-size="18pt"/>
    </style:style>
    <style:style style:name="P14" style:family="paragraph"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="solid" draw:fill-color="#eef3f1"/>
      <style:paragraph-properties fo:text-align="left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5b8c7b"/>
      <style:paragraph-properties fo:text-align="left"/>
      <style:text-properties fo:font-size="18pt"/>
    </style:style>
    <style:style style:name="T1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8pt" fo:letter-spacing="normal" fo:language="en" fo:country="US" fo:font-style="normal" style:text-underline-style="none" fo:font-weight="bold" fo:background-color="transparent" style:font-name-asian="Cambria1" style:font-size-asian="28pt" style:font-style-asian="normal" style:font-weight-asian="bold" style:font-name-complex="Cambria" style:font-size-complex="28pt" style:font-style-complex="normal" style:font-weight-complex="bold"/>
    </style:style>
    <style:style style:name="T3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5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f4858" loext:opacity="100%" style:text-outline="false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1" style:font-size-asian="30pt" style:font-style-asian="normal" style:font-weight-asian="bold" style:font-name-complex="Cambria" style:font-size-complex="30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9" style:family="text">
      <style:text-properties fo:font-variant="normal" fo:text-transform="none" fo:color="#2f4858" loext:opacity="100%" style:text-outline="false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1" style:font-size-asian="16pt" style:font-style-asian="normal" style:font-weight-asian="bold" style:font-name-complex="Cambria" style:font-size-complex="16pt" style:font-style-complex="normal" style:font-weight-complex="bold"/>
    </style:style>
    <style:style style:name="T10" style:family="text">
      <style:text-properties fo:font-variant="normal" fo:text-transform="none" fo:color="#26343b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6b7a8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variant="normal" fo:text-transform="none" fo:color="#d98841" loext:opacity="100%" style:text-outline="false" style:text-line-through-style="none" style:text-line-through-type="none" style:text-position="0% 100%" style:font-name="Calibri" fo:font-size="12pt" fo:letter-spacing="0.071cm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3" style:family="text">
      <style:text-properties fo:font-variant="normal" fo:text-transform="none" fo:color="#6b7a80" loext:opacity="100%" style:text-outline="false" style:text-line-through-style="none" style:text-line-through-type="none" style:text-position="0% 100%" style:font-name="Calibri" fo:font-size="12.5pt" fo:letter-spacing="normal" fo:language="en" fo:country="US" fo:font-style="normal" style:text-underline-style="none" fo:font-weight="normal" fo:background-color="transparent" style:font-name-asian="Calibri2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48pt" fo:letter-spacing="normal" fo:language="en" fo:country="US" fo:font-style="normal" style:text-underline-style="none" fo:font-weight="bold" fo:background-color="transparent" style:font-name-asian="Cambria1" style:font-size-asian="48pt" style:font-style-asian="normal" style:font-weight-asian="bold" style:font-name-complex="Cambria" style:font-size-complex="48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6" style:family="text">
      <style:text-properties fo:font-variant="normal" fo:text-transform="none" fo:color="#26343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7" style:family="text">
      <style:text-properties fo:font-variant="normal" fo:text-transform="none" fo:color="#5b8c7b" loext:opacity="100%" style:text-outline="false" style:text-line-through-style="none" style:text-line-through-type="none" style:text-position="0% 100%" style:font-name="Calibri" fo:font-size="15pt" fo:letter-spacing="normal" fo:language="en" fo:country="US" fo:font-style="italic" style:text-underline-style="none" fo:font-weight="normal" fo:background-color="transparent" style:font-name-asian="Calibri2" style:font-size-asian="15pt" style:font-style-asian="italic" style:font-weight-asian="normal" style:font-name-complex="Calibri" style:font-size-complex="15pt" style:font-style-complex="italic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ambria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fb8ad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f485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fo:color="#26343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b7a8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d9884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b8c7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6343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office:forms form:automatic-focus="false" form:apply-design-mode="false"/>
        <draw:custom-shape draw:name="Text 0" draw:style-name="gr1" draw:text-style-name="P2" draw:layer="layout" svg:width="29.717cm" svg:height="1.015cm" svg:x="2.032cm" svg:y="1.524cm">
          <text:p text:style-name="P1"><text:span text:style-name="T1">МИНИСТЕРСТВО ОБРАЗОВАНИЯ И НАУКИ РЕСПУБЛИКИ БАШКОРТОСТАН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2" draw:layer="layout" svg:width="29.717cm" svg:height="1.015cm" svg:x="2.032cm" svg:y="2.54cm">
          <text:p text:style-name="P1"><text:span text:style-name="T1">Уфимский колледж статистики, информатики и вычислительной техник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3" draw:text-style-name="P3" draw:layer="layout" svg:x1="13.843cm" svg:y1="6.604cm" svg:x2="19.939cm" svg:y2="6.605cm">
          <text:p/>
        </draw:line>
        <draw:custom-shape draw:name="Text 3" draw:style-name="gr4" draw:text-style-name="P2" draw:layer="layout" svg:width="28.701cm" svg:height="4.698cm" svg:x="2.54cm" svg:y="7.239cm">
          <text:p text:style-name="P1"><text:span text:style-name="T2">Разработка информационной системы</text:span></text:p>
          <text:p text:style-name="P1"><text:span text:style-name="T2">для учёта посещений в ветеринарной клиник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2" draw:layer="layout" svg:width="28.701cm" svg:height="1.015cm" svg:x="2.54cm" svg:y="12.3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5" draw:layer="layout" svg:width="28.701cm" svg:height="2.285cm" svg:x="2.54cm" svg:y="15.494cm">
          <text:p text:style-name="P4"><text:span text:style-name="T3">Студент: </text:span><text:span text:style-name="T4">группа 23П-4, Хабибуллин А.А.</text:span></text:p>
          <text:p text:style-name="P4"><text:span text:style-name="T3">Руководитель проекта: </text:span><text:span text:style-name="T4">Фатхулова О.В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7" draw:layer="layout" svg:width="2.539cm" svg:height="1.015cm" svg:x="30.226cm" svg:y="17.272cm">
          <text:p text:style-name="P6"><text:span text:style-name="T5">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2" draw:style-name="dp3" draw:master-page-name="DEFAULT">
        <office:forms form:automatic-focus="false" form:apply-design-mode="false"/>
        <draw:custom-shape draw:name="Text 0" draw:style-name="gr9" draw:text-style-name="P12" draw:layer="layout" svg:width="30.733cm" svg:height="2.285cm" svg:x="1.524cm" svg:y="1.397cm">
          <text:p text:style-name="P11"><text:span text:style-name="T7">Цель и задачи проект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3" draw:layer="layout" svg:width="30.733cm" svg:height="2.793cm" svg:x="1.524cm" svg:y="4.318cm">
          <text:p/>
          <draw:enhanced-geometry draw:mirror-horizontal="false" draw:mirror-vertical="false" svg:viewBox="0 0 0 0" draw:glue-points="?f8 0 0 ?f9 ?f8 ?f10 ?f11 ?f9" draw:text-areas="?f5 ?f5 ?f6 ?f7" draw:type="ooxml-roundRect" draw:modifiers="72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2" draw:style-name="gr11" draw:text-style-name="P12" draw:layer="layout" svg:width="28.955cm" svg:height="2.158cm" svg:x="2.413cm" svg:y="4.699cm">
          <text:p text:style-name="P11"><text:span text:style-name="T8">Цель: разработка информационной системы, автоматизирующей учёт посещений, запись на приём и ведение медицинских карт питомцев в ветеринарной клинике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" draw:text-style-name="P12" draw:layer="layout" svg:width="10.159cm" svg:height="1.015cm" svg:x="1.524cm" svg:y="7.62cm">
          <text:p text:style-name="P11"><text:span text:style-name="T9">Задачи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15" draw:layer="layout" svg:width="30.733cm" svg:height="8.635cm" svg:x="1.524cm" svg:y="8.763cm">
          <text:list text:style-name="L6">
            <text:list-item>
              <text:p text:style-name="P14"><text:span text:style-name="T10">Спроектировать структуру базы данных</text:span></text:p>
            </text:list-item>
            <text:list-item>
              <text:p text:style-name="P14"><text:span text:style-name="T10">Разработать архитектуру серверного приложения (Go, Gin, GORM)</text:span></text:p>
            </text:list-item>
            <text:list-item>
              <text:p text:style-name="P14"><text:span text:style-name="T10">Реализовать авторизацию с разделением ролей «клиент» / «врач»</text:span></text:p>
            </text:list-item>
            <text:list-item>
              <text:p text:style-name="P14"><text:span text:style-name="T10">Реализовать запись на приём и завершение визита с указанием диагнозов</text:span></text:p>
            </text:list-item>
            <text:list-item>
              <text:p text:style-name="P14"><text:span text:style-name="T10">Реализовать клиентское веб-приложение (Vue 3)</text:span></text:p>
            </text:list-item>
            <text:list-item>
              <text:p text:style-name="P14"><text:span text:style-name="T10">Провести тестирование разработанной системы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7" draw:layer="layout" svg:width="1.269cm" svg:height="0.888cm" svg:x="32.004cm" svg:y="17.653cm">
          <text:p text:style-name="P6"><text:span text:style-name="T11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3" draw:style-name="dp3" draw:master-page-name="DEFAULT">
        <office:forms form:automatic-focus="false" form:apply-design-mode="false"/>
        <draw:custom-shape draw:name="Text 0" draw:style-name="gr15" draw:text-style-name="P12" draw:layer="layout" svg:width="30.733cm" svg:height="0.888cm" svg:x="1.524cm" svg:y="1.143cm">
          <text:p text:style-name="P11"><text:span text:style-name="T12">АНАЛИЗ ПРЕДМЕТНОЙ ОБЛАСТ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" draw:text-style-name="P12" draw:layer="layout" svg:width="30.733cm" svg:height="2.285cm" svg:x="1.524cm" svg:y="1.981cm">
          <text:p text:style-name="P11"><text:span text:style-name="T7">Диаграмма прецеденто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7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" draw:text-style-name="P7" draw:layer="layout" svg:width="1.269cm" svg:height="0.888cm" svg:x="32.004cm" svg:y="17.653cm">
          <text:p text:style-name="P6"><text:span text:style-name="T11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20.637cm" svg:height="12.151cm" svg:x="6.363cm" svg:y="4.5cm">
          <draw:image xlink:href="Pictures/10000001000002EA000001C402B83BCB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4" draw:style-name="dp3" draw:master-page-name="DEFAULT">
        <office:forms form:automatic-focus="false" form:apply-design-mode="false"/>
        <draw:custom-shape draw:name="Text 0" draw:style-name="gr20" draw:text-style-name="P12" draw:layer="layout" svg:width="30.733cm" svg:height="2.285cm" svg:x="1.524cm" svg:y="1.397cm">
          <text:p text:style-name="P11"><text:span text:style-name="T7">Входная информ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7" draw:layer="layout" svg:width="6.921cm" svg:height="8.127cm" svg:x="1.524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2" draw:style-name="gr22" draw:text-style-name="P12" draw:layer="layout" svg:width="5.651cm" svg:height="1.269cm" svg:x="2.159cm" svg:y="5.334cm">
          <text:p text:style-name="P11"><text:span text:style-name="T9">Регистр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" draw:text-style-name="P12" draw:layer="layout" svg:width="5.651cm" svg:height="5.714cm" svg:x="2.159cm" svg:y="6.655cm">
          <text:p text:style-name="P11"><text:span text:style-name="T13">ФИО, email, телефон, парол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7" draw:layer="layout" svg:width="6.921cm" svg:height="8.127cm" svg:x="9.462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5" draw:style-name="gr24" draw:text-style-name="P12" draw:layer="layout" svg:width="5.651cm" svg:height="1.269cm" svg:x="10.097cm" svg:y="5.334cm">
          <text:p text:style-name="P11"><text:span text:style-name="T9">Питомец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5" draw:text-style-name="P12" draw:layer="layout" svg:width="5.651cm" svg:height="5.714cm" svg:x="10.097cm" svg:y="6.655cm">
          <text:p text:style-name="P11"><text:span text:style-name="T13">Имя, вид, порода, дата рождения, вес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7" draw:layer="layout" svg:width="6.921cm" svg:height="8.127cm" svg:x="17.399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8" draw:style-name="gr26" draw:text-style-name="P12" draw:layer="layout" svg:width="5.651cm" svg:height="1.269cm" svg:x="18.034cm" svg:y="5.334cm">
          <text:p text:style-name="P11"><text:span text:style-name="T9">Запись на приём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7" draw:text-style-name="P12" draw:layer="layout" svg:width="5.651cm" svg:height="5.714cm" svg:x="18.034cm" svg:y="6.655cm">
          <text:p text:style-name="P11"><text:span text:style-name="T13">Питомец, врач, услуга, дата и врем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" draw:text-style-name="P17" draw:layer="layout" svg:width="6.921cm" svg:height="8.127cm" svg:x="25.337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1" draw:style-name="gr28" draw:text-style-name="P12" draw:layer="layout" svg:width="5.651cm" svg:height="1.269cm" svg:x="25.972cm" svg:y="5.334cm">
          <text:p text:style-name="P11"><text:span text:style-name="T9">Завершение приё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9" draw:text-style-name="P12" draw:layer="layout" svg:width="5.651cm" svg:height="5.714cm" svg:x="25.972cm" svg:y="6.655cm">
          <text:p text:style-name="P11"><text:span text:style-name="T13">Вес, диагнозы, лечение, медикаменты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0" draw:text-style-name="P7" draw:layer="layout" svg:width="1.269cm" svg:height="0.888cm" svg:x="32.004cm" svg:y="17.653cm">
          <text:p text:style-name="P6"><text:span text:style-name="T11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5" draw:style-name="dp3" draw:master-page-name="DEFAULT">
        <office:forms form:automatic-focus="false" form:apply-design-mode="false"/>
        <draw:custom-shape draw:name="Text 0" draw:style-name="gr31" draw:text-style-name="P12" draw:layer="layout" svg:width="30.733cm" svg:height="2.285cm" svg:x="1.524cm" svg:y="1.397cm">
          <text:p text:style-name="P11"><text:span text:style-name="T7">Выходная информ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15" draw:layer="layout" svg:width="11.683cm" svg:height="10.159cm" svg:x="1.524cm" svg:y="4.572cm">
          <text:list text:style-name="L6">
            <text:list-item>
              <text:p text:style-name="P14"><text:span text:style-name="T10">Медицинское заключение по приёму (PDF)</text:span></text:p>
            </text:list-item>
            <text:list-item>
              <text:p text:style-name="P14"><text:span text:style-name="T10">История посещений клиента с диагнозами</text:span></text:p>
            </text:list-item>
            <text:list-item>
              <text:p text:style-name="P14"><text:span text:style-name="T10">График динамики веса питомца</text:span></text:p>
            </text:list-item>
            <text:list-item>
              <text:p text:style-name="P14"><text:span text:style-name="T10">Расписание приёма врача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3" draw:text-style-name="P2" draw:layer="layout" svg:width="16.509cm" svg:height="10.667cm" svg:x="14.986cm" svg:y="5.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" draw:text-style-name="P7" draw:layer="layout" svg:width="1.269cm" svg:height="0.888cm" svg:x="32.004cm" svg:y="17.653cm">
          <text:p text:style-name="P6"><text:span text:style-name="T11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8" draw:layer="layout" svg:width="14.5cm" svg:height="16.047cm" svg:x="17cm" svg:y="1.453cm">
          <draw:image xlink:href="Pictures/10000001000002F70000034803A1638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6" draw:style-name="dp3" draw:master-page-name="DEFAULT">
        <office:forms form:automatic-focus="false" form:apply-design-mode="false"/>
        <draw:custom-shape draw:name="Text 0" draw:style-name="gr36" draw:text-style-name="P12" draw:layer="layout" svg:width="30.733cm" svg:height="0.888cm" svg:x="1.524cm" svg:y="1.143cm">
          <text:p text:style-name="P11"><text:span text:style-name="T12">MYSQL 8.0 / GOR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7" draw:text-style-name="P12" draw:layer="layout" svg:width="30.733cm" svg:height="2.285cm" svg:x="1.524cm" svg:y="1.981cm">
          <text:p text:style-name="P11"><text:span text:style-name="T7">Структура базы данны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" draw:text-style-name="P7" draw:layer="layout" svg:width="1.269cm" svg:height="0.888cm" svg:x="32.004cm" svg:y="17.653cm">
          <text:p text:style-name="P6"><text:span text:style-name="T11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33.866cm" svg:height="15.199cm" svg:x="0.001cm" svg:y="3.851cm">
          <draw:image xlink:href="Pictures/1000000000000D1C0000067268621A4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7" draw:style-name="dp3" draw:master-page-name="DEFAULT">
        <office:forms form:automatic-focus="false" form:apply-design-mode="false"/>
        <draw:custom-shape draw:name="Text 0" draw:style-name="gr40" draw:text-style-name="P12" draw:layer="layout" svg:width="30.733cm" svg:height="2.285cm" svg:x="1.524cm" svg:y="1.397cm">
          <text:p text:style-name="P11"><text:span text:style-name="T7">Требования к программному продукту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7" draw:layer="layout" svg:width="9.566cm" svg:height="9.143cm" svg:x="1.524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2" draw:style-name="gr41" draw:text-style-name="P12" draw:layer="layout" svg:width="8.296cm" svg:height="1.269cm" svg:x="2.159cm" svg:y="5.334cm">
          <text:p text:style-name="P11"><text:span text:style-name="T9">Безопасност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2" draw:text-style-name="P12" draw:layer="layout" svg:width="8.296cm" svg:height="6.73cm" svg:x="2.159cm" svg:y="6.655cm">
          <text:p text:style-name="P11"><text:span text:style-name="T13">Авторизация по JWT-токенам, разграничение ролей, хранение паролей в хешированном вид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7" draw:layer="layout" svg:width="9.566cm" svg:height="9.143cm" svg:x="12.107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5" draw:style-name="gr43" draw:text-style-name="P12" draw:layer="layout" svg:width="8.296cm" svg:height="1.269cm" svg:x="12.742cm" svg:y="5.334cm">
          <text:p text:style-name="P11"><text:span text:style-name="T9">Надёжност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12" draw:layer="layout" svg:width="8.296cm" svg:height="6.73cm" svg:x="12.742cm" svg:y="6.655cm">
          <text:p text:style-name="P11"><text:span text:style-name="T13">Корректная обработка некорректных действий пользовател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7" draw:layer="layout" svg:width="9.566cm" svg:height="9.143cm" svg:x="22.691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8" draw:style-name="gr45" draw:text-style-name="P12" draw:layer="layout" svg:width="8.296cm" svg:height="1.269cm" svg:x="23.326cm" svg:y="5.334cm">
          <text:p text:style-name="P11"><text:span text:style-name="T9">Доступност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6" draw:text-style-name="P12" draw:layer="layout" svg:width="8.296cm" svg:height="6.73cm" svg:x="23.326cm" svg:y="6.655cm">
          <text:p text:style-name="P11"><text:span text:style-name="T13">Работа через браузер без установки ПО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7" draw:text-style-name="P7" draw:layer="layout" svg:width="1.269cm" svg:height="0.888cm" svg:x="32.004cm" svg:y="17.653cm">
          <text:p text:style-name="P6"><text:span text:style-name="T11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8" draw:style-name="dp3" draw:master-page-name="DEFAULT">
        <office:forms form:automatic-focus="false" form:apply-design-mode="false"/>
        <draw:custom-shape draw:name="Text 0" draw:style-name="gr48" draw:text-style-name="P12" draw:layer="layout" svg:width="30.733cm" svg:height="2.285cm" svg:x="1.524cm" svg:y="1.397cm">
          <text:p text:style-name="P11"><text:span text:style-name="T7">Диаграмма развёртыван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9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0" draw:text-style-name="P7" draw:layer="layout" svg:width="1.269cm" svg:height="0.888cm" svg:x="32.004cm" svg:y="17.653cm">
          <text:p text:style-name="P6"><text:span text:style-name="T11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17.847cm" svg:height="12.516cm" svg:x="7.5cm" svg:y="3.984cm">
          <draw:image xlink:href="Pictures/10000001000001D80000014B73A4AF7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9" draw:style-name="dp3" draw:master-page-name="DEFAULT">
        <office:forms form:automatic-focus="false" form:apply-design-mode="false"/>
        <draw:custom-shape draw:name="Text 0" draw:style-name="gr51" draw:text-style-name="P12" draw:layer="layout" svg:width="30.733cm" svg:height="0.888cm" svg:x="1.524cm" svg:y="1.143cm">
          <text:p text:style-name="P11"><text:span text:style-name="T12">СЦЕНАРИЙ АВТОРИЗАЦИ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" draw:text-style-name="P12" draw:layer="layout" svg:width="30.733cm" svg:height="2.285cm" svg:x="1.524cm" svg:y="1.981cm">
          <text:p text:style-name="P11"><text:span text:style-name="T7">Диаграмма последовательност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3" draw:text-style-name="P7" draw:layer="layout" svg:width="1.269cm" svg:height="0.888cm" svg:x="32.004cm" svg:y="17.653cm">
          <text:p text:style-name="P6"><text:span text:style-name="T11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16.827cm" svg:height="14.207cm" svg:x="8.173cm" svg:y="3.793cm">
          <draw:image xlink:href="Pictures/100000010000027C00000219C624293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0" draw:style-name="dp3" draw:master-page-name="DEFAULT">
        <office:forms form:automatic-focus="false" form:apply-design-mode="false"/>
        <draw:frame draw:style-name="gr39" draw:text-style-name="P18" draw:layer="layout" svg:width="25.5cm" svg:height="17.008cm" draw:transform="skewX (0.0020943951023932) rotate (0.0020943951023932) translate (5.5cm 0.992cm)">
          <draw:image xlink:href="Pictures/10000001000003AE000002F0BA6CD7BF.png" xlink:type="simple" xlink:show="embed" xlink:actuate="onLoad" draw:mime-type="image/png">
            <text:p/>
          </draw:image>
        </draw:frame>
        <draw:custom-shape draw:name="Text 0" draw:style-name="gr54" draw:text-style-name="P12" draw:layer="layout" svg:width="30.733cm" svg:height="0.888cm" svg:x="1.524cm" svg:y="1.143cm">
          <text:p text:style-name="P11"><text:span text:style-name="T12">СЕРВЕРНОЕ ПРИЛОЖЕНИЕ (GO API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5" draw:text-style-name="P12" draw:layer="layout" svg:width="12.257cm" svg:height="1.285cm" svg:x="20.743cm" svg:y="1.215cm">
          <text:p text:style-name="P11"><text:span text:style-name="T7">Модульная схе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6" draw:text-style-name="P7" draw:layer="layout" svg:width="1.269cm" svg:height="0.888cm" svg:x="32.004cm" svg:y="17.653cm">
          <text:p text:style-name="P6"><text:span text:style-name="T11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1" draw:style-name="dp3" draw:master-page-name="DEFAULT">
        <office:forms form:automatic-focus="false" form:apply-design-mode="false"/>
        <draw:frame draw:style-name="gr39" draw:text-style-name="P18" draw:layer="layout" svg:width="29cm" svg:height="18.219cm" svg:x="0.5cm" svg:y="0.5cm">
          <draw:image xlink:href="Pictures/100000010000049D000002E67C232B77.png" xlink:type="simple" xlink:show="embed" xlink:actuate="onLoad" draw:mime-type="image/png">
            <text:p/>
          </draw:image>
        </draw:frame>
        <draw:custom-shape draw:name="Text 0" draw:style-name="gr57" draw:text-style-name="P12" draw:layer="layout" svg:width="30.733cm" svg:height="0.888cm" svg:x="1.524cm" svg:y="1.143cm">
          <text:p text:style-name="P11"><text:span text:style-name="T12">КЛИЕНТСКОЕ ВЕБ-ПРИЛОЖЕНИЕ (VUE 3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12" draw:layer="layout" svg:width="30.733cm" svg:height="2.285cm" svg:x="1.524cm" svg:y="1.981cm">
          <text:p text:style-name="P11"><text:span text:style-name="T7">Модульная схе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9" draw:text-style-name="P7" draw:layer="layout" svg:width="1.269cm" svg:height="0.888cm" svg:x="32.004cm" svg:y="17.653cm">
          <text:p text:style-name="P6"><text:span text:style-name="T11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3" draw:style-name="dp3" draw:master-page-name="DEFAULT">
        <office:forms form:automatic-focus="false" form:apply-design-mode="false"/>
        <draw:custom-shape draw:name="Text 0" draw:style-name="gr60" draw:text-style-name="P12" draw:layer="layout" svg:width="30.733cm" svg:height="2.285cm" svg:x="1.524cm" svg:y="1.397cm">
          <text:p text:style-name="P11"><text:span text:style-name="T7">Вход / Регистр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1" draw:text-style-name="P7" draw:layer="layout" svg:width="1.269cm" svg:height="0.888cm" svg:x="32.004cm" svg:y="17.653cm">
          <text:p text:style-name="P6"><text:span text:style-name="T11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9.79cm" svg:height="14.032cm" svg:x="2cm" svg:y="3.682cm">
          <draw:image xlink:href="Pictures/10000001000001F5000002CEF8586E4B.png" xlink:type="simple" xlink:show="embed" xlink:actuate="onLoad" draw:mime-type="image/png">
            <text:p/>
          </draw:image>
        </draw:frame>
        <draw:frame draw:style-name="gr39" draw:text-style-name="P18" draw:layer="layout" svg:width="13.332cm" svg:height="15cm" svg:x="15.5cm" svg:y="3cm">
          <draw:image xlink:href="Pictures/10000001000001E80000022589F0B03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4" draw:style-name="dp3" draw:master-page-name="DEFAULT">
        <office:forms form:automatic-focus="false" form:apply-design-mode="false"/>
        <draw:custom-shape draw:name="Text 0" draw:style-name="gr62" draw:text-style-name="P12" draw:layer="layout" svg:width="30.733cm" svg:height="0.888cm" svg:x="1.524cm" svg:y="1.143cm">
          <text:p text:style-name="P11"><text:span text:style-name="T12">ЛИЧНЫЙ КАБИНЕТ КЛИЕНТ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12" draw:layer="layout" svg:width="30.733cm" svg:height="2.285cm" svg:x="1.524cm" svg:y="1.981cm">
          <text:p text:style-name="P11"><text:span text:style-name="T7">Запись на приём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4" draw:text-style-name="P7" draw:layer="layout" svg:width="1.269cm" svg:height="0.888cm" svg:x="32.004cm" svg:y="17.653cm">
          <text:p text:style-name="P6"><text:span text:style-name="T11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33.866cm" svg:height="13.574cm" svg:x="-0.035cm" svg:y="4cm">
          <draw:image xlink:href="Pictures/100000010000073B000002E66D47D67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5" draw:style-name="dp3" draw:master-page-name="DEFAULT">
        <office:forms form:automatic-focus="false" form:apply-design-mode="false"/>
        <draw:custom-shape draw:name="Text 0" draw:style-name="gr65" draw:text-style-name="P12" draw:layer="layout" svg:width="30.733cm" svg:height="0.888cm" svg:x="1.524cm" svg:y="1.143cm">
          <text:p text:style-name="P11"><text:span text:style-name="T12">РАБОЧЕЕ МЕСТО ВРАЧ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6" draw:text-style-name="P12" draw:layer="layout" svg:width="30.733cm" svg:height="2.285cm" svg:x="1.524cm" svg:y="1.981cm">
          <text:p text:style-name="P11"><text:span text:style-name="T7">Завершение приё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7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8" draw:text-style-name="P7" draw:layer="layout" svg:width="1.269cm" svg:height="0.888cm" svg:x="32.004cm" svg:y="17.653cm">
          <text:p text:style-name="P6"><text:span text:style-name="T11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17.388cm" svg:height="15.5cm" svg:x="13.612cm" svg:y="1.5cm">
          <draw:image xlink:href="Pictures/10000001000002D700000288334075BD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6" draw:style-name="dp3" draw:master-page-name="DEFAULT">
        <office:forms form:automatic-focus="false" form:apply-design-mode="false"/>
        <draw:custom-shape draw:name="Text 0" draw:style-name="gr69" draw:text-style-name="P12" draw:layer="layout" svg:width="30.733cm" svg:height="0.888cm" svg:x="1.524cm" svg:y="1.143cm">
          <text:p text:style-name="P11"><text:span text:style-name="T12">МЕДИЦИНСКОЕ ЗАКЛЮЧЕНИ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0" draw:text-style-name="P12" draw:layer="layout" svg:width="30.733cm" svg:height="2.285cm" svg:x="1.524cm" svg:y="1.981cm">
          <text:p text:style-name="P11"><text:span text:style-name="T7">История посещений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1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2" draw:text-style-name="P7" draw:layer="layout" svg:width="1.269cm" svg:height="0.888cm" svg:x="32.004cm" svg:y="17.653cm">
          <text:p text:style-name="P6"><text:span text:style-name="T11">1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27.945cm" svg:height="13.557cm" svg:x="2.055cm" svg:y="4.596cm">
          <draw:image xlink:href="Pictures/100000010000026000000127F847865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7" draw:style-name="dp3" draw:master-page-name="DEFAULT">
        <office:forms form:automatic-focus="false" form:apply-design-mode="false"/>
        <draw:custom-shape draw:name="Text 0" draw:style-name="gr73" draw:text-style-name="P12" draw:layer="layout" svg:width="30.733cm" svg:height="0.888cm" svg:x="1.524cm" svg:y="1.143cm">
          <text:p text:style-name="P11"><text:span text:style-name="T12">РАБОЧЕЕ МЕСТО ВРАЧ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4" draw:text-style-name="P12" draw:layer="layout" svg:width="30.733cm" svg:height="2.285cm" svg:x="1.524cm" svg:y="1.981cm">
          <text:p text:style-name="P11"><text:span text:style-name="T7">Картотека пациенто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5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6" draw:text-style-name="P7" draw:layer="layout" svg:width="1.269cm" svg:height="0.888cm" svg:x="32.004cm" svg:y="17.653cm">
          <text:p text:style-name="P6"><text:span text:style-name="T11">1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33.866cm" svg:height="14.914cm" svg:x="0cm" svg:y="4cm">
          <draw:image xlink:href="Pictures/10000001000007360000032D6035CDF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8" draw:style-name="dp3" draw:master-page-name="DEFAULT">
        <office:forms form:automatic-focus="false" form:apply-design-mode="false"/>
        <draw:custom-shape draw:name="Text 0" draw:style-name="gr77" draw:text-style-name="P12" draw:layer="layout" svg:width="30.733cm" svg:height="2.285cm" svg:x="1.524cm" svg:y="1.397cm">
          <text:p text:style-name="P11"><text:span text:style-name="T7">Результаты тестирован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3" draw:layer="layout" svg:width="6.603cm" svg:height="6.603cm" svg:x="2.032cm" svg:y="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78" draw:text-style-name="P2" draw:layer="layout" svg:width="6.603cm" svg:height="2.793cm" svg:x="2.032cm" svg:y="5.969cm">
          <text:p text:style-name="P1"><text:span text:style-name="T14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9" draw:text-style-name="P2" draw:layer="layout" svg:width="6.603cm" svg:height="2.285cm" svg:x="2.032cm" svg:y="8.763cm">
          <text:p text:style-name="P1"><text:span text:style-name="T15">тестовых</text:span></text:p>
          <text:p text:style-name="P1"><text:span text:style-name="T15">сценарие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0" draw:text-style-name="P15" draw:layer="layout" svg:width="22.097cm" svg:height="11.429cm" svg:x="10.16cm" svg:y="5.08cm">
          <text:list text:style-name="L6">
            <text:list-item>
              <text:p text:style-name="P14"><text:span text:style-name="T16">Регистрация и авторизация (корректные и некорректные данные)</text:span></text:p>
            </text:list-item>
            <text:list-item>
              <text:p text:style-name="P14"><text:span text:style-name="T16">Запись на приём и блокировка занятого времени</text:span></text:p>
            </text:list-item>
            <text:list-item>
              <text:p text:style-name="P14"><text:span text:style-name="T16">Подтверждение / отклонение записи врачом</text:span></text:p>
            </text:list-item>
            <text:list-item>
              <text:p text:style-name="P14"><text:span text:style-name="T16">Завершение приёма с обязательным указанием диагноза</text:span></text:p>
            </text:list-item>
            <text:list-item>
              <text:p text:style-name="P14"><text:span text:style-name="T16">Просмотр истории посещений клиентом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1" draw:text-style-name="P2" draw:layer="layout" svg:width="30.733cm" svg:height="1.269cm" svg:x="1.524cm" svg:y="16.256cm">
          <text:p text:style-name="P1"><text:span text:style-name="T17">Ошибок в работе программного продукта не выявлено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2" draw:text-style-name="P7" draw:layer="layout" svg:width="1.269cm" svg:height="0.888cm" svg:x="32.004cm" svg:y="17.653cm">
          <text:p text:style-name="P6"><text:span text:style-name="T11">1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9" draw:style-name="dp3" draw:master-page-name="DEFAULT">
        <office:forms form:automatic-focus="false" form:apply-design-mode="false"/>
        <draw:custom-shape draw:name="Text 0" draw:style-name="gr83" draw:text-style-name="P12" draw:layer="layout" svg:width="30.733cm" svg:height="2.285cm" svg:x="1.524cm" svg:y="1.397cm">
          <text:p text:style-name="P11"><text:span text:style-name="T7">Заключени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3" draw:layer="layout" svg:width="1.142cm" svg:height="1.142cm" svg:x="1.524cm" svg:y="4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84" draw:text-style-name="P2" draw:layer="layout" svg:width="1.142cm" svg:height="1.142cm" svg:x="1.524cm" svg:y="4.826cm">
          <text:p text:style-name="P1"><text:span text:style-name="T4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5" draw:text-style-name="P12" draw:layer="layout" svg:width="28.701cm" svg:height="1.396cm" svg:x="3.175cm" svg:y="4.699cm">
          <text:p text:style-name="P11"><text:span text:style-name="T16">Спроектирована структура базы данны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6" draw:text-style-name="P19" draw:layer="layout" svg:width="1.142cm" svg:height="1.142cm" svg:x="1.524cm" svg:y="6.98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87" draw:text-style-name="P2" draw:layer="layout" svg:width="1.142cm" svg:height="1.142cm" svg:x="1.524cm" svg:y="6.985cm">
          <text:p text:style-name="P1"><text:span text:style-name="T4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8" draw:text-style-name="P12" draw:layer="layout" svg:width="28.701cm" svg:height="1.396cm" svg:x="3.175cm" svg:y="6.858cm">
          <text:p text:style-name="P11"><text:span text:style-name="T16">Разработана архитектура серверного приложения на 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" draw:text-style-name="P13" draw:layer="layout" svg:width="1.142cm" svg:height="1.142cm" svg:x="1.524cm" svg:y="9.14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9" draw:text-style-name="P2" draw:layer="layout" svg:width="1.142cm" svg:height="1.142cm" svg:x="1.524cm" svg:y="9.144cm">
          <text:p text:style-name="P1"><text:span text:style-name="T4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0" draw:text-style-name="P12" draw:layer="layout" svg:width="28.701cm" svg:height="1.396cm" svg:x="3.175cm" svg:y="9.017cm">
          <text:p text:style-name="P11"><text:span text:style-name="T16">Реализованы запись на приём, диагностика, медицинские протоколы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6" draw:text-style-name="P19" draw:layer="layout" svg:width="1.142cm" svg:height="1.142cm" svg:x="1.524cm" svg:y="11.30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91" draw:text-style-name="P2" draw:layer="layout" svg:width="1.142cm" svg:height="1.142cm" svg:x="1.524cm" svg:y="11.303cm">
          <text:p text:style-name="P1"><text:span text:style-name="T4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2" draw:text-style-name="P12" draw:layer="layout" svg:width="28.701cm" svg:height="1.396cm" svg:x="3.175cm" svg:y="11.176cm">
          <text:p text:style-name="P11"><text:span text:style-name="T16">Разработано клиентское веб-приложение на Vue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" draw:text-style-name="P13" draw:layer="layout" svg:width="1.142cm" svg:height="1.142cm" svg:x="1.524cm" svg:y="13.4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93" draw:text-style-name="P2" draw:layer="layout" svg:width="1.142cm" svg:height="1.142cm" svg:x="1.524cm" svg:y="13.462cm">
          <text:p text:style-name="P1"><text:span text:style-name="T4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4" draw:text-style-name="P12" draw:layer="layout" svg:width="28.701cm" svg:height="1.396cm" svg:x="3.175cm" svg:y="13.335cm">
          <text:p text:style-name="P11"><text:span text:style-name="T16">Проведено тестирование, подтвердившее работоспособность системы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5" draw:text-style-name="P7" draw:layer="layout" svg:width="1.269cm" svg:height="0.888cm" svg:x="32.004cm" svg:y="17.653cm">
          <text:p text:style-name="P6"><text:span text:style-name="T11">1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20" draw:style-name="dp1" draw:master-page-name="DEFAULT">
        <office:forms form:automatic-focus="false" form:apply-design-mode="false"/>
        <draw:custom-shape draw:name="Text 0" draw:style-name="gr96" draw:text-style-name="P2" draw:layer="layout" svg:width="29.717cm" svg:height="2.539cm" svg:x="2.032cm" svg:y="7.874cm">
          <text:p text:style-name="P1"><text:span text:style-name="T18">Спасибо за внимание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3" draw:text-style-name="P3" draw:layer="layout" svg:x1="14.351cm" svg:y1="10.541cm" svg:x2="19.431cm" svg:y2="10.542cm">
          <text:p/>
        </draw:lin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Разработка ИС для учёта посещений в ветеринарной клинике</dc:title>
    <dc:subject>PptxGenJS Presentation</dc:subject>
    <meta:initial-creator>Хабибуллин А.А.</meta:initial-creator>
    <meta:editing-cycles>8</meta:editing-cycles>
    <meta:creation-date>2026-06-25T09:30:13</meta:creation-date>
    <dc:date>2026-06-25T15:06:01.203320808</dc:date>
    <meta:editing-duration>PT33M58S</meta:editing-duration>
    <meta:generator>LibreOffice/26.2.4.2$Linux_X86_64 LibreOffice_project/f4d82cf4d44730936b3f1a72d05a6253f577d3e9</meta:generator>
    <meta:print-date>2026-06-25T15:24:49.620055499</meta:print-date>
    <meta:printed-by>Файлы PDF</meta:printed-by>
    <meta:document-statistic meta:object-count="192"/>
    <meta:user-defined meta:name="AppVersion">16.0000</meta:user-defined>
    <meta:user-defined meta:name="Company">PptxGenJS</meta:user-defined>
    <meta:user-defined meta:name="Notes" meta:value-type="float">20</meta:user-defined>
    <meta:user-defined meta:name="PresentationFormat">On-screen Show (16:9)</meta:user-defined>
    <meta:user-defined meta:name="Slides" meta:value-type="float">20</meta:user-defined>
  </office:meta>
</office:document-meta>
</file>