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 style:list-style-name="">
      <style:paragraph-properties fo:line-height="150%" fo:text-align="center" style:justify-single-word="false" fo:hyphenation-ladder-count="no-limit" fo:hyphenation-keep="auto" loext:hyphenation-keep-type="column" loext:hyphenation-keep-line="false"/>
      <style:text-properties style:font-name="Times New Roman" fo:font-size="14pt" style:font-name-asian="Times New Roman1" style:font-size-asian="14pt" style:language-asian="ar" style:country-asian="SA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Heading_20_4">
      <style:paragraph-properties fo:margin-top="0cm" fo:margin-bottom="0.499cm" style:contextual-spacing="false" fo:line-height="150%" fo:text-align="center" style:justify-single-word="false"/>
      <style:text-properties style:font-name="Times New Roman" fo:font-size="14pt" style:font-name-asian="Times New Roman1" style:font-size-asian="14pt" style:language-asian="ar" style:country-asian="SA" style:font-name-complex="Times New Roman1" style:font-size-complex="14pt"/>
    </style:style>
    <style:style style:name="P3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4" style:family="paragraph" style:parent-style-name="Text_20_body">
      <style:paragraph-properties fo:margin-top="0cm" fo:margin-bottom="0.499cm" style:contextual-spacing="false" fo:line-height="150%" fo:text-align="center" style:justify-single-word="false"/>
      <style:text-properties style:language-asian="ar" style:country-asian="SA" style:font-size-complex="10pt"/>
    </style:style>
    <style:style style:name="P5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style:language-asian="ar" style:country-asian="SA" style:font-size-complex="10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b7574" officeooo:paragraph-rsid="001b7574" style:font-size-asian="14pt" style:language-asian="ar" style:country-asian="SA" style:font-size-complex="14pt"/>
    </style:style>
    <style:style style:name="P7" style:family="paragraph" style:parent-style-name="Text_20_body">
      <style:paragraph-properties fo:line-height="150%" fo:text-align="justify" style:justify-single-word="false"/>
      <style:text-properties officeooo:paragraph-rsid="001b7574" style:language-asian="ar" style:country-asian="SA" style:font-size-complex="14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b7574" style:font-size-asian="14pt" style:language-asian="ar" style:country-asian="SA" style:font-size-complex="14pt"/>
    </style:style>
    <style:style style:name="P9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officeooo:paragraph-rsid="001b7574" style:language-asian="ar" style:country-asian="SA" style:font-size-complex="10pt"/>
    </style:style>
    <style:style style:name="P10" style:family="paragraph" style:parent-style-name="Text_20_body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11" style:family="paragraph" style:parent-style-name="Text_20_body">
      <style:text-properties style:font-name="Times New Roman" fo:font-size="14pt" style:font-size-asian="14pt" style:font-size-complex="14pt"/>
    </style:style>
    <style:style style:name="P12" style:family="paragraph" style:parent-style-name="Text_20_body">
      <style:paragraph-properties fo:margin-top="0cm" fo:margin-bottom="0.499cm" style:contextual-spacing="false"/>
      <style:text-properties style:font-name="Times New Roman" fo:font-size="14pt" officeooo:paragraph-rsid="001b7574" style:font-size-asian="14pt" style:font-size-complex="14pt"/>
    </style:style>
    <style:style style:name="P13" style:family="paragraph" style:parent-style-name="Text_20_body">
      <style:paragraph-properties fo:margin-top="0cm" fo:margin-bottom="0.499cm" style:contextual-spacing="false"/>
      <style:text-properties officeooo:paragraph-rsid="001b7574" style:font-size-complex="14pt"/>
    </style:style>
    <style:style style:name="P14" style:family="paragraph" style:parent-style-name="Text_20_body">
      <style:paragraph-properties fo:margin-top="0cm" fo:margin-bottom="0.499cm" style:contextual-spacing="false"/>
      <style:text-properties style:font-name="Times New Roman" fo:font-size="14pt" officeooo:paragraph-rsid="001b7574" style:font-size-asian="14pt" style:language-asian="ar" style:country-asian="SA" style:font-size-complex="14pt"/>
    </style:style>
    <style:style style:name="P15" style:family="paragraph" style:parent-style-name="Text_20_body">
      <style:paragraph-properties fo:margin-top="0cm" fo:margin-bottom="0.499cm" style:contextual-spacing="false"/>
      <style:text-properties officeooo:paragraph-rsid="001b7574" style:language-asian="ar" style:country-asian="SA" style:font-size-complex="14pt"/>
    </style:style>
    <style:style style:name="P16" style:family="paragraph" style:parent-style-name="Text_20_body">
      <style:paragraph-properties fo:margin-top="0cm" fo:margin-bottom="0.499cm" style:contextual-spacing="false"/>
      <style:text-properties officeooo:paragraph-rsid="001b7574"/>
    </style:style>
    <style:style style:name="P17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officeooo:paragraph-rsid="001b7574" style:font-size-asian="14pt" style:language-asian="ar" style:country-asian="SA" style:font-size-complex="14pt"/>
    </style:style>
    <style:style style:name="P18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officeooo:paragraph-rsid="001b7574" style:language-asian="ar" style:country-asian="SA" style:font-size-complex="14pt"/>
    </style:style>
    <style:style style:name="P19" style:family="paragraph" style:parent-style-name="Standard">
      <style:text-properties style:font-name="Times New Roman" fo:font-size="14pt" style:font-size-asian="14pt" style:font-size-complex="14pt"/>
    </style:style>
    <style:style style:name="P20" style:family="paragraph" style:parent-style-name="Text_20_body">
      <style:text-properties style:font-name="Times New Roman" fo:font-size="14pt" officeooo:paragraph-rsid="001b7574" style:font-size-asian="14pt" style:font-size-complex="14pt"/>
    </style:style>
    <style:style style:name="P21" style:family="paragraph" style:parent-style-name="Text_20_body">
      <style:text-properties officeooo:paragraph-rsid="001b7574"/>
    </style:style>
    <style:style style:name="P22" style:family="paragraph" style:parent-style-name="Text_20_body">
      <style:text-properties style:font-name="Times New Roman" fo:font-size="14pt" officeooo:paragraph-rsid="001b7574" style:font-size-asian="14pt" style:language-asian="ar" style:country-asian="SA" style:font-size-complex="14pt"/>
    </style:style>
    <style:style style:name="P23" style:family="paragraph" style:parent-style-name="Heading_20_1">
      <style:paragraph-properties fo:margin-top="0cm" fo:margin-bottom="0.499cm" style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Text_20_body">
      <style:paragraph-properties fo:margin-top="0cm" fo:margin-bottom="0.499cm" style:contextual-spacing="false"/>
    </style:style>
    <style:style style:name="P25" style:family="paragraph" style:parent-style-name="Text_20_body">
      <style:text-properties officeooo:paragraph-rsid="001d0c73"/>
    </style:style>
    <style:style style:name="P26" style:family="paragraph" style:parent-style-name="Text_20_body">
      <style:paragraph-properties fo:margin-top="0cm" fo:margin-bottom="0.499cm" style:contextual-spacing="false"/>
      <style:text-properties officeooo:paragraph-rsid="001d0c73"/>
    </style:style>
    <style:style style:name="P27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officeooo:paragraph-rsid="001d0c73" style:language-asian="ar" style:country-asian="SA" style:font-size-complex="10pt"/>
    </style:style>
    <style:style style:name="P28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officeooo:paragraph-rsid="001d0c73" style:font-size-asian="14pt" style:language-asian="ar" style:country-asian="SA" style:font-size-complex="14pt"/>
    </style:style>
    <style:style style:name="P29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officeooo:paragraph-rsid="001d0c73" style:language-asian="ar" style:country-asian="SA" style:font-size-complex="14pt"/>
    </style:style>
    <style:style style:name="P30" style:family="paragraph" style:parent-style-name="Text_20_body">
      <style:paragraph-properties fo:margin-top="0cm" fo:margin-bottom="0.499cm" style:contextual-spacing="false"/>
      <style:text-properties style:font-name="Times New Roman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style:font-name="Times New Roman" fo:font-size="14pt" style:font-size-asian="14pt" style:language-asian="ar" style:country-asian="SA"/>
    </style:style>
    <style:style style:name="T4" style:family="text">
      <style:text-properties style:font-name="Times New Roman" fo:font-size="14pt" style:font-size-asian="14pt" style:language-asian="ar" style:country-asian="SA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РИЛОЖЕНИЕ Б</text:h>
      <text:h text:style-name="P2" text:outline-level="4">Исходный код программного продукта</text:h>
      <text:p text:style-name="P3">Полный исходный код проекта содержит более 30 файлов и доступен в полном объёме на электронном носителе, приложенном к курсовому проекту. В настоящем приложении представлены ключевые листинги, демонстрирующие архитектуру и основной функционал системы, сгруппированные по модулям в соответствии со структурой проекта, представленной на рисунках 2.1.1 и 2.1.2.</text:p>
      <text:p text:style-name="P4"><text:span text:style-name="Strong_20_Emphasis"><text:span text:style-name="T1">Серверное приложение (Go API)</text:span></text:span></text:p>
      <text:p text:style-name="P5"><text:span text:style-name="Emphasis"><text:span text:style-name="T1">main.go</text:span></text:span></text:p>
      <text:p text:style-name="P3">package main</text:p>
      <text:p text:style-name="P3"/>
      <text:p text:style-name="P3">import (</text:p>
      <text:p text:style-name="P3"><text:tab/>"api/internal/handler"</text:p>
      <text:p text:style-name="P3"><text:tab/>"api/internal/middleware"</text:p>
      <text:p text:style-name="P3"><text:tab/>"api/internal/repository"</text:p>
      <text:p text:style-name="P3"><text:tab/>"api/internal/service"</text:p>
      <text:p text:style-name="P3"/>
      <text:p text:style-name="P3"><text:tab/>_ "api/docs"</text:p>
      <text:p text:style-name="P3"/>
      <text:p text:style-name="P3"><text:tab/>swaggerFiles "github.com/swaggo/files"</text:p>
      <text:p text:style-name="P3"><text:tab/>ginSwagger "github.com/swaggo/gin-swagger"</text:p>
      <text:p text:style-name="P3"/>
      <text:p text:style-name="P3"><text:soft-page-break/><text:tab/>database "api/utils"</text:p>
      <text:p text:style-name="P3"/>
      <text:p text:style-name="P3"><text:tab/>"github.com/gin-gonic/gin"</text:p>
      <text:p text:style-name="P3">)</text:p>
      <text:p text:style-name="P3"/>
      <text:p text:style-name="P3">// @title Veterinary Clinic API</text:p>
      <text:p text:style-name="P3">// @version 1.0</text:p>
      <text:p text:style-name="P3">// @description API server for Veterinary Clinic management system.</text:p>
      <text:p text:style-name="P3">// @host localhost:3000</text:p>
      <text:p text:style-name="P3">// @BasePath /api</text:p>
      <text:p text:style-name="P3">// @securityDefinitions.apikey ApiKeyAuth</text:p>
      <text:p text:style-name="P3">// @in header</text:p>
      <text:p text:style-name="P3">// @name Authorization</text:p>
      <text:p text:style-name="P3">func main() {</text:p>
      <text:p text:style-name="P3"><text:tab/>db := database.InitDB()</text:p>
      <text:p text:style-name="P3"/>
      <text:p text:style-name="P3"><text:tab/>userRepo := repository.NewUserRepository(db)</text:p>
      <text:p text:style-name="P3"><text:tab/>authSvc := service.NewAuthService(userRepo)</text:p>
      <text:p text:style-name="P3"><text:tab/>authHandler := handler.NewAuthHandler(authSvc)</text:p>
      <text:p text:style-name="P3"/>
      <text:p text:style-name="P3"><text:soft-page-break/><text:tab/>petRepo := repository.NewPetRepository(db)</text:p>
      <text:p text:style-name="P3"><text:tab/>petSvc := service.NewPetService(petRepo)</text:p>
      <text:p text:style-name="P3"><text:tab/>petHandler := handler.NewPetHandler(petSvc)</text:p>
      <text:p text:style-name="P3"/>
      <text:p text:style-name="P3"><text:tab/>dashRepo := repository.NewDashboardRepository(db)</text:p>
      <text:p text:style-name="P3"><text:tab/>dashSvc := service.NewDashboardService(dashRepo, petRepo)</text:p>
      <text:p text:style-name="P3"><text:tab/>dashHandler := handler.NewDashboardHandler(dashSvc)</text:p>
      <text:p text:style-name="P3"/>
      <text:p text:style-name="P3"><text:tab/>appRepo := repository.NewAppointmentRepository(db)</text:p>
      <text:p text:style-name="P3"><text:tab/>bookingSvc := service.NewBookingService(appRepo, petRepo)</text:p>
      <text:p text:style-name="P3"><text:tab/>bookingHandler := handler.NewBookingHandler(bookingSvc)</text:p>
      <text:p text:style-name="P3"/>
      <text:p text:style-name="P3"><text:tab/>shopRepo := repository.NewShopRepository(db)</text:p>
      <text:p text:style-name="P3"><text:tab/>shopSvc := service.NewShopService(shopRepo)</text:p>
      <text:p text:style-name="P3"><text:tab/>shopHandler := handler.NewShopHandler(shopSvc)</text:p>
      <text:p text:style-name="P3"/>
      <text:p text:style-name="P3"><text:tab/>statsRepo := repository.NewStatsRepository(db)</text:p>
      <text:p text:style-name="P3"><text:tab/>statsSvc := service.NewStatsService(statsRepo)</text:p>
      <text:p text:style-name="P3"><text:tab/>statsHandler := handler.NewStatsHandler(statsSvc, petSvc)</text:p>
      <text:p text:style-name="P3"/>
      <text:p text:style-name="P3"><text:soft-page-break/><text:tab/>docRepo := repository.NewDoctorRepository(db)</text:p>
      <text:p text:style-name="P3"><text:tab/>docSvc := service.NewDoctorService(docRepo)</text:p>
      <text:p text:style-name="P3"><text:tab/>docHandler := handler.NewDoctorHandler(docSvc)</text:p>
      <text:p text:style-name="P3"/>
      <text:p text:style-name="P3"><text:tab/>diagRepo := repository.NewDiagnosisRepository(db)</text:p>
      <text:p text:style-name="P3"><text:tab/>diagSvc := service.NewDiagnosisService(diagRepo)</text:p>
      <text:p text:style-name="P3"><text:tab/>diagHandler := handler.NewDiagnosisHandler(diagSvc)</text:p>
      <text:p text:style-name="P3"/>
      <text:p text:style-name="P3"><text:tab/>userSvc := service.NewUserService(userRepo)</text:p>
      <text:p text:style-name="P3"><text:tab/>userHandler := handler.NewUserHandler(userSvc)</text:p>
      <text:p text:style-name="P3"/>
      <text:p text:style-name="P3"><text:tab/>r := gin.Default()</text:p>
      <text:p text:style-name="P3"><text:tab/>r.GET("/swagger/*any", ginSwagger.WrapHandler(swaggerFiles.Handler))</text:p>
      <text:p text:style-name="P3"/>
      <text:p text:style-name="P3"><text:tab/>api := r.Group("/api")</text:p>
      <text:p text:style-name="P3"><text:tab/>{</text:p>
      <text:p text:style-name="P3"><text:tab/><text:tab/>api.POST("/auth/register", authHandler.Register)</text:p>
      <text:p text:style-name="P3"><text:tab/><text:tab/>api.POST("/auth/login", authHandler.Login)</text:p>
      <text:p text:style-name="P3"/>
      <text:p text:style-name="P3"><text:tab/><text:tab/>protected := api.Group("")</text:p>
      <text:p text:style-name="P3"><text:soft-page-break/><text:tab/><text:tab/>protected.Use(middleware.AuthMiddleware())</text:p>
      <text:p text:style-name="P3"><text:tab/><text:tab/>{</text:p>
      <text:p text:style-name="P3"><text:tab/><text:tab/><text:tab/>protected.GET("/users/:id", userHandler.GetProfile)</text:p>
      <text:p text:style-name="P3"><text:tab/><text:tab/><text:tab/>protected.PUT("/users/:id", userHandler.UpdateProfile)</text:p>
      <text:p text:style-name="P3"><text:tab/><text:tab/><text:tab/>protected.PUT("/users/:id/password", userHandler.ChangePassword)</text:p>
      <text:p text:style-name="P3"/>
      <text:p text:style-name="P3"><text:tab/><text:tab/><text:tab/>protected.GET("/pets/owner/:userId", petHandler.GetByOwner)</text:p>
      <text:p text:style-name="P3"><text:tab/><text:tab/><text:tab/>protected.POST("/pets", petHandler.Create)</text:p>
      <text:p text:style-name="P3"><text:tab/><text:tab/><text:tab/>protected.PUT("/pets/:petId", petHandler.Update)</text:p>
      <text:p text:style-name="P3"><text:tab/><text:tab/><text:tab/>protected.DELETE("/pets/:petId", petHandler.Delete)</text:p>
      <text:p text:style-name="P3"/>
      <text:p text:style-name="P3"><text:tab/><text:tab/><text:tab/>protected.GET("/dashboard/:userId", dashHandler.GetDashboard)</text:p>
      <text:p text:style-name="P3"/>
      <text:p text:style-name="P3"><text:tab/><text:tab/><text:tab/>protected.GET("/book/init/:userId", bookingHandler.GetInit)</text:p>
      <text:p text:style-name="P3"><text:tab/><text:tab/><text:tab/>protected.GET("/appointments/busy-slots", bookingHandler.GetBusySlots)</text:p>
      <text:p text:style-name="P3"><text:tab/><text:tab/><text:tab/>protected.POST("/appointments", bookingHandler.Create)</text:p>
      <text:p text:style-name="P3"><text:tab/><text:tab/><text:tab/>protected.GET("/appointments/client/:userId", bookingHandler.GetHistory)</text:p>
      <text:p text:style-name="P3"/>
      <text:p text:style-name="P3"><text:soft-page-break/><text:tab/><text:tab/><text:tab/>protected.GET("/doctor/schedule", docHandler.GetSchedule)</text:p>
      <text:p text:style-name="P3"><text:tab/><text:tab/><text:tab/>protected.PATCH("/appointments/:id/complete", docHandler.CompleteVisit)</text:p>
      <text:p text:style-name="P3"><text:tab/><text:tab/><text:tab/>protected.PATCH("/appointments/:id/status", docHandler.UpdateStatus)</text:p>
      <text:p text:style-name="P3"><text:tab/><text:tab/><text:tab/>protected.GET("/doctor/patients", docHandler.GetPatients)</text:p>
      <text:p text:style-name="P3"><text:tab/><text:tab/><text:tab/>protected.GET("/doctor/patients/:id/history", docHandler.GetHistory)</text:p>
      <text:p text:style-name="P3"><text:tab/><text:tab/><text:tab/>protected.GET("/diagnoses", diagHandler.GetAll)</text:p>
      <text:p text:style-name="P3"/>
      <text:p text:style-name="P3"><text:tab/><text:tab/><text:tab/>protected.GET("/medications", shopHandler.GetProducts)</text:p>
      <text:p text:style-name="P3"><text:tab/><text:tab/><text:tab/>protected.GET("/cart/:userId", shopHandler.GetCart)</text:p>
      <text:p text:style-name="P3"><text:tab/><text:tab/><text:tab/>protected.POST("/cart/:userId", shopHandler.AddToCart)</text:p>
      <text:p text:style-name="P3"><text:tab/><text:tab/><text:tab/>protected.PUT("/cart/:itemId", shopHandler.UpdateCart)</text:p>
      <text:p text:style-name="P3"><text:tab/><text:tab/><text:tab/>protected.DELETE("/cart/:itemId", shopHandler.DeleteCart)</text:p>
      <text:p text:style-name="P3"><text:tab/><text:tab/><text:tab/>protected.POST("/orders", shopHandler.Checkout)</text:p>
      <text:p text:style-name="P3"><text:tab/><text:tab/><text:tab/>protected.GET("/orders/:userId", shopHandler.GetOrders)</text:p>
      <text:p text:style-name="P3"/>
      <text:p text:style-name="P3"><text:tab/><text:tab/><text:tab/>protected.GET("/stats/pets/:userId", statsHandler.GetUserPets)</text:p>
      <text:p text:style-name="P3"><text:tab/><text:tab/><text:tab/>protected.GET("/stats/weight/:petId", statsHandler.GetWeightData)</text:p>
      <text:p text:style-name="P3"><text:tab/><text:tab/>}</text:p>
      <text:p text:style-name="P3"><text:soft-page-break/><text:tab/>}</text:p>
      <text:p text:style-name="P3"/>
      <text:p text:style-name="P3"><text:tab/>r.Run(":3000")</text:p>
      <text:p text:style-name="P3">}</text:p>
      <text:p text:style-name="P5"><text:span text:style-name="Emphasis"><text:span text:style-name="T1">internal/models</text:span></text:span></text:p>
      <text:p text:style-name="P6">user.go</text:p>
      <text:p text:style-name="P6">package models</text:p>
      <text:p text:style-name="P6"/>
      <text:p text:style-name="P6">import "gorm.io/gorm"</text:p>
      <text:p text:style-name="P6"/>
      <text:p text:style-name="P6">type UserRole string</text:p>
      <text:p text:style-name="P6"/>
      <text:p text:style-name="P6">const (</text:p>
      <text:p text:style-name="P6"><text:tab/>UserClient UserRole = "client"</text:p>
      <text:p text:style-name="P6"><text:tab/>UserDoctor UserRole = "doctor"</text:p>
      <text:p text:style-name="P6">)</text:p>
      <text:p text:style-name="P6"/>
      <text:p text:style-name="P6">type User struct {</text:p>
      <text:p text:style-name="P6"><text:tab/>gorm.Model</text:p>
      <text:p text:style-name="P6"><text:tab/>Email <text:s text:c="9"/>string <text:s text:c="2"/>`gorm:"type:varchar(191);uniqueIndex" json:"email"`</text:p>
      <text:p text:style-name="P6"><text:tab/>Password <text:s text:c="6"/>string <text:s text:c="2"/>`json:"-"`</text:p>
      <text:p text:style-name="P6"><text:tab/>FirstName <text:s text:c="5"/>string <text:s text:c="2"/>`json:"firstName"`</text:p>
      <text:p text:style-name="P6"><text:tab/>LastName <text:s text:c="6"/>string <text:s text:c="2"/>`json:"lastName"`</text:p>
      <text:p text:style-name="P6"><text:tab/>Phone <text:s text:c="9"/>string <text:s text:c="2"/>`gorm:"type:varchar(191);unique" json:"phone"`</text:p>
      <text:p text:style-name="P6"><text:tab/>Role <text:s text:c="10"/>UserRole `gorm:"type:enum('client','doctor')" json:"role"`</text:p>
      <text:p text:style-name="P6"><text:tab/>Specialization string <text:s text:c="2"/>`json:"specialization,omitempty"`</text:p>
      <text:p text:style-name="P6"><text:tab/>Pets <text:s text:c="10"/>[]Pet <text:s text:c="3"/>`gorm:"foreignKey:OwnerID" json:"pets,omitempty"`</text:p>
      <text:p text:style-name="P6">}</text:p>
      <text:p text:style-name="P7"><text:span text:style-name="Source_20_Text"><text:span text:style-name="T2">models/pet.go</text:span></text:span></text:p>
      <text:p text:style-name="P8"><text:soft-page-break/>package models</text:p>
      <text:p text:style-name="P8"/>
      <text:p text:style-name="P8">import (</text:p>
      <text:p text:style-name="P8"><text:tab/>"time"</text:p>
      <text:p text:style-name="P8"/>
      <text:p text:style-name="P8"><text:tab/>"gorm.io/gorm"</text:p>
      <text:p text:style-name="P8">)</text:p>
      <text:p text:style-name="P8"/>
      <text:p text:style-name="P8">type Pet struct {</text:p>
      <text:p text:style-name="P8"><text:tab/>gorm.Model</text:p>
      <text:p text:style-name="P8"><text:tab/>OwnerID <text:s text:c="5"/>uint <text:s text:c="9"/>`json:"ownerId"`</text:p>
      <text:p text:style-name="P8"><text:tab/>Name <text:s text:c="8"/>string <text:s text:c="7"/>`json:"name"`</text:p>
      <text:p text:style-name="P8"><text:tab/>Species <text:s text:c="5"/>string <text:s text:c="7"/>`json:"species"`</text:p>
      <text:p text:style-name="P8"><text:tab/>Breed <text:s text:c="7"/>string <text:s text:c="7"/>`json:"breed"`</text:p>
      <text:p text:style-name="P8"><text:tab/>BirthDate <text:s text:c="3"/>time.Time <text:s text:c="4"/>`json:"dob"`</text:p>
      <text:p text:style-name="P8"><text:tab/>Weight <text:s text:c="6"/>float64 <text:s text:c="6"/>`json:"weight"`</text:p>
      <text:p text:style-name="P8"><text:tab/>Avatar <text:s text:c="6"/>string <text:s text:c="7"/>`json:"avatar"`</text:p>
      <text:p text:style-name="P8"><text:tab/>Appointments []Appointment `gorm:"foreignKey:PetID" json:"appointments,omitempty"`</text:p>
      <text:p text:style-name="P8">}</text:p>
      <text:p text:style-name="P7"><text:span text:style-name="Source_20_Text"><text:span text:style-name="T2">models/appointment.go</text:span></text:span></text:p>
      <text:p text:style-name="P8">package models</text:p>
      <text:p text:style-name="P8"/>
      <text:p text:style-name="P8">import (</text:p>
      <text:p text:style-name="P8"><text:tab/>"time"</text:p>
      <text:p text:style-name="P8"/>
      <text:p text:style-name="P8"><text:tab/>"gorm.io/gorm"</text:p>
      <text:p text:style-name="P8">)</text:p>
      <text:p text:style-name="P8"/>
      <text:p text:style-name="P8">type StatusAppointment string</text:p>
      <text:p text:style-name="P8"/>
      <text:p text:style-name="P8">const (</text:p>
      <text:p text:style-name="P8"><text:soft-page-break/><text:tab/>StatusWaiting <text:s text:c="2"/>StatusAppointment = "waiting"</text:p>
      <text:p text:style-name="P8"><text:tab/>StatusConfirmed StatusAppointment = "confirmed"</text:p>
      <text:p text:style-name="P8"><text:tab/>StatusRejected <text:s/>StatusAppointment = "rejected"</text:p>
      <text:p text:style-name="P8"><text:tab/>StatusDone <text:s text:c="5"/>StatusAppointment = "done"</text:p>
      <text:p text:style-name="P8">)</text:p>
      <text:p text:style-name="P8"/>
      <text:p text:style-name="P8">type Appointment struct {</text:p>
      <text:p text:style-name="P8"><text:tab/>gorm.Model</text:p>
      <text:p text:style-name="P8"/>
      <text:p text:style-name="P8"><text:tab/>ClientID <text:s text:c="3"/>uint <text:s text:c="13"/>`json:"clientId"`</text:p>
      <text:p text:style-name="P8"><text:tab/>PetID <text:s text:c="6"/>uint <text:s text:c="13"/>`json:"petId"`</text:p>
      <text:p text:style-name="P8"><text:tab/>DoctorID <text:s text:c="3"/>uint <text:s text:c="13"/>`json:"doctorId"`</text:p>
      <text:p text:style-name="P8"><text:tab/>ServiceID <text:s text:c="2"/>*uint <text:s text:c="12"/>`json:"serviceId"`</text:p>
      <text:p text:style-name="P8"><text:tab/>ScheduledAt time.Time <text:s text:c="8"/>`json:"scheduledAt"`</text:p>
      <text:p text:style-name="P8"><text:tab/>Status <text:s text:c="5"/>StatusAppointment `json:"status" gorm:"type:varchar(20);default:'waiting'"`</text:p>
      <text:p text:style-name="P8"><text:tab/>Comment <text:s text:c="4"/>string <text:s text:c="11"/>`json:"comment"`</text:p>
      <text:p text:style-name="P8"><text:tab/>Pet <text:s text:c="8"/>Pet <text:s text:c="14"/>`gorm:"foreignKey:PetID" json:"pet"`</text:p>
      <text:p text:style-name="P8"><text:tab/>Client <text:s text:c="5"/>User <text:s text:c="13"/>`gorm:"foreignKey:ClientID" json:"client"`</text:p>
      <text:p text:style-name="P8"><text:tab/>Doctor <text:s text:c="5"/>User <text:s text:c="13"/>`gorm:"foreignKey:DoctorID" json:"doctor"`</text:p>
      <text:p text:style-name="P8"><text:tab/>Service <text:s text:c="4"/>Service <text:s text:c="10"/>`gorm:"foreignKey:ServiceID" json:"service"`</text:p>
      <text:p text:style-name="P8"><text:tab/>Diagnoses <text:s text:c="2"/>[]Diagnosis <text:s text:c="6"/>`gorm:"many2many:appointment_diagnoses;" json:"diagnoses"`</text:p>
      <text:p text:style-name="P8"><text:tab/>Protocol <text:s text:c="3"/>*MedicalProtocol <text:s/>`gorm:"foreignKey:AppointmentID" json:"protocol"`</text:p>
      <text:p text:style-name="P7"><text:span text:style-name="T2">}<text:line-break/></text:span><text:span text:style-name="Source_20_Text"><text:span text:style-name="T2">models/diagnos.go</text:span></text:span></text:p>
      <text:p text:style-name="P8">package models</text:p>
      <text:p text:style-name="P8"/>
      <text:p text:style-name="P8">import "gorm.io/gorm"</text:p>
      <text:p text:style-name="P8"/>
      <text:p text:style-name="P8">type Diagnosis struct {</text:p>
      <text:p text:style-name="P8"><text:soft-page-break/><text:tab/>gorm.Model</text:p>
      <text:p text:style-name="P8"><text:tab/>Name string `json:"name" gorm:"not null"`</text:p>
      <text:p text:style-name="P8">}</text:p>
      <text:p text:style-name="P7"><text:span text:style-name="Source_20_Text"><text:span text:style-name="T2">models/medical_protocol.go</text:span></text:span></text:p>
      <text:p text:style-name="P8">package models</text:p>
      <text:p text:style-name="P8"/>
      <text:p text:style-name="P8">import "gorm.io/gorm"</text:p>
      <text:p text:style-name="P8"/>
      <text:p text:style-name="P8">type MedicalProtocol struct {</text:p>
      <text:p text:style-name="P8"><text:tab/>gorm.Model</text:p>
      <text:p text:style-name="P8"><text:tab/>AppointmentID uint <text:s text:c="3"/>`gorm:"uniqueIndex" json:"appointmentId"`</text:p>
      <text:p text:style-name="P8"><text:tab/>WeightAtVisit float64 `json:"weight"`</text:p>
      <text:p text:style-name="P8"><text:tab/>Treatment <text:s text:c="4"/>string <text:s/>`json:"treatment"`</text:p>
      <text:p text:style-name="P8"><text:tab/>Medications <text:s text:c="2"/>string <text:s/>`json:"medications"`</text:p>
      <text:p text:style-name="P8">}</text:p>
      <text:p text:style-name="P7"><text:span text:style-name="Source_20_Text"><text:span text:style-name="T2">models/service.go</text:span></text:span></text:p>
      <text:p text:style-name="P8">package models</text:p>
      <text:p text:style-name="P8"/>
      <text:p text:style-name="P8">import "gorm.io/gorm"</text:p>
      <text:p text:style-name="P8"/>
      <text:p text:style-name="P8">type Service struct {</text:p>
      <text:p text:style-name="P8"><text:tab/>gorm.Model</text:p>
      <text:p text:style-name="P8"><text:tab/>Name <text:s/>string `json:"name"`</text:p>
      <text:p text:style-name="P8"><text:tab/>Price uint <text:s text:c="2"/>`json:"price"`</text:p>
      <text:p text:style-name="P8">}</text:p>
      <text:p text:style-name="P7"><text:span text:style-name="Source_20_Text"><text:span text:style-name="T2">models/product.go</text:span></text:span></text:p>
      <text:p text:style-name="P8">package models</text:p>
      <text:p text:style-name="P8"/>
      <text:p text:style-name="P8">import "gorm.io/gorm"</text:p>
      <text:p text:style-name="P8"/>
      <text:p text:style-name="P8">type Product struct {</text:p>
      <text:p text:style-name="P8"><text:tab/>gorm.Model</text:p>
      <text:p text:style-name="P8"><text:soft-page-break/><text:tab/>Name <text:s text:c="7"/>string `json:"name"`</text:p>
      <text:p text:style-name="P8"><text:tab/>Description string `json:"description"`</text:p>
      <text:p text:style-name="P8"><text:tab/>Price <text:s text:c="6"/>int <text:s text:c="3"/>`json:"price"`</text:p>
      <text:p text:style-name="P8"><text:tab/>Category <text:s text:c="3"/>string `json:"category"`</text:p>
      <text:p text:style-name="P8"><text:tab/>Stock <text:s text:c="6"/>int <text:s text:c="3"/>`json:"stock"`</text:p>
      <text:p text:style-name="P8">}</text:p>
      <text:p text:style-name="P7"><text:span text:style-name="Source_20_Text"><text:span text:style-name="T2">models/cart_item.go</text:span></text:span></text:p>
      <text:p text:style-name="P8">package models</text:p>
      <text:p text:style-name="P8"/>
      <text:p text:style-name="P8">import "gorm.io/gorm"</text:p>
      <text:p text:style-name="P8"/>
      <text:p text:style-name="P8">type CartItem struct {</text:p>
      <text:p text:style-name="P8"><text:tab/>gorm.Model</text:p>
      <text:p text:style-name="P8"><text:tab/>UserID <text:s text:c="3"/>uint <text:s text:c="3"/>`json:"userId"`</text:p>
      <text:p text:style-name="P8"><text:tab/>ProductID uint <text:s text:c="3"/>`json:"productId"`</text:p>
      <text:p text:style-name="P8"><text:tab/>Quantity <text:s/>uint <text:s text:c="3"/>`json:"quantity"`</text:p>
      <text:p text:style-name="P8"><text:tab/>Product <text:s text:c="2"/>Product `gorm:"foreignKey:ProductID" json:"product"`</text:p>
      <text:p text:style-name="P8">}</text:p>
      <text:p text:style-name="P7"><text:span text:style-name="Source_20_Text"><text:span text:style-name="T2">models/order.go</text:span></text:span></text:p>
      <text:p text:style-name="P8">package models</text:p>
      <text:p text:style-name="P8"/>
      <text:p text:style-name="P8">import "gorm.io/gorm"</text:p>
      <text:p text:style-name="P8"/>
      <text:p text:style-name="P8">type OrderStatus string</text:p>
      <text:p text:style-name="P8"/>
      <text:p text:style-name="P8">const (</text:p>
      <text:p text:style-name="P8"><text:tab/>OrderPaid <text:s text:c="5"/>OrderStatus = "paid"</text:p>
      <text:p text:style-name="P8"><text:tab/>OrderConfirmed OrderStatus = "confirmed"</text:p>
      <text:p text:style-name="P8"><text:tab/>OrderDelivered OrderStatus = "delivered"</text:p>
      <text:p text:style-name="P8">)</text:p>
      <text:p text:style-name="P8"/>
      <text:p text:style-name="P8">type OrderItem struct {</text:p>
      <text:p text:style-name="P8"><text:soft-page-break/><text:tab/>gorm.Model</text:p>
      <text:p text:style-name="P8"><text:tab/>OrderID <text:s text:c="2"/>uint <text:s text:c="3"/>`json:"orderId"`</text:p>
      <text:p text:style-name="P8"><text:tab/>ProductID uint <text:s text:c="3"/>`json:"productId"`</text:p>
      <text:p text:style-name="P8"><text:tab/>Product <text:s text:c="2"/>Product `gorm:"foreignKey:ProductID" json:"product"`</text:p>
      <text:p text:style-name="P8"><text:tab/>Quantity <text:s/>uint <text:s text:c="3"/>`json:"quantity"`</text:p>
      <text:p text:style-name="P8"><text:tab/>Price <text:s text:c="4"/>int <text:s text:c="4"/>`json:"price"`</text:p>
      <text:p text:style-name="P8">}</text:p>
      <text:p text:style-name="P8"/>
      <text:p text:style-name="P8">type Order struct {</text:p>
      <text:p text:style-name="P8"><text:tab/>gorm.Model</text:p>
      <text:p text:style-name="P8"><text:tab/>UserID <text:s text:c="5"/>uint <text:s text:c="7"/>`json:"userId"`</text:p>
      <text:p text:style-name="P8"><text:tab/>TotalAmount uint <text:s text:c="7"/>`json:"totalAmount"`</text:p>
      <text:p text:style-name="P8"><text:tab/>Status <text:s text:c="5"/>OrderStatus `gorm:"type:enum('paid','confirmed','delivered')" json:"status"`</text:p>
      <text:p text:style-name="P8"><text:tab/>Items <text:s text:c="6"/>[]OrderItem `gorm:"foreignKey:OrderID" json:"items"`</text:p>
      <text:p text:style-name="P8">}</text:p>
      <text:p text:style-name="P9"><text:span text:style-name="Emphasis"><text:span text:style-name="T1">internal/repository</text:span></text:span></text:p>
      <text:p text:style-name="P9"><text:span text:style-name="Source_20_Text"><text:span text:style-name="T1">repository/appointment_repo.go</text:span></text:span></text:p>
      <text:p text:style-name="P10">package repository</text:p>
      <text:p text:style-name="P10">import ( "api/internal/models" "time"</text:p>
      <text:p text:style-name="P11">"gorm.io/gorm"</text:p>
      <text:p text:style-name="P10">)</text:p>
      <text:p text:style-name="P10">type AppointmentRepository interface { Create(app *models.Appointment) error GetBusySlots(doctorID uint, date string) ([]string, error) GetByClientID(clientID uint) ([]models.Appointment, error) GetDoctors() ([]models.User, error) GetServices() ([]models.Service, error) SetDiagnoses(appointmentID uint, diagnosisIDs []uint) error }</text:p>
      <text:p text:style-name="P10">type appointmentRepo struct { db *gorm.DB }</text:p>
      <text:p text:style-name="P10">func NewAppointmentRepository(db *gorm.DB) AppointmentRepository { return &amp;appointmentRepo{db} }</text:p>
      <text:p text:style-name="P10">func (r *appointmentRepo) Create(app *models.Appointment) error { return <text:soft-page-break/>r.db.Create(app).Error }</text:p>
      <text:p text:style-name="P10">func (r *appointmentRepo) GetBusySlots(doctorID uint, date string) ([]string, error) { times := make([]time.Time, 0) err := r.db.Model(&amp;models.Appointment{}). Where("doctor_id = ? AND DATE(scheduled_at) = ? AND status != ?", doctorID, date, "rejected"). Pluck("scheduled_at", &amp;times).Error</text:p>
      <text:p text:style-name="P11">slots := make([]string, 0)<text:line-break/>for _, t := range times {<text:line-break/> <text:s text:c="3"/>slots = append(slots, t.Format("15:04"))<text:line-break/>}<text:line-break/>return slots, err</text:p>
      <text:p text:style-name="P10">}</text:p>
      <text:p text:style-name="P10">func (r *appointmentRepo) GetByClientID(clientID uint) ([]models.Appointment, error) { apps := []models.Appointment{}</text:p>
      <text:p text:style-name="P11">err := r.db.Preload("Pet").<text:line-break/> <text:s text:c="3"/>Preload("Protocol").<text:line-break/> <text:s text:c="3"/>Preload("Doctor").<text:line-break/> <text:s text:c="3"/>Preload("Service").<text:line-break/> <text:s text:c="3"/>Preload("Diagnoses").<text:line-break/> <text:s text:c="3"/>Where("client_id = ?", clientID).<text:line-break/> <text:s text:c="3"/>Order("scheduled_at desc").<text:line-break/> <text:s text:c="3"/>Find(&amp;apps).Error<text:line-break/><text:line-break/>return apps, err</text:p>
      <text:p text:style-name="P10">}</text:p>
      <text:p text:style-name="P10">func (r *appointmentRepo) GetDoctors() ([]models.User, error) { doctors := make([]models.User, 0) err := r.db.Where("role = ?", "doctor").Find(&amp;doctors).Error return doctors, err }</text:p>
      <text:p text:style-name="P10">func (r *appointmentRepo) GetServices() ([]models.Service, error) { services := make([]models.Service, 0) err := r.db.Find(&amp;services).Error return services, err }</text:p>
      <text:p text:style-name="P10">func (r *appointmentRepo) SetDiagnoses(appointmentID uint, diagnosisIDs []uint) error { var appointment models.Appointment</text:p>
      <text:p text:style-name="P11">if err := r.db.First(&amp;appointment, appointmentID).Error; err != nil {<text:line-break/> <text:s text:c="3"/>return err<text:line-break/>}<text:line-break/><text:line-break/>var diagnoses []models.Diagnosis<text:line-break/><text:line-break/>if err := r.db.Where("id IN ?", diagnosisIDs).Find(&amp;diagnoses).Error; err != nil {<text:line-break/> <text:s text:c="3"/>return err<text:line-break/><text:soft-page-break/>}<text:line-break/><text:line-break/>return r.db.Model(&amp;appointment).<text:line-break/> <text:s text:c="3"/>Association("Diagnoses").<text:line-break/> <text:s text:c="3"/>Replace(diagnoses)</text:p>
      <text:p text:style-name="P12">}</text:p>
      <text:p text:style-name="P13"><text:span text:style-name="Source_20_Text"><text:span text:style-name="T3">repository/diagnosis_repo.go</text:span></text:span><text:span text:style-name="T3"/></text:p>
      <text:p text:style-name="P14">package repository</text:p>
      <text:p text:style-name="P14"/>
      <text:p text:style-name="P14">import (</text:p>
      <text:p text:style-name="P14"><text:tab/>"api/internal/models"</text:p>
      <text:p text:style-name="P14"/>
      <text:p text:style-name="P14"><text:tab/>"gorm.io/gorm"</text:p>
      <text:p text:style-name="P14">)</text:p>
      <text:p text:style-name="P14"/>
      <text:p text:style-name="P14">type DiagnosisRepository interface {</text:p>
      <text:p text:style-name="P14"><text:tab/>GetAll() ([]models.Diagnosis, error)</text:p>
      <text:p text:style-name="P14"><text:tab/>SetDiagnoses(appointment *models.Appointment, diagnoses []models.Diagnosis) error</text:p>
      <text:p text:style-name="P14">}</text:p>
      <text:p text:style-name="P14"/>
      <text:p text:style-name="P14">type diagnosisRepo struct {</text:p>
      <text:p text:style-name="P14"><text:tab/>db *gorm.DB</text:p>
      <text:p text:style-name="P14">}</text:p>
      <text:p text:style-name="P14"/>
      <text:p text:style-name="P14">func NewDiagnosisRepository(db *gorm.DB) DiagnosisRepository {</text:p>
      <text:p text:style-name="P14"><text:tab/>return &amp;diagnosisRepo{</text:p>
      <text:p text:style-name="P14"><text:tab/><text:tab/>db: db,</text:p>
      <text:p text:style-name="P14"><text:soft-page-break/><text:tab/>}</text:p>
      <text:p text:style-name="P14">}</text:p>
      <text:p text:style-name="P14"/>
      <text:p text:style-name="P14">func (r *diagnosisRepo) GetAll() ([]models.Diagnosis, error) {</text:p>
      <text:p text:style-name="P14"><text:tab/>diagnoses := make([]models.Diagnosis, 0)</text:p>
      <text:p text:style-name="P14"/>
      <text:p text:style-name="P14"><text:tab/>err := r.db.Find(&amp;diagnoses).Error</text:p>
      <text:p text:style-name="P14"/>
      <text:p text:style-name="P14"><text:tab/>return diagnoses, err</text:p>
      <text:p text:style-name="P14">}</text:p>
      <text:p text:style-name="P14"/>
      <text:p text:style-name="P14">func (r *diagnosisRepo) SetDiagnoses(</text:p>
      <text:p text:style-name="P14"><text:tab/>appointment *models.Appointment,</text:p>
      <text:p text:style-name="P14"><text:tab/>diagnoses []models.Diagnosis,</text:p>
      <text:p text:style-name="P14">) error {</text:p>
      <text:p text:style-name="P14"><text:tab/>return r.db.Model(appointment).</text:p>
      <text:p text:style-name="P14"><text:tab/><text:tab/>Association("Diagnoses").</text:p>
      <text:p text:style-name="P14"><text:tab/><text:tab/>Replace(diagnoses)</text:p>
      <text:p text:style-name="P14">}</text:p>
      <text:p text:style-name="P15"><text:span text:style-name="Source_20_Text"><text:span text:style-name="T2">repository/doctor_repo.go</text:span></text:span></text:p>
      <text:p text:style-name="P10">package repository</text:p>
      <text:p text:style-name="P10">import ( "api/internal/models"</text:p>
      <text:p text:style-name="P11">"gorm.io/gorm"</text:p>
      <text:p text:style-name="P10">)</text:p>
      <text:p text:style-name="P10">type DoctorRepository interface { GetSchedule(doctorID uint) ([]models.Appointment, error) CompleteAppointment(appID uint, protocol *models.MedicalProtocol) error SearchClients(query string) ([]models.User, <text:soft-page-break/>error) GetClientHistory(clientID uint) ([]models.Pet, error) UpdateAppointmentStatus(appID uint, status string) error SetDiagnoses(appID uint, diagnosisIDs []uint) error }</text:p>
      <text:p text:style-name="P10">type doctorRepo struct { db *gorm.DB }</text:p>
      <text:p text:style-name="P10">func NewDoctorRepository(db *gorm.DB) DoctorRepository { return &amp;doctorRepo{db} }</text:p>
      <text:p text:style-name="P10">func (r *doctorRepo) GetSchedule(doctorID uint) ([]models.Appointment, error) { // Добавлен error apps := make([]models.Appointment, 0) err := r.db.Preload("Pet").Preload("Client").Preload("Service"). Where("doctor_id = ? AND status != ?", doctorID, "rejected"). Order("scheduled_at asc").Find(&amp;apps).Error</text:p>
      <text:p text:style-name="P11">return apps, err</text:p>
      <text:p text:style-name="P10">}</text:p>
      <text:p text:style-name="P10">func (r *doctorRepo) CompleteAppointment(appID uint, protocol *models.MedicalProtocol) error { return r.db.Transaction(func(tx *gorm.DB) error { if err := tx.Create(protocol).Error; err != nil { return err } return tx.Model(&amp;models.Appointment{}).Where("id = ?", appID).Update("status", "done").Error }) }</text:p>
      <text:p text:style-name="P10">func (r *doctorRepo) SearchClients(query string) ([]models.User, error) { users := make([]models.User, 0) dbQuery := r.db.Preload("Pets").Where("role = ?", "client") if query != "" { q := "%" + query + "%" dbQuery = dbQuery.Where("first_name LIKE ? OR last_name LIKE ? OR phone LIKE ?", q, q, q) } err := dbQuery.Find(&amp;users).Error return users, err }</text:p>
      <text:p text:style-name="P10">func (r *doctorRepo) GetClientHistory(clientID uint) ([]models.Pet, error) { pets := make([]models.Pet, 0) err := r.db.Preload("Appointments", "status = ?", "done"). Preload("Appointments.Protocol"). Preload("Appointments.Diagnoses"). Where("owner_id = ?", clientID).Find(&amp;pets).Error return pets, err }</text:p>
      <text:p text:style-name="P10">func (r *doctorRepo) UpdateAppointmentStatus(appID uint, status string) error { return r.db.Model(&amp;models.Appointment{}).Where("id = ?", appID).Update("status", status).Error }</text:p>
      <text:p text:style-name="P10">func (r *doctorRepo) SetDiagnoses(appID uint, diagnosisIDs []uint) error { var appointment models.Appointment</text:p>
      <text:p text:style-name="P11">if err := r.db.First(&amp;appointment, appID).Error; err != nil {<text:line-break/> <text:s text:c="3"/>return err<text:line-break/>}<text:line-break/><text:line-break/>var diagnoses []models.Diagnosis<text:line-break/><text:line-break/>if err := r.db.Where("id IN ?", diagnosisIDs).<text:line-break/> <text:s text:c="3"/>Find(&amp;diagnoses).Error; err != nil {<text:line-break/><text:soft-page-break/> <text:s text:c="3"/>return err<text:line-break/>}<text:line-break/><text:line-break/>return r.db.Model(&amp;appointment).<text:line-break/> <text:s text:c="3"/>Association("Diagnoses").<text:line-break/> <text:s text:c="3"/>Replace(diagnoses)</text:p>
      <text:p text:style-name="P11">}</text:p>
      <text:p text:style-name="P10"/>
      <text:p text:style-name="P9"><text:span text:style-name="Emphasis"><text:span text:style-name="T1">internal/service</text:span></text:span></text:p>
      <text:p text:style-name="P9"><text:span text:style-name="Source_20_Text"><text:span text:style-name="T1">service/booking_service.go</text:span></text:span></text:p>
      <text:p text:style-name="P10">package service</text:p>
      <text:p text:style-name="P10">import ( "api/internal/dto" "api/internal/models" "api/internal/repository" "time" )</text:p>
      <text:p text:style-name="P10">type BookingService interface { GetInitData(userID uint) (*dto.BookingInitResponse, error) GetBusySlots(doctorID uint, date string) ([]string, error) CreateAppointment(clientID uint, req dto.CreateAppointmentRequest) error GetClientHistory(userID uint) ([]dto.RecentAppointmentDTO, error) }</text:p>
      <text:p text:style-name="P10">type bookingService struct { repo <text:s text:c="3"/>repository.AppointmentRepository petRepo repository.PetRepository }</text:p>
      <text:p text:style-name="P10">func NewBookingService(repo repository.AppointmentRepository, petRepo repository.PetRepository) BookingService { return &amp;bookingService{repo, petRepo} }</text:p>
      <text:p text:style-name="P10">func (s *bookingService) GetInitData(userID uint) (*dto.BookingInitResponse, error) { pets, _ := s.petRepo.GetByOwnerID(userID) doctors, _ := s.repo.GetDoctors() services, _ := s.repo.GetServices()</text:p>
      <text:p text:style-name="P11">res := &amp;dto.BookingInitResponse{}<text:line-break/>for _, p := range pets {<text:line-break/> <text:s text:c="3"/>res.Pets = append(res.Pets, dto.PetBriefDTO{ID: p.ID, Name: p.Name, Avatar: p.Avatar})<text:line-break/>}<text:line-break/>for _, d := range doctors {<text:line-break/> <text:s text:c="3"/>res.Doctors = append(res.Doctors, dto.DoctorDTO{ID: d.ID, FirstName: d.FirstName, LastName: d.LastName, Specialization: d.Specialization})<text:line-break/>}<text:line-break/>for _, sv := range services {<text:line-break/> <text:s text:c="3"/>res.Services = append(res.Services, dto.ServiceDTO{ID: sv.ID, Name: sv.Name, Price: sv.Price})<text:line-break/>}<text:line-break/>return res, nil</text:p>
      <text:p text:style-name="P10"><text:soft-page-break/>}</text:p>
      <text:p text:style-name="P10">func (s *bookingService) GetBusySlots(doctorID uint, date string) ([]string, error) { return s.repo.GetBusySlots(doctorID, date) }</text:p>
      <text:p text:style-name="P10">func (s *bookingService) CreateAppointment(clientID uint, req dto.CreateAppointmentRequest) error { scheduledAt, err := time.ParseInLocation("2006-01-02T15:04:05", req.ScheduledAt, time.Local) if err != nil { return err }</text:p>
      <text:p text:style-name="P11">app := models.Appointment{<text:line-break/> <text:s text:c="3"/>ClientID: <text:s text:c="3"/>clientID,<text:line-break/> <text:s text:c="3"/>PetID: <text:s text:c="6"/>req.PetID,<text:line-break/> <text:s text:c="3"/>DoctorID: <text:s text:c="3"/>req.DoctorID,<text:line-break/> <text:s text:c="3"/>ServiceID: <text:s text:c="2"/>req.ServiceID,<text:line-break/> <text:s text:c="3"/>ScheduledAt: scheduledAt,<text:line-break/> <text:s text:c="3"/>Status: <text:s text:c="5"/>models.StatusWaiting,<text:line-break/> <text:s text:c="3"/>Comment: <text:s text:c="4"/>req.Comment,<text:line-break/>}<text:line-break/>return s.repo.Create(&amp;app)</text:p>
      <text:p text:style-name="P10">}</text:p>
      <text:p text:style-name="P10">func (s *bookingService) GetClientHistory(userID uint) ([]dto.RecentAppointmentDTO, error) { apps, err := s.repo.GetByClientID(userID) if err != nil { return nil, err }</text:p>
      <text:p text:style-name="P11">var history []dto.RecentAppointmentDTO<text:line-break/>for _, a := range apps {<text:line-break/> <text:s text:c="3"/>item := dto.RecentAppointmentDTO{<text:line-break/> <text:s text:c="7"/>ID: <text:s text:c="8"/>a.ID,<text:line-break/> <text:s text:c="7"/>PetName: <text:s text:c="3"/>a.Pet.Name,<text:line-break/> <text:s text:c="7"/>DoctorName: a.Doctor.LastName + " " + a.Doctor.FirstName,<text:line-break/> <text:s text:c="7"/>Date: <text:s text:c="6"/>a.ScheduledAt.Format("02.01.2006"),<text:line-break/> <text:s text:c="7"/>Time: <text:s text:c="6"/>a.ScheduledAt.Format("15:04"),<text:line-break/> <text:s text:c="7"/>Status: <text:s text:c="4"/>string(a.Status),<text:line-break/> <text:s text:c="7"/>Service: <text:s text:c="3"/>a.Service.Name,<text:line-break/> <text:s text:c="3"/>}<text:line-break/><text:line-break/> <text:s text:c="3"/>if a.Protocol != nil {<text:line-break/> <text:s text:c="7"/>diagnoses := make([]dto.DiagnosisDTO, 0, len(a.Diagnoses))<text:line-break/> <text:s text:c="7"/>for _, d := range a.Diagnoses {<text:line-break/> <text:s text:c="11"/>diagnoses = append(diagnoses, dto.DiagnosisDTO{ID: d.ID, Name: d.Name})<text:line-break/> <text:s text:c="7"/>}<text:line-break/><text:line-break/> <text:s text:c="7"/>item.Protocol = &amp;dto.MedicalProtocolDTO{<text:line-break/> <text:s text:c="11"/>Weight: <text:s text:c="5"/>a.Protocol.WeightAtVisit,<text:line-break/> <text:s text:c="11"/>Diagnoses: <text:s text:c="2"/>diagnoses,<text:line-break/><text:soft-page-break/> <text:s text:c="11"/>Treatment: <text:s text:c="2"/>a.Protocol.Treatment,<text:line-break/> <text:s text:c="11"/>Medications: a.Protocol.Medications,<text:line-break/> <text:s text:c="7"/>}<text:line-break/> <text:s text:c="3"/>}<text:line-break/><text:line-break/> <text:s text:c="3"/>history = append(history, item)<text:line-break/>}<text:line-break/>return history, nil</text:p>
      <text:p text:style-name="P12">}</text:p>
      <text:p text:style-name="P16"><text:span text:style-name="Source_20_Text"><text:span text:style-name="T4">service/diagnosis_service.go</text:span></text:span><text:span text:style-name="T4"/></text:p>
      <text:p text:style-name="P14">package service</text:p>
      <text:p text:style-name="P14"/>
      <text:p text:style-name="P14">import (</text:p>
      <text:p text:style-name="P14"><text:tab/>"api/internal/dto"</text:p>
      <text:p text:style-name="P14"><text:tab/>"api/internal/repository"</text:p>
      <text:p text:style-name="P14">)</text:p>
      <text:p text:style-name="P14"/>
      <text:p text:style-name="P14">type DiagnosisService interface {</text:p>
      <text:p text:style-name="P14"><text:tab/>GetAll() ([]dto.DiagnosisDTO, error)</text:p>
      <text:p text:style-name="P14">}</text:p>
      <text:p text:style-name="P14"/>
      <text:p text:style-name="P14">type diagnosisService struct {</text:p>
      <text:p text:style-name="P14"><text:tab/>repo repository.DiagnosisRepository</text:p>
      <text:p text:style-name="P14">}</text:p>
      <text:p text:style-name="P14"/>
      <text:p text:style-name="P14">func NewDiagnosisService(repo repository.DiagnosisRepository) DiagnosisService {</text:p>
      <text:p text:style-name="P14"><text:tab/>return &amp;diagnosisService{repo}</text:p>
      <text:p text:style-name="P14">}</text:p>
      <text:p text:style-name="P14"/>
      <text:p text:style-name="P14"><text:soft-page-break/>func (s *diagnosisService) GetAll() ([]dto.DiagnosisDTO, error) {</text:p>
      <text:p text:style-name="P14"><text:tab/>diagnoses, err := s.repo.GetAll()</text:p>
      <text:p text:style-name="P14"><text:tab/>if err != nil {</text:p>
      <text:p text:style-name="P14"><text:tab/><text:tab/>return nil, err</text:p>
      <text:p text:style-name="P14"><text:tab/>}</text:p>
      <text:p text:style-name="P14"/>
      <text:p text:style-name="P14"><text:tab/>res := make([]dto.DiagnosisDTO, 0, len(diagnoses))</text:p>
      <text:p text:style-name="P14"><text:tab/>for _, d := range diagnoses {</text:p>
      <text:p text:style-name="P14"><text:tab/><text:tab/>res = append(res, dto.DiagnosisDTO{ID: d.ID, Name: d.Name})</text:p>
      <text:p text:style-name="P14"><text:tab/>}</text:p>
      <text:p text:style-name="P14"><text:tab/>return res, nil</text:p>
      <text:p text:style-name="P14">}</text:p>
      <text:p text:style-name="P15"><text:span text:style-name="Source_20_Text"><text:span text:style-name="T2">service/doctor_service.go</text:span></text:span></text:p>
      <text:p text:style-name="P14">package service</text:p>
      <text:p text:style-name="P14"/>
      <text:p text:style-name="P14">import (</text:p>
      <text:p text:style-name="P14"><text:tab/>"api/internal/dto"</text:p>
      <text:p text:style-name="P14"><text:tab/>"api/internal/models"</text:p>
      <text:p text:style-name="P14"><text:tab/>"api/internal/repository"</text:p>
      <text:p text:style-name="P14">)</text:p>
      <text:p text:style-name="P14"/>
      <text:p text:style-name="P14">type DoctorService interface {</text:p>
      <text:p text:style-name="P14"><text:tab/>GetSchedule(doctorID uint) []dto.DoctorScheduleDTO</text:p>
      <text:p text:style-name="P14"><text:tab/>CompleteVisit(appID uint, req dto.CompleteVisitRequest) error</text:p>
      <text:p text:style-name="P14"><text:tab/>GetPatients(search string) []dto.PatientDTO</text:p>
      <text:p text:style-name="P14"><text:soft-page-break/><text:tab/>GetMedicalHistory(clientID uint) []dto.PetHistoryDTO</text:p>
      <text:p text:style-name="P14"><text:tab/>UpdateStatus(appID uint, status string) error</text:p>
      <text:p text:style-name="P14">}</text:p>
      <text:p text:style-name="P14"/>
      <text:p text:style-name="P14">type doctorService struct {</text:p>
      <text:p text:style-name="P14"><text:tab/>repo repository.DoctorRepository</text:p>
      <text:p text:style-name="P14">}</text:p>
      <text:p text:style-name="P14"/>
      <text:p text:style-name="P14">func NewDoctorService(repo repository.DoctorRepository) DoctorService {</text:p>
      <text:p text:style-name="P14"><text:tab/>return &amp;doctorService{repo}</text:p>
      <text:p text:style-name="P14">}</text:p>
      <text:p text:style-name="P14"/>
      <text:p text:style-name="P14">func (s *doctorService) GetSchedule(doctorID uint) []dto.DoctorScheduleDTO {</text:p>
      <text:p text:style-name="P14"><text:tab/>apps, err := s.repo.GetSchedule(doctorID)</text:p>
      <text:p text:style-name="P14"><text:tab/>if err != nil {</text:p>
      <text:p text:style-name="P14"><text:tab/><text:tab/>return []dto.DoctorScheduleDTO{}</text:p>
      <text:p text:style-name="P14"><text:tab/>}</text:p>
      <text:p text:style-name="P14"/>
      <text:p text:style-name="P14"><text:tab/>res := make([]dto.DoctorScheduleDTO, 0)</text:p>
      <text:p text:style-name="P14"><text:tab/>for _, a := range apps {</text:p>
      <text:p text:style-name="P14"><text:tab/><text:tab/>res = append(res, dto.DoctorScheduleDTO{</text:p>
      <text:p text:style-name="P14"><text:tab/><text:tab/><text:tab/>ID: <text:s text:c="7"/>a.ID,</text:p>
      <text:p text:style-name="P14"><text:tab/><text:tab/><text:tab/>Time: <text:s text:c="5"/>a.ScheduledAt.Format("15:04"),</text:p>
      <text:p text:style-name="P14"><text:tab/><text:tab/><text:tab/>Date: <text:s text:c="5"/>a.ScheduledAt.Format("2006-01-02"),</text:p>
      <text:p text:style-name="P14"><text:tab/><text:tab/><text:tab/>PetName: <text:s text:c="2"/>a.Pet.Name,</text:p>
      <text:p text:style-name="P14"><text:soft-page-break/><text:tab/><text:tab/><text:tab/>OwnerName: a.Client.LastName + " " + a.Client.FirstName,</text:p>
      <text:p text:style-name="P14"><text:tab/><text:tab/><text:tab/>Service: <text:s text:c="2"/>a.Service.Name,</text:p>
      <text:p text:style-name="P14"><text:tab/><text:tab/><text:tab/>Status: <text:s text:c="3"/>string(a.Status),</text:p>
      <text:p text:style-name="P14"><text:tab/><text:tab/>})</text:p>
      <text:p text:style-name="P14"><text:tab/>}</text:p>
      <text:p text:style-name="P14"><text:tab/>return res</text:p>
      <text:p text:style-name="P14">}</text:p>
      <text:p text:style-name="P14"/>
      <text:p text:style-name="P14">func (s *doctorService) CompleteVisit(appID uint, req dto.CompleteVisitRequest) error {</text:p>
      <text:p text:style-name="P14"><text:tab/>protocol := &amp;models.MedicalProtocol{</text:p>
      <text:p text:style-name="P14"><text:tab/><text:tab/>AppointmentID: appID,</text:p>
      <text:p text:style-name="P14"><text:tab/><text:tab/>WeightAtVisit: req.Weight,</text:p>
      <text:p text:style-name="P14"><text:tab/><text:tab/>Treatment: <text:s text:c="4"/>req.Treatment,</text:p>
      <text:p text:style-name="P14"><text:tab/><text:tab/>Medications: <text:s text:c="2"/>req.Medications,</text:p>
      <text:p text:style-name="P14"><text:tab/>}</text:p>
      <text:p text:style-name="P14"/>
      <text:p text:style-name="P14"><text:tab/>if err := s.repo.CompleteAppointment(appID, protocol); err != nil {</text:p>
      <text:p text:style-name="P14"><text:tab/><text:tab/>return err</text:p>
      <text:p text:style-name="P14"><text:tab/>}</text:p>
      <text:p text:style-name="P14"/>
      <text:p text:style-name="P14"><text:tab/>return s.repo.SetDiagnoses(appID, req.DiagnosisIDs)</text:p>
      <text:p text:style-name="P14">}</text:p>
      <text:p text:style-name="P14"/>
      <text:p text:style-name="P14">func (s *doctorService) GetPatients(search string) []dto.PatientDTO {</text:p>
      <text:p text:style-name="P14"><text:tab/>clients, _ := s.repo.SearchClients(search)</text:p>
      <text:p text:style-name="P14"><text:soft-page-break/><text:tab/>var res []dto.PatientDTO</text:p>
      <text:p text:style-name="P14"><text:tab/>for _, c := range clients {</text:p>
      <text:p text:style-name="P14"><text:tab/><text:tab/>res = append(res, dto.PatientDTO{</text:p>
      <text:p text:style-name="P14"><text:tab/><text:tab/><text:tab/>ID: <text:s text:c="7"/>c.ID,</text:p>
      <text:p text:style-name="P14"><text:tab/><text:tab/><text:tab/>FullName: <text:s/>c.LastName + " " + c.FirstName,</text:p>
      <text:p text:style-name="P14"><text:tab/><text:tab/><text:tab/>Phone: <text:s text:c="4"/>c.Phone,</text:p>
      <text:p text:style-name="P14"><text:tab/><text:tab/><text:tab/>Email: <text:s text:c="4"/>c.Email,</text:p>
      <text:p text:style-name="P14"><text:tab/><text:tab/><text:tab/>PetsCount: len(c.Pets),</text:p>
      <text:p text:style-name="P14"><text:tab/><text:tab/>})</text:p>
      <text:p text:style-name="P14"><text:tab/>}</text:p>
      <text:p text:style-name="P14"><text:tab/>return res</text:p>
      <text:p text:style-name="P14">}</text:p>
      <text:p text:style-name="P14"/>
      <text:p text:style-name="P14">func (s *doctorService) GetMedicalHistory(clientID uint) []dto.PetHistoryDTO {</text:p>
      <text:p text:style-name="P14"><text:tab/>pets, _ := s.repo.GetClientHistory(clientID)</text:p>
      <text:p text:style-name="P14"><text:tab/>res := make([]dto.PetHistoryDTO, 0)</text:p>
      <text:p text:style-name="P14"><text:tab/>for _, p := range pets {</text:p>
      <text:p text:style-name="P14"><text:tab/><text:tab/>var visits []dto.VisitTimelineDTO</text:p>
      <text:p text:style-name="P14"><text:tab/><text:tab/>for _, a := range p.Appointments {</text:p>
      <text:p text:style-name="P14"><text:tab/><text:tab/><text:tab/>if a.Protocol != nil {</text:p>
      <text:p text:style-name="P14"><text:tab/><text:tab/><text:tab/><text:tab/>diagnoses := make([]dto.DiagnosisDTO, 0, len(a.Diagnoses))</text:p>
      <text:p text:style-name="P14"><text:tab/><text:tab/><text:tab/><text:tab/>for _, d := range a.Diagnoses {</text:p>
      <text:p text:style-name="P14"><text:tab/><text:tab/><text:tab/><text:tab/><text:tab/>diagnoses = append(diagnoses, dto.DiagnosisDTO{ID: d.ID, Name: d.Name})</text:p>
      <text:p text:style-name="P14"><text:tab/><text:tab/><text:tab/><text:tab/>}</text:p>
      <text:p text:style-name="P14"><text:soft-page-break/></text:p>
      <text:p text:style-name="P14"><text:tab/><text:tab/><text:tab/><text:tab/>visits = append(visits, dto.VisitTimelineDTO{</text:p>
      <text:p text:style-name="P14"><text:tab/><text:tab/><text:tab/><text:tab/><text:tab/>ID: <text:s text:c="7"/>a.ID,</text:p>
      <text:p text:style-name="P14"><text:tab/><text:tab/><text:tab/><text:tab/><text:tab/>Date: <text:s text:c="5"/>a.ScheduledAt.Format("02.01.2006"),</text:p>
      <text:p text:style-name="P14"><text:tab/><text:tab/><text:tab/><text:tab/><text:tab/>Diagnoses: diagnoses,</text:p>
      <text:p text:style-name="P14"><text:tab/><text:tab/><text:tab/><text:tab/><text:tab/>Treatment: a.Protocol.Treatment,</text:p>
      <text:p text:style-name="P14"><text:tab/><text:tab/><text:tab/><text:tab/>})</text:p>
      <text:p text:style-name="P14"><text:tab/><text:tab/><text:tab/>}</text:p>
      <text:p text:style-name="P14"><text:tab/><text:tab/>}</text:p>
      <text:p text:style-name="P14"><text:tab/><text:tab/>res = append(res, dto.PetHistoryDTO{PetName: p.Name, PetIcon: p.Avatar, Visits: visits})</text:p>
      <text:p text:style-name="P14"><text:tab/>}</text:p>
      <text:p text:style-name="P14"><text:tab/>return res</text:p>
      <text:p text:style-name="P14">}</text:p>
      <text:p text:style-name="P14"/>
      <text:p text:style-name="P14">func (s *doctorService) UpdateStatus(appID uint, status string) error {</text:p>
      <text:p text:style-name="P14"><text:tab/>return s.repo.UpdateAppointmentStatus(appID, status)</text:p>
      <text:p text:style-name="P14">}</text:p>
      <text:p text:style-name="P9"><text:span text:style-name="Emphasis"><text:span text:style-name="T1">internal/dto</text:span></text:span></text:p>
      <text:p text:style-name="P9"><text:span text:style-name="Source_20_Text"><text:span text:style-name="T1">dto/booking_dto.go</text:span></text:span></text:p>
      <text:p text:style-name="P17">package dto</text:p>
      <text:p text:style-name="P17"/>
      <text:p text:style-name="P17">type BookingInitResponse struct {</text:p>
      <text:p text:style-name="P17"><text:tab/>Pets <text:s text:c="4"/>[]PetBriefDTO `json:"pets"`</text:p>
      <text:p text:style-name="P17"><text:soft-page-break/><text:tab/>Doctors <text:s/>[]DoctorDTO <text:s text:c="2"/>`json:"doctors"`</text:p>
      <text:p text:style-name="P17"><text:tab/>Services []ServiceDTO <text:s/>`json:"services"`</text:p>
      <text:p text:style-name="P17">}</text:p>
      <text:p text:style-name="P17"/>
      <text:p text:style-name="P17">type DoctorDTO struct {</text:p>
      <text:p text:style-name="P17"><text:tab/>ID <text:s text:c="12"/>uint <text:s text:c="2"/>`json:"doctorId"`</text:p>
      <text:p text:style-name="P17"><text:tab/>FirstName <text:s text:c="5"/>string `json:"firstName"`</text:p>
      <text:p text:style-name="P17"><text:tab/>LastName <text:s text:c="6"/>string `json:"lastName"`</text:p>
      <text:p text:style-name="P17"><text:tab/>Specialization string `json:"specialization"`</text:p>
      <text:p text:style-name="P17">}</text:p>
      <text:p text:style-name="P17"/>
      <text:p text:style-name="P17">type ServiceDTO struct {</text:p>
      <text:p text:style-name="P17"><text:tab/>ID <text:s text:c="3"/>uint <text:s text:c="2"/>`json:"id"`</text:p>
      <text:p text:style-name="P17"><text:tab/>Name <text:s/>string `json:"name"`</text:p>
      <text:p text:style-name="P17"><text:tab/>Price uint <text:s text:c="2"/>`json:"price"`</text:p>
      <text:p text:style-name="P17">}</text:p>
      <text:p text:style-name="P17"/>
      <text:p text:style-name="P17">type CreateAppointmentRequest struct {</text:p>
      <text:p text:style-name="P17"><text:tab/>PetID <text:s text:c="6"/>uint <text:s text:c="2"/>`json:"pet_id" binding:"required"`</text:p>
      <text:p text:style-name="P17"><text:tab/>DoctorID <text:s text:c="3"/>uint <text:s text:c="2"/>`json:"doctor_id" binding:"required"`</text:p>
      <text:p text:style-name="P17"><text:soft-page-break/><text:tab/>ServiceID <text:s text:c="2"/>*uint <text:s/>`json:"service_id"`</text:p>
      <text:p text:style-name="P17"><text:tab/>ScheduledAt string `json:"scheduled_at" binding:"required"` // "2024-05-20T09:00:00"</text:p>
      <text:p text:style-name="P17"><text:tab/>Comment <text:s text:c="4"/>string `json:"comment"`</text:p>
      <text:p text:style-name="P17">}</text:p>
      <text:p text:style-name="P18"><text:span text:style-name="Source_20_Text"><text:span text:style-name="T2">dto/doctor_dto.go</text:span></text:span></text:p>
      <text:p text:style-name="P17">package dto</text:p>
      <text:p text:style-name="P17"/>
      <text:p text:style-name="P17">type DoctorScheduleDTO struct {</text:p>
      <text:p text:style-name="P17"><text:tab/>ID <text:s text:c="7"/>uint <text:s text:c="2"/>`json:"id"`</text:p>
      <text:p text:style-name="P17"><text:tab/>Time <text:s text:c="5"/>string `json:"time"`</text:p>
      <text:p text:style-name="P17"><text:tab/>Date <text:s text:c="5"/>string `json:"date"`</text:p>
      <text:p text:style-name="P17"><text:tab/>PetName <text:s text:c="2"/>string `json:"petName"`</text:p>
      <text:p text:style-name="P17"><text:tab/>OwnerName string `json:"ownerName"`</text:p>
      <text:p text:style-name="P17"><text:tab/>Service <text:s text:c="2"/>string `json:"service"`</text:p>
      <text:p text:style-name="P17"><text:tab/>Status <text:s text:c="3"/>string `json:"status"`</text:p>
      <text:p text:style-name="P17">}</text:p>
      <text:p text:style-name="P17"/>
      <text:p text:style-name="P17">type CompleteVisitRequest struct {</text:p>
      <text:p text:style-name="P17"><text:tab/>Weight <text:s text:c="6"/>float64 `json:"weight" binding:"required"`</text:p>
      <text:p text:style-name="P17"><text:tab/>DiagnosisIDs []uint <text:s/>`json:"diagnosis_ids" binding:"required"`</text:p>
      <text:p text:style-name="P17"><text:soft-page-break/><text:tab/>Treatment <text:s text:c="3"/>string <text:s/>`json:"treatment"`</text:p>
      <text:p text:style-name="P17"><text:tab/>Medications <text:s/>string <text:s/>`json:"medications"`</text:p>
      <text:p text:style-name="P17">}</text:p>
      <text:p text:style-name="P17"/>
      <text:p text:style-name="P17">type PatientDTO struct {</text:p>
      <text:p text:style-name="P17"><text:tab/>ID <text:s text:c="7"/>uint <text:s text:c="2"/>`json:"id"`</text:p>
      <text:p text:style-name="P17"><text:tab/>FullName <text:s/>string `json:"fullName"`</text:p>
      <text:p text:style-name="P17"><text:tab/>Phone <text:s text:c="4"/>string `json:"phone"`</text:p>
      <text:p text:style-name="P17"><text:tab/>Email <text:s text:c="4"/>string `json:"email"`</text:p>
      <text:p text:style-name="P17"><text:tab/>PetsCount int <text:s text:c="3"/>`json:"petsCount"`</text:p>
      <text:p text:style-name="P17"><text:tab/>LastVisit string `json:"lastVisit"`</text:p>
      <text:p text:style-name="P17">}</text:p>
      <text:p text:style-name="P17"/>
      <text:p text:style-name="P17">type PetHistoryDTO struct {</text:p>
      <text:p text:style-name="P17"><text:tab/>PetName string <text:s text:c="12"/>`json:"petName"`</text:p>
      <text:p text:style-name="P17"><text:tab/>PetIcon string <text:s text:c="12"/>`json:"petIcon"`</text:p>
      <text:p text:style-name="P17"><text:tab/>Visits <text:s/>[]VisitTimelineDTO `json:"visits"`</text:p>
      <text:p text:style-name="P17">}</text:p>
      <text:p text:style-name="P17"/>
      <text:p text:style-name="P17">type VisitTimelineDTO struct {</text:p>
      <text:p text:style-name="P17"><text:soft-page-break/><text:tab/>ID <text:s text:c="7"/>uint <text:s text:c="10"/>`json:"id"`</text:p>
      <text:p text:style-name="P17"><text:tab/>Date <text:s text:c="5"/>string <text:s text:c="8"/>`json:"date"`</text:p>
      <text:p text:style-name="P17"><text:tab/>Diagnoses []DiagnosisDTO `json:"diagnoses"`</text:p>
      <text:p text:style-name="P17"><text:tab/>Treatment string <text:s text:c="8"/>`json:"treatment"`</text:p>
      <text:p text:style-name="P17">}</text:p>
      <text:p text:style-name="P18"><text:span text:style-name="Source_20_Text"><text:span text:style-name="T2">dto/diagnosis_dto.go</text:span></text:span></text:p>
      <text:p text:style-name="P17">package dto</text:p>
      <text:p text:style-name="P17"/>
      <text:p text:style-name="P17">type DiagnosisDTO struct {</text:p>
      <text:p text:style-name="P17"><text:tab/>ID <text:s text:c="2"/>uint <text:s text:c="2"/>`json:"id"`</text:p>
      <text:p text:style-name="P17"><text:tab/>Name string `json:"name"`</text:p>
      <text:p text:style-name="P17">}</text:p>
      <text:p text:style-name="P9"><text:span text:style-name="Emphasis"><text:span text:style-name="T1">internal/handler</text:span></text:span></text:p>
      <text:p text:style-name="P9"><text:span text:style-name="Source_20_Text"><text:span text:style-name="T1">handler/booking_handler.go</text:span></text:span></text:p>
      <text:p text:style-name="P17">package handler</text:p>
      <text:p text:style-name="P17"/>
      <text:p text:style-name="P17">import (</text:p>
      <text:p text:style-name="P17"><text:tab/>"api/internal/dto"</text:p>
      <text:p text:style-name="P17"><text:tab/>"api/internal/service"</text:p>
      <text:p text:style-name="P17"><text:tab/>"net/http"</text:p>
      <text:p text:style-name="P17"><text:soft-page-break/><text:tab/>"strconv"</text:p>
      <text:p text:style-name="P17"/>
      <text:p text:style-name="P17"><text:tab/>"github.com/gin-gonic/gin"</text:p>
      <text:p text:style-name="P17">)</text:p>
      <text:p text:style-name="P17"/>
      <text:p text:style-name="P17">type BookingHandler struct {</text:p>
      <text:p text:style-name="P17"><text:tab/>svc service.BookingService</text:p>
      <text:p text:style-name="P17">}</text:p>
      <text:p text:style-name="P17"/>
      <text:p text:style-name="P17">func NewBookingHandler(svc service.BookingService) *BookingHandler {</text:p>
      <text:p text:style-name="P17"><text:tab/>return &amp;BookingHandler{svc}</text:p>
      <text:p text:style-name="P17">}</text:p>
      <text:p text:style-name="P17"/>
      <text:p text:style-name="P17">// GetInit godoc</text:p>
      <text:p text:style-name="P17">// @Summary <text:s text:c="5"/>Инициализация формы записи</text:p>
      <text:p text:style-name="P17">// @Description <text:s/>Получает списки питомцев, врачей и услуг</text:p>
      <text:p text:style-name="P17">// @Tags <text:s text:c="8"/>booking</text:p>
      <text:p text:style-name="P17">// @Security <text:s text:c="4"/>ApiKeyAuth</text:p>
      <text:p text:style-name="P17">// @Produce <text:s text:c="5"/>json</text:p>
      <text:p text:style-name="P17">// @Param <text:s text:c="7"/>userId <text:s/>path <text:s text:c="5"/>int <text:s/>true <text:s/>"ID пользователя"</text:p>
      <text:p text:style-name="P17"><text:soft-page-break/>// @Success <text:s text:c="5"/>200 <text:s text:c="4"/>{object} <text:s/>dto.BookingInitResponse</text:p>
      <text:p text:style-name="P17">// @Router <text:s text:c="6"/>/book/init/{userId} [get]</text:p>
      <text:p text:style-name="P17">func (h *BookingHandler) GetInit(c *gin.Context) {</text:p>
      <text:p text:style-name="P17"><text:tab/>uid, _ := strconv.ParseUint(c.Param("userId"), 10, 32)</text:p>
      <text:p text:style-name="P17"><text:tab/>data, _ := h.svc.GetInitData(uint(uid))</text:p>
      <text:p text:style-name="P17"><text:tab/>c.JSON(http.StatusOK, data)</text:p>
      <text:p text:style-name="P17">}</text:p>
      <text:p text:style-name="P17"/>
      <text:p text:style-name="P17">// GetBusySlots godoc</text:p>
      <text:p text:style-name="P17">// @Summary <text:s text:c="5"/>Получение занятых слотов</text:p>
      <text:p text:style-name="P17">// @Description <text:s/>Возвращает список времени, на которое уже есть запись у врача</text:p>
      <text:p text:style-name="P17">// @Tags <text:s text:c="8"/>booking</text:p>
      <text:p text:style-name="P17">// @Security <text:s text:c="4"/>ApiKeyAuth</text:p>
      <text:p text:style-name="P17">// @Produce <text:s text:c="5"/>json</text:p>
      <text:p text:style-name="P17">// @Param <text:s text:c="7"/>doctor_id <text:s/>query <text:s text:c="4"/>int <text:s text:c="4"/>true <text:s/>"ID врача"</text:p>
      <text:p text:style-name="P17">// @Param <text:s text:c="7"/>date <text:s text:c="6"/>query <text:s text:c="4"/>string <text:s/>true <text:s/>"Дата (YYYY-MM-DD)"</text:p>
      <text:p text:style-name="P17">// @Success <text:s text:c="5"/>200 <text:s text:c="7"/>{array} <text:s text:c="2"/>string</text:p>
      <text:p text:style-name="P17">// @Router <text:s text:c="6"/>/appointments/busy-slots [get]</text:p>
      <text:p text:style-name="P17">func (h *BookingHandler) GetBusySlots(c *gin.Context) {</text:p>
      <text:p text:style-name="P17"><text:tab/>did, _ := strconv.ParseUint(c.Query("doctor_id"), 10, 32)</text:p>
      <text:p text:style-name="P17"><text:soft-page-break/><text:tab/>date := c.Query("date") // "2024-05-20"</text:p>
      <text:p text:style-name="P17"><text:tab/>slots, _ := h.svc.GetBusySlots(uint(did), date)</text:p>
      <text:p text:style-name="P17"><text:tab/>c.JSON(http.StatusOK, slots)</text:p>
      <text:p text:style-name="P17">}</text:p>
      <text:p text:style-name="P17"/>
      <text:p text:style-name="P17">// Create godoc</text:p>
      <text:p text:style-name="P17">// @Summary <text:s text:c="5"/>Создание записи на прием</text:p>
      <text:p text:style-name="P17">// @Description <text:s/>Бронирует визит к врачу</text:p>
      <text:p text:style-name="P17">// @Tags <text:s text:c="8"/>booking</text:p>
      <text:p text:style-name="P17">// @Security <text:s text:c="4"/>ApiKeyAuth</text:p>
      <text:p text:style-name="P17">// @Accept <text:s text:c="6"/>json</text:p>
      <text:p text:style-name="P17">// @Produce <text:s text:c="5"/>json</text:p>
      <text:p text:style-name="P17">// @Param <text:s text:c="7"/>request <text:s/>body <text:s text:c="5"/>dto.CreateAppointmentRequest <text:s/>true <text:s/>"Данные записи"</text:p>
      <text:p text:style-name="P17">// @Success <text:s text:c="5"/>201 <text:s text:c="5"/>{object} <text:s/>map[string]bool</text:p>
      <text:p text:style-name="P17">// @Router <text:s text:c="6"/>/appointments [post]</text:p>
      <text:p text:style-name="P17">func (h *BookingHandler) Create(c *gin.Context) {</text:p>
      <text:p text:style-name="P17"><text:tab/>var req dto.CreateAppointmentRequest</text:p>
      <text:p text:style-name="P17"><text:tab/>if err := c.ShouldBindJSON(&amp;req); err != nil {</text:p>
      <text:p text:style-name="P17"><text:tab/><text:tab/>c.JSON(http.StatusBadRequest, gin.H{"error": err.Error()})</text:p>
      <text:p text:style-name="P17"><text:tab/><text:tab/>return</text:p>
      <text:p text:style-name="P17"><text:soft-page-break/><text:tab/>}</text:p>
      <text:p text:style-name="P17"/>
      <text:p text:style-name="P17"><text:tab/>clientID := c.GetUint("userID")</text:p>
      <text:p text:style-name="P17"/>
      <text:p text:style-name="P17"><text:tab/>if err := h.svc.CreateAppointment(clientID, req); err != nil {</text:p>
      <text:p text:style-name="P17"><text:tab/><text:tab/>c.JSON(http.StatusInternalServerError, gin.H{"error": err.Error()})</text:p>
      <text:p text:style-name="P17"><text:tab/><text:tab/>return</text:p>
      <text:p text:style-name="P17"><text:tab/>}</text:p>
      <text:p text:style-name="P17"><text:tab/>c.JSON(http.StatusCreated, gin.H{"success": true})</text:p>
      <text:p text:style-name="P17">}</text:p>
      <text:p text:style-name="P17"/>
      <text:p text:style-name="P17">// GetHistory godoc</text:p>
      <text:p text:style-name="P17">// @Summary <text:s text:c="5"/>История визитов клиента</text:p>
      <text:p text:style-name="P17">// @Tags <text:s text:c="8"/>booking</text:p>
      <text:p text:style-name="P17">// @Security <text:s text:c="4"/>ApiKeyAuth</text:p>
      <text:p text:style-name="P17">// @Produce <text:s text:c="5"/>json</text:p>
      <text:p text:style-name="P17">// @Param <text:s text:c="7"/>userId <text:s/>path <text:s text:c="5"/>int <text:s/>true <text:s/>"ID пользователя"</text:p>
      <text:p text:style-name="P17">// @Success <text:s text:c="5"/>200 <text:s text:c="4"/>{array} <text:s text:c="2"/>dto.RecentAppointmentDTO</text:p>
      <text:p text:style-name="P17">// @Router <text:s text:c="6"/>/appointments/client/{userId} [get]</text:p>
      <text:p text:style-name="P17">func (h *BookingHandler) GetHistory(c *gin.Context) {</text:p>
      <text:p text:style-name="P17"><text:soft-page-break/><text:tab/>uid, _ := strconv.ParseUint(c.Param("userId"), 10, 32)</text:p>
      <text:p text:style-name="P17"><text:tab/>history, err := h.svc.GetClientHistory(uint(uid))</text:p>
      <text:p text:style-name="P17"><text:tab/>if err != nil {</text:p>
      <text:p text:style-name="P17"><text:tab/><text:tab/>c.JSON(http.StatusInternalServerError, gin.H{"error": err.Error()})</text:p>
      <text:p text:style-name="P17"><text:tab/><text:tab/>return</text:p>
      <text:p text:style-name="P17"><text:tab/>}</text:p>
      <text:p text:style-name="P17"><text:tab/>c.JSON(http.StatusOK, history)</text:p>
      <text:p text:style-name="P17">}</text:p>
      <text:p text:style-name="P18"><text:span text:style-name="Source_20_Text"><text:span text:style-name="T2">handler/doctor_handler.go</text:span></text:span></text:p>
      <text:p text:style-name="P17">package handler</text:p>
      <text:p text:style-name="P17"/>
      <text:p text:style-name="P17">import (</text:p>
      <text:p text:style-name="P17"><text:tab/>"api/internal/dto"</text:p>
      <text:p text:style-name="P17"><text:tab/>"api/internal/service"</text:p>
      <text:p text:style-name="P17"><text:tab/>"net/http"</text:p>
      <text:p text:style-name="P17"><text:tab/>"strconv"</text:p>
      <text:p text:style-name="P17"/>
      <text:p text:style-name="P17"><text:tab/>"github.com/gin-gonic/gin"</text:p>
      <text:p text:style-name="P17">)</text:p>
      <text:p text:style-name="P17"/>
      <text:p text:style-name="P17"><text:soft-page-break/>type DoctorHandler struct {</text:p>
      <text:p text:style-name="P17"><text:tab/>svc service.DoctorService</text:p>
      <text:p text:style-name="P17">}</text:p>
      <text:p text:style-name="P17"/>
      <text:p text:style-name="P17">func NewDoctorHandler(svc service.DoctorService) *DoctorHandler {</text:p>
      <text:p text:style-name="P17"><text:tab/>return &amp;DoctorHandler{svc}</text:p>
      <text:p text:style-name="P17">}</text:p>
      <text:p text:style-name="P17"/>
      <text:p text:style-name="P17">// GetSchedule godoc</text:p>
      <text:p text:style-name="P17">// @Summary <text:s text:c="5"/>Расписание врача</text:p>
      <text:p text:style-name="P17">// @Description <text:s/>Список всех записей к конкретному врачу</text:p>
      <text:p text:style-name="P17">// @Tags <text:s text:c="8"/>doctor</text:p>
      <text:p text:style-name="P17">// @Security <text:s text:c="4"/>ApiKeyAuth</text:p>
      <text:p text:style-name="P17">// @Produce <text:s text:c="5"/>json</text:p>
      <text:p text:style-name="P17">// @Param <text:s text:c="7"/>doctor_id <text:s/>query <text:s text:c="4"/>int <text:s/>true <text:s/>"ID врача"</text:p>
      <text:p text:style-name="P17">// @Success <text:s text:c="5"/>200 <text:s text:c="7"/>{array} <text:s text:c="2"/>dto.DoctorScheduleDTO</text:p>
      <text:p text:style-name="P17">// @Router <text:s text:c="6"/>/doctor/schedule [get]</text:p>
      <text:p text:style-name="P17">func (h *DoctorHandler) GetSchedule(c *gin.Context) {</text:p>
      <text:p text:style-name="P17"><text:tab/>did, _ := strconv.ParseUint(c.Query("doctor_id"), 10, 32)</text:p>
      <text:p text:style-name="P17"><text:tab/>c.JSON(http.StatusOK, h.svc.GetSchedule(uint(did)))</text:p>
      <text:p text:style-name="P17"><text:soft-page-break/>}</text:p>
      <text:p text:style-name="P17"/>
      <text:p text:style-name="P17">// CompleteVisit godoc</text:p>
      <text:p text:style-name="P17">// @Summary <text:s text:c="5"/>Завершение приема</text:p>
      <text:p text:style-name="P17">// @Description <text:s/>Закрывает визит и сохраняет медицинский протокол (диагноз, вес, лечение)</text:p>
      <text:p text:style-name="P17">// @Tags <text:s text:c="8"/>doctor</text:p>
      <text:p text:style-name="P17">// @Security <text:s text:c="4"/>ApiKeyAuth</text:p>
      <text:p text:style-name="P17">// @Accept <text:s text:c="6"/>json</text:p>
      <text:p text:style-name="P17">// @Produce <text:s text:c="5"/>json</text:p>
      <text:p text:style-name="P17">// @Param <text:s text:c="7"/>id <text:s text:c="6"/>path <text:s text:c="5"/>int <text:s text:c="22"/>true <text:s/>"ID записи"</text:p>
      <text:p text:style-name="P17">// @Param <text:s text:c="7"/>request <text:s/>body <text:s text:c="5"/>dto.CompleteVisitRequest <text:s/>true <text:s/>"Данные осмотра"</text:p>
      <text:p text:style-name="P17">// @Success <text:s text:c="5"/>200 <text:s text:c="5"/>{object} <text:s/>map[string]bool</text:p>
      <text:p text:style-name="P17">// @Router <text:s text:c="6"/>/appointments/{id}/complete [patch]</text:p>
      <text:p text:style-name="P17">func (h *DoctorHandler) CompleteVisit(c *gin.Context) {</text:p>
      <text:p text:style-name="P17"><text:tab/>aid, _ := strconv.ParseUint(c.Param("id"), 10, 32)</text:p>
      <text:p text:style-name="P17"><text:tab/>var req dto.CompleteVisitRequest</text:p>
      <text:p text:style-name="P17"><text:tab/>if err := c.ShouldBindJSON(&amp;req); err != nil {</text:p>
      <text:p text:style-name="P17"><text:tab/><text:tab/>c.JSON(http.StatusBadRequest, gin.H{"error": err.Error()})</text:p>
      <text:p text:style-name="P17"><text:tab/><text:tab/>return</text:p>
      <text:p text:style-name="P17"><text:tab/>}</text:p>
      <text:p text:style-name="P17"><text:soft-page-break/><text:tab/>h.svc.CompleteVisit(uint(aid), req)</text:p>
      <text:p text:style-name="P17"><text:tab/>c.JSON(http.StatusOK, gin.H{"success": true})</text:p>
      <text:p text:style-name="P17">}</text:p>
      <text:p text:style-name="P17"/>
      <text:p text:style-name="P17">// GetPatients godoc</text:p>
      <text:p text:style-name="P17">// @Summary <text:s text:c="5"/>Search patients</text:p>
      <text:p text:style-name="P17">// @Description <text:s/>Search for clients by name or phone</text:p>
      <text:p text:style-name="P17">// @Tags <text:s text:c="8"/>doctor</text:p>
      <text:p text:style-name="P17">// @Security <text:s text:c="4"/>ApiKeyAuth</text:p>
      <text:p text:style-name="P17">// @Produce <text:s text:c="5"/>json</text:p>
      <text:p text:style-name="P17">// @Param <text:s text:c="7"/>search <text:s/>query <text:s text:c="4"/>string <text:s/>false <text:s/>"Search query"</text:p>
      <text:p text:style-name="P17">// @Success <text:s text:c="5"/>200 <text:s text:c="4"/>{array} <text:s text:c="2"/>dto.PatientDTO</text:p>
      <text:p text:style-name="P17">// @Router <text:s text:c="6"/>/doctor/patients [get]</text:p>
      <text:p text:style-name="P17">func (h *DoctorHandler) GetPatients(c *gin.Context) {</text:p>
      <text:p text:style-name="P17"><text:tab/>search := c.Query("search")</text:p>
      <text:p text:style-name="P17"><text:tab/>c.JSON(http.StatusOK, h.svc.GetPatients(search))</text:p>
      <text:p text:style-name="P17">}</text:p>
      <text:p text:style-name="P17"/>
      <text:p text:style-name="P17">// GetHistory godoc</text:p>
      <text:p text:style-name="P17">// @Summary <text:s text:c="5"/>Медицинская история клиента</text:p>
      <text:p text:style-name="P17"><text:soft-page-break/>// @Description <text:s/>Получает историю всех визитов всех питомцев конкретного клиента</text:p>
      <text:p text:style-name="P17">// @Tags <text:s text:c="8"/>doctor</text:p>
      <text:p text:style-name="P17">// @Security <text:s text:c="4"/>ApiKeyAuth</text:p>
      <text:p text:style-name="P17">// @Produce <text:s text:c="5"/>json</text:p>
      <text:p text:style-name="P17">// @Param <text:s text:c="7"/>id <text:s text:c="2"/>path <text:s text:c="5"/>int <text:s/>true <text:s/>"ID клиента"</text:p>
      <text:p text:style-name="P17">// @Success <text:s text:c="5"/>200 <text:s/>{array} <text:s text:c="2"/>dto.PetHistoryDTO</text:p>
      <text:p text:style-name="P17">// @Router <text:s text:c="6"/>/doctor/patients/{id}/history [get]</text:p>
      <text:p text:style-name="P17">func (h *DoctorHandler) GetHistory(c *gin.Context) {</text:p>
      <text:p text:style-name="P17"><text:tab/>cid, _ := strconv.ParseUint(c.Param("id"), 10, 32)</text:p>
      <text:p text:style-name="P17"><text:tab/>c.JSON(http.StatusOK, h.svc.GetMedicalHistory(uint(cid)))</text:p>
      <text:p text:style-name="P17">}</text:p>
      <text:p text:style-name="P17"/>
      <text:p text:style-name="P17">// UpdateStatus godoc</text:p>
      <text:p text:style-name="P17">// @Summary <text:s text:c="5"/>Изменить статус записи</text:p>
      <text:p text:style-name="P17">// @Description <text:s/>Принять (confirmed) или отклонить (rejected) запись</text:p>
      <text:p text:style-name="P17">// @Tags <text:s text:c="8"/>doctor</text:p>
      <text:p text:style-name="P17">// @Security <text:s text:c="4"/>ApiKeyAuth</text:p>
      <text:p text:style-name="P17">// @Accept <text:s text:c="6"/>json</text:p>
      <text:p text:style-name="P17">// @Produce <text:s text:c="5"/>json</text:p>
      <text:p text:style-name="P17">// @Param <text:s text:c="7"/>id <text:s text:c="6"/>path <text:s text:c="5"/>int <text:s text:c="4"/>true <text:s/>"ID записи"</text:p>
      <text:p text:style-name="P17"><text:soft-page-break/>// @Param <text:s text:c="7"/>request <text:s/>body <text:s text:c="5"/>object{status=string} <text:s/>true <text:s/>"Новый статус"</text:p>
      <text:p text:style-name="P17">// @Success <text:s text:c="5"/>200 <text:s text:c="5"/>{object} <text:s/>map[string]bool</text:p>
      <text:p text:style-name="P17">// @Router <text:s text:c="6"/>/appointments/{id}/status [patch]</text:p>
      <text:p text:style-name="P17">func (h *DoctorHandler) UpdateStatus(c *gin.Context) {</text:p>
      <text:p text:style-name="P17"><text:tab/>id, err := strconv.ParseUint(c.Param("id"), 10, 32)</text:p>
      <text:p text:style-name="P17"><text:tab/>if err != nil {</text:p>
      <text:p text:style-name="P17"><text:tab/><text:tab/>c.JSON(http.StatusBadRequest, gin.H{"error": "Некорректный ID записи"})</text:p>
      <text:p text:style-name="P17"><text:tab/><text:tab/>return</text:p>
      <text:p text:style-name="P17"><text:tab/>}</text:p>
      <text:p text:style-name="P17"/>
      <text:p text:style-name="P17"><text:tab/>var req struct {</text:p>
      <text:p text:style-name="P17"><text:tab/><text:tab/>Status string `json:"status" binding:"required"`</text:p>
      <text:p text:style-name="P17"><text:tab/>}</text:p>
      <text:p text:style-name="P17"><text:tab/>if err := c.ShouldBindJSON(&amp;req); err != nil {</text:p>
      <text:p text:style-name="P17"><text:tab/><text:tab/>c.JSON(http.StatusBadRequest, gin.H{"error": "Поле status обязательно"})</text:p>
      <text:p text:style-name="P17"><text:tab/><text:tab/>return</text:p>
      <text:p text:style-name="P17"><text:tab/>}</text:p>
      <text:p text:style-name="P17"/>
      <text:p text:style-name="P17"><text:tab/>if err := h.svc.UpdateStatus(uint(id), req.Status); err != nil {</text:p>
      <text:p text:style-name="P17"><text:soft-page-break/><text:tab/><text:tab/>c.JSON(http.StatusInternalServerError, gin.H{"error": "Не удалось обновить статус"})</text:p>
      <text:p text:style-name="P17"><text:tab/><text:tab/>return</text:p>
      <text:p text:style-name="P17"><text:tab/>}</text:p>
      <text:p text:style-name="P17"/>
      <text:p text:style-name="P17"><text:tab/>c.JSON(http.StatusOK, gin.H{"success": true})</text:p>
      <text:p text:style-name="P17">}</text:p>
      <text:p text:style-name="P18"><text:span text:style-name="Source_20_Text"><text:span text:style-name="T2">handler/diagnosis_handler.go</text:span></text:span></text:p>
      <text:p text:style-name="P17">package handler</text:p>
      <text:p text:style-name="P17"/>
      <text:p text:style-name="P17">import (</text:p>
      <text:p text:style-name="P17"><text:tab/>"api/internal/service"</text:p>
      <text:p text:style-name="P17"><text:tab/>"net/http"</text:p>
      <text:p text:style-name="P17"/>
      <text:p text:style-name="P17"><text:tab/>"github.com/gin-gonic/gin"</text:p>
      <text:p text:style-name="P17">)</text:p>
      <text:p text:style-name="P17"/>
      <text:p text:style-name="P17">type DiagnosisHandler struct {</text:p>
      <text:p text:style-name="P17"><text:tab/>svc service.DiagnosisService</text:p>
      <text:p text:style-name="P17">}</text:p>
      <text:p text:style-name="P17"/>
      <text:p text:style-name="P17"><text:soft-page-break/>func NewDiagnosisHandler(svc service.DiagnosisService) *DiagnosisHandler {</text:p>
      <text:p text:style-name="P17"><text:tab/>return &amp;DiagnosisHandler{svc}</text:p>
      <text:p text:style-name="P17">}</text:p>
      <text:p text:style-name="P17"/>
      <text:p text:style-name="P17">// GetAll godoc</text:p>
      <text:p text:style-name="P17">// @Summary <text:s text:c="5"/>Список диагнозов</text:p>
      <text:p text:style-name="P17">// @Description <text:s/>Возвращает справочник диагнозов для выбора врачом</text:p>
      <text:p text:style-name="P17">// @Tags <text:s text:c="8"/>diagnosis</text:p>
      <text:p text:style-name="P17">// @Security <text:s text:c="4"/>ApiKeyAuth</text:p>
      <text:p text:style-name="P17">// @Produce <text:s text:c="5"/>json</text:p>
      <text:p text:style-name="P17">// @Success <text:s text:c="5"/>200 <text:s/>{array} <text:s/>dto.DiagnosisDTO</text:p>
      <text:p text:style-name="P17">// @Router <text:s text:c="6"/>/diagnoses [get]</text:p>
      <text:p text:style-name="P17">func (h *DiagnosisHandler) GetAll(c *gin.Context) {</text:p>
      <text:p text:style-name="P17"><text:tab/>diagnoses, err := h.svc.GetAll()</text:p>
      <text:p text:style-name="P17"><text:tab/>if err != nil {</text:p>
      <text:p text:style-name="P17"><text:tab/><text:tab/>c.JSON(http.StatusInternalServerError, gin.H{"error": err.Error()})</text:p>
      <text:p text:style-name="P17"><text:tab/><text:tab/>return</text:p>
      <text:p text:style-name="P17"><text:tab/>}</text:p>
      <text:p text:style-name="P17"><text:tab/>c.JSON(http.StatusOK, diagnoses)</text:p>
      <text:p text:style-name="P17">}</text:p>
      <text:p text:style-name="P9"><text:soft-page-break/><text:span text:style-name="Emphasis"><text:span text:style-name="T1">internal/middleware</text:span></text:span></text:p>
      <text:p text:style-name="P9"><text:span text:style-name="Source_20_Text"><text:span text:style-name="T1">middleware/auth.go</text:span></text:span></text:p>
      <text:p text:style-name="P17">package middleware</text:p>
      <text:p text:style-name="P17"/>
      <text:p text:style-name="P17">import (</text:p>
      <text:p text:style-name="P17"><text:tab/>"net/http"</text:p>
      <text:p text:style-name="P17"><text:tab/>"strings"</text:p>
      <text:p text:style-name="P17"/>
      <text:p text:style-name="P17"><text:tab/>"github.com/gin-gonic/gin"</text:p>
      <text:p text:style-name="P17"><text:tab/>"github.com/golang-jwt/jwt/v5"</text:p>
      <text:p text:style-name="P17">)</text:p>
      <text:p text:style-name="P17"/>
      <text:p text:style-name="P17">var jwtSecret = []byte("super-secret-key")</text:p>
      <text:p text:style-name="P17"/>
      <text:p text:style-name="P17">func AuthMiddleware() gin.HandlerFunc {</text:p>
      <text:p text:style-name="P17"><text:tab/>return func(c *gin.Context) {</text:p>
      <text:p text:style-name="P17"><text:tab/><text:tab/>header := c.GetHeader("Authorization")</text:p>
      <text:p text:style-name="P17"><text:tab/><text:tab/>if !strings.HasPrefix(header, "Bearer ") {</text:p>
      <text:p text:style-name="P17"><text:tab/><text:tab/><text:tab/>c.JSON(http.StatusUnauthorized, gin.H{"error": "Нет токена"})</text:p>
      <text:p text:style-name="P17"><text:tab/><text:tab/><text:tab/>c.Abort()</text:p>
      <text:p text:style-name="P17"><text:soft-page-break/><text:tab/><text:tab/><text:tab/>return</text:p>
      <text:p text:style-name="P17"><text:tab/><text:tab/>}</text:p>
      <text:p text:style-name="P17"/>
      <text:p text:style-name="P17"><text:tab/><text:tab/>tokenStr := strings.TrimPrefix(header, "Bearer ")</text:p>
      <text:p text:style-name="P17"><text:tab/><text:tab/>token, err := jwt.Parse(tokenStr, func(t *jwt.Token) (interface{}, error) {</text:p>
      <text:p text:style-name="P17"><text:tab/><text:tab/><text:tab/>return jwtSecret, nil</text:p>
      <text:p text:style-name="P17"><text:tab/><text:tab/>})</text:p>
      <text:p text:style-name="P17"><text:tab/><text:tab/>if err != nil || !token.Valid {</text:p>
      <text:p text:style-name="P17"><text:tab/><text:tab/><text:tab/>c.JSON(http.StatusUnauthorized, gin.H{"error": "Неверный токен"})</text:p>
      <text:p text:style-name="P17"><text:tab/><text:tab/><text:tab/>c.Abort()</text:p>
      <text:p text:style-name="P17"><text:tab/><text:tab/><text:tab/>return</text:p>
      <text:p text:style-name="P17"><text:tab/><text:tab/>}</text:p>
      <text:p text:style-name="P17"/>
      <text:p text:style-name="P17"><text:tab/><text:tab/>claims := token.Claims.(jwt.MapClaims)</text:p>
      <text:p text:style-name="P17"><text:tab/><text:tab/>userID := uint(claims["sub"].(float64))</text:p>
      <text:p text:style-name="P17"><text:tab/><text:tab/>c.Set("userID", userID)</text:p>
      <text:p text:style-name="P17"><text:tab/><text:tab/>c.Next()</text:p>
      <text:p text:style-name="P17"><text:tab/>}</text:p>
      <text:p text:style-name="P17">}</text:p>
      <text:p text:style-name="P9"><text:span text:style-name="Emphasis"><text:span text:style-name="T1">utils</text:span></text:span></text:p>
      <text:p text:style-name="P9"><text:soft-page-break/><text:span text:style-name="Source_20_Text"><text:span text:style-name="T1">utils/database.go</text:span></text:span></text:p>
      <text:p text:style-name="P17">package database</text:p>
      <text:p text:style-name="P17"/>
      <text:p text:style-name="P17">import (</text:p>
      <text:p text:style-name="P17"><text:tab/>"api/internal/models"</text:p>
      <text:p text:style-name="P17"><text:tab/>"fmt"</text:p>
      <text:p text:style-name="P17"><text:tab/>"log"</text:p>
      <text:p text:style-name="P17"/>
      <text:p text:style-name="P17"><text:tab/>"gorm.io/driver/mysql"</text:p>
      <text:p text:style-name="P17"><text:tab/>"gorm.io/gorm"</text:p>
      <text:p text:style-name="P17">)</text:p>
      <text:p text:style-name="P17"/>
      <text:p text:style-name="P17">func InitDB() *gorm.DB {</text:p>
      <text:p text:style-name="P17"><text:tab/>user := "root"</text:p>
      <text:p text:style-name="P17"><text:tab/>pass := "password"</text:p>
      <text:p text:style-name="P17"><text:tab/>host := "127.0.0.1"</text:p>
      <text:p text:style-name="P17"><text:tab/>port := "3306"</text:p>
      <text:p text:style-name="P17"><text:tab/>dbName := "vet_clinic"</text:p>
      <text:p text:style-name="P17"/>
      <text:p text:style-name="P17"><text:tab/>dsn := fmt.Sprintf("%s:%s@tcp(%s:%s)/%s?charset=utf8mb4&amp;parseTime=True&amp;loc=Local",</text:p>
      <text:p text:style-name="P17"><text:soft-page-break/><text:tab/><text:tab/>user, pass, host, port, dbName)</text:p>
      <text:p text:style-name="P17"/>
      <text:p text:style-name="P17"><text:tab/>db, err := gorm.Open(mysql.Open(dsn), &amp;gorm.Config{})</text:p>
      <text:p text:style-name="P17"><text:tab/>if err != nil {</text:p>
      <text:p text:style-name="P17"><text:tab/><text:tab/>log.Fatal("Ошибка подключения к базе: ", err)</text:p>
      <text:p text:style-name="P17"><text:tab/>}</text:p>
      <text:p text:style-name="P17"/>
      <text:p text:style-name="P17"><text:tab/>db.AutoMigrate(</text:p>
      <text:p text:style-name="P17"><text:tab/><text:tab/>&amp;models.User{},</text:p>
      <text:p text:style-name="P17"><text:tab/><text:tab/>&amp;models.Pet{},</text:p>
      <text:p text:style-name="P17"><text:tab/><text:tab/>&amp;models.Service{},</text:p>
      <text:p text:style-name="P17"><text:tab/><text:tab/>&amp;models.Appointment{},</text:p>
      <text:p text:style-name="P17"><text:tab/><text:tab/>&amp;models.Diagnosis{},</text:p>
      <text:p text:style-name="P17"><text:tab/><text:tab/>&amp;models.MedicalProtocol{},</text:p>
      <text:p text:style-name="P17"><text:tab/><text:tab/>&amp;models.Product{},</text:p>
      <text:p text:style-name="P17"><text:tab/><text:tab/>&amp;models.CartItem{},</text:p>
      <text:p text:style-name="P17"><text:tab/><text:tab/>&amp;models.Order{},</text:p>
      <text:p text:style-name="P17"><text:tab/><text:tab/>&amp;models.OrderItem{},</text:p>
      <text:p text:style-name="P17"><text:tab/>)</text:p>
      <text:p text:style-name="P17"/>
      <text:p text:style-name="P17"><text:soft-page-break/><text:tab/>return db</text:p>
      <text:p text:style-name="P17">}</text:p>
      <text:p text:style-name="P4"><text:span text:style-name="Strong_20_Emphasis"><text:span text:style-name="T1">Клиентское веб-приложение (Vue 3)</text:span></text:span></text:p>
      <text:p text:style-name="P9"><text:span text:style-name="Emphasis"><text:span text:style-name="T1">components</text:span></text:span></text:p>
      <text:p text:style-name="P9"><text:span text:style-name="Source_20_Text"><text:span text:style-name="T1">components/Main.vue</text:span></text:span></text:p>
      <text:p text:style-name="P11">&lt;div class="layout"&gt;<text:line-break/> <text:s text:c="3"/>&lt;SideBar<text:line-break/> <text:s text:c="7"/>:current-role="userRole"<text:line-break/> <text:s text:c="7"/>:active-page="currentPage"<text:line-break/> <text:s text:c="7"/>:is-open="mobileMenu"<text:line-break/> <text:s text:c="7"/>@navigate="(p) =&gt; (currentPage = p)"<text:line-break/> <text:s text:c="7"/>@close="mobileMenu = false"<text:line-break/> <text:s text:c="3"/>/&gt;<text:line-break/><text:line-break/> <text:s text:c="3"/>&lt;main class="main"&gt;<text:line-break/> <text:s text:c="7"/>&lt;div class="page-container"&gt;<text:line-break/> <text:s text:c="11"/>&lt;template v-if="userRole === 'client'"&gt;<text:line-break/> <text:s text:c="15"/>&lt;DashboardPage<text:line-break/> <text:s text:c="19"/>v-if="currentPage === 'dashboard'"<text:line-break/> <text:s text:c="19"/>@navigate="(p) =&gt; (currentPage = p)"<text:line-break/> <text:s text:c="15"/>/&gt;<text:line-break/> <text:s text:c="15"/>&lt;PetsPage v-else-if="currentPage === 'pets'" /&gt;<text:line-break/> <text:s text:c="15"/>&lt;BookPage v-else-if="currentPage === 'book'" /&gt;<text:line-break/> <text:s text:c="15"/>&lt;AppointmentsPage<text:line-break/> <text:s text:c="19"/>v-else-if="currentPage === 'appointments'"<text:line-break/> <text:s text:c="15"/>/&gt;<text:line-break/> <text:s text:c="15"/>&lt;StatsPage v-else-if="currentPage === 'stats'" /&gt;<text:line-break/> <text:s text:c="15"/>&lt;ShopPage v-else-if="currentPage === 'shop'" /&gt;<text:line-break/> <text:s text:c="15"/>&lt;OrdersPage v-else-if="currentPage === 'orders'" /&gt;<text:line-break/> <text:s text:c="11"/>&lt;/template&gt;<text:line-break/><text:line-break/> <text:s text:c="11"/>&lt;template v-else-if="userRole === 'doctor'"&gt;<text:line-break/> <text:s text:c="15"/>&lt;SchedulePage v-if="currentPage === 'schedule'" /&gt;<text:line-break/> <text:s text:c="15"/>&lt;PatientsPage v-else-if="currentPage === 'patients'" /&gt;<text:line-break/> <text:s text:c="11"/>&lt;/template&gt;<text:line-break/><text:line-break/> <text:s text:c="11"/>&lt;div v-else class="page"&gt;<text:line-break/> <text:s text:c="15"/>&lt;div class="page-header"&gt;<text:line-break/> <text:s text:c="19"/>&lt;div&gt;<text:line-break/> <text:s text:c="23"/>&lt;div class="page-title"&gt;{{ currentPage }}&lt;/div&gt;<text:line-break/><text:soft-page-break/> <text:s text:c="23"/>&lt;div class="page-sub"&gt;<text:line-break/> <text:s text:c="27"/>Страница не найдена или недоступна<text:line-break/> <text:s text:c="23"/>&lt;/div&gt;<text:line-break/> <text:s text:c="19"/>&lt;/div&gt;<text:line-break/> <text:s text:c="15"/>&lt;/div&gt;<text:line-break/> <text:s text:c="11"/>&lt;/div&gt;<text:line-break/> <text:s text:c="7"/>&lt;/div&gt;<text:line-break/> <text:s text:c="3"/>&lt;/main&gt;<text:line-break/>&lt;/div&gt;<text:line-break/><text:line-break/>&lt;Profile<text:line-break/> <text:s text:c="3"/>:is-open="isProfileOpen"<text:line-break/> <text:s text:c="3"/>@close="isProfileOpen = false"<text:line-break/> <text:s text:c="3"/>@logout="emit('logout')"<text:line-break/>/&gt;</text:p>
      <text:p text:style-name="P11"/>
      <text:p text:style-name="P9"><text:span text:style-name="Emphasis"><text:span text:style-name="T1">components/elements</text:span></text:span></text:p>
      <text:p text:style-name="P9"><text:span text:style-name="Source_20_Text"><text:span text:style-name="T1">components/elements/Auth.vue</text:span></text:span></text:p>
      <text:p text:style-name="P19">🐾</text:p>
      <text:p text:style-name="P19">ВетКлиника </text:p>
      <text:p text:style-name="P20">&lt;div class="auth-box"&gt;<text:line-break/> &lt;div class="auth-tabs"&gt;<text:line-break/> &lt;div<text:line-break/> class="auth-tab"<text:line-break/> :class="{ active: activeTab === 'login' }"<text:line-break/> @click="activeTab = 'login'"<text:line-break/> &gt;<text:line-break/> Вход<text:line-break/> &lt;/div&gt;<text:line-break/> &lt;div<text:line-break/> class="auth-tab"<text:line-break/> :class="{ active: activeTab === 'reg' }"<text:line-break/> @click="activeTab = 'reg'"<text:line-break/> &gt;<text:line-break/> Регистрация<text:line-break/> &lt;/div&gt;<text:line-break/> &lt;/div&gt;<text:line-break/><text:line-break/> &lt;div v-if="activeTab === 'login'" class="auth-form"&gt;<text:line-break/> &lt;div class="form-group"&gt;<text:line-break/> &lt;label&gt;Email&lt;/label&gt;<text:line-break/> &lt;input<text:line-break/> v-model="loginData.email"<text:line-break/> type="email"<text:line-break/> placeholder="example@mail.ru"<text:line-break/><text:soft-page-break/> <text:s text:c="19"/>:disabled="loading"<text:line-break/> <text:s text:c="15"/>/&gt;<text:line-break/> <text:s text:c="11"/>&lt;/div&gt;<text:line-break/> <text:s text:c="11"/>&lt;div class="form-group"&gt;<text:line-break/> <text:s text:c="15"/>&lt;label&gt;Пароль&lt;/label&gt;<text:line-break/> <text:s text:c="15"/>&lt;input<text:line-break/> <text:s text:c="19"/>v-model="loginData.pass"<text:line-break/> <text:s text:c="19"/>type="password"<text:line-break/> <text:s text:c="19"/>placeholder="Минимум 8 символов"<text:line-break/> <text:s text:c="19"/>:disabled="loading"<text:line-break/> <text:s text:c="19"/>@keyup.enter="doLogin"<text:line-break/> <text:s text:c="15"/>/&gt;<text:line-break/> <text:s text:c="11"/>&lt;/div&gt;<text:line-break/> <text:s text:c="11"/>&lt;button<text:line-break/> <text:s text:c="15"/>class="auth-submit"<text:line-break/> <text:s text:c="15"/>@click="doLogin"<text:line-break/> <text:s text:c="15"/>:disabled="loading"<text:line-break/> <text:s text:c="11"/>&gt;<text:line-break/> <text:s text:c="15"/>{{ loading ? "Вход..." : "Войти" }}<text:line-break/> <text:s text:c="11"/>&lt;/button&gt;<text:line-break/> <text:s text:c="11"/>&lt;p class="auth-footer-text"&gt;<text:line-break/> <text:s text:c="15"/>Нет аккаунта?<text:line-break/> <text:s text:c="15"/>&lt;span class="auth-link" @click="activeTab = 'reg'"<text:line-break/> <text:s text:c="19"/>&gt;Зарегистрироваться&lt;/span<text:line-break/> <text:s text:c="15"/>&gt;<text:line-break/> <text:s text:c="11"/>&lt;/p&gt;<text:line-break/> <text:s text:c="7"/>&lt;/div&gt;<text:line-break/><text:line-break/> <text:s text:c="7"/>&lt;div v-else class="auth-form"&gt;<text:line-break/> <text:s text:c="11"/>&lt;div class="form-row"&gt;<text:line-break/> <text:s text:c="15"/>&lt;div class="form-group"&gt;<text:line-break/> <text:s text:c="19"/>&lt;label&gt;Фамилия&lt;/label&gt;<text:line-break/> <text:s text:c="19"/>&lt;input<text:line-break/> <text:s text:c="23"/>v-model="regData.lastName"<text:line-break/> <text:s text:c="23"/>type="text"<text:line-break/> <text:s text:c="23"/>placeholder="Иванов"<text:line-break/> <text:s text:c="23"/>:disabled="loading"<text:line-break/> <text:s text:c="19"/>/&gt;<text:line-break/> <text:s text:c="15"/>&lt;/div&gt;<text:line-break/> <text:s text:c="15"/>&lt;div class="form-group"&gt;<text:line-break/> <text:s text:c="19"/>&lt;label&gt;Имя&lt;/label&gt;<text:line-break/> <text:s text:c="19"/>&lt;input<text:line-break/> <text:s text:c="23"/>v-model="regData.firstName"<text:line-break/> <text:s text:c="23"/>type="text"<text:line-break/> <text:s text:c="23"/>placeholder="Иван"<text:line-break/> <text:s text:c="23"/>:disabled="loading"<text:line-break/> <text:s text:c="19"/>/&gt;<text:line-break/><text:soft-page-break/> <text:s text:c="15"/>&lt;/div&gt;<text:line-break/> <text:s text:c="11"/>&lt;/div&gt;<text:line-break/> <text:s text:c="11"/>&lt;div class="form-group"&gt;<text:line-break/> <text:s text:c="15"/>&lt;label&gt;Телефон&lt;/label&gt;<text:line-break/> <text:s text:c="15"/>&lt;input<text:line-break/> <text:s text:c="19"/>v-model="regData.phone"<text:line-break/> <text:s text:c="19"/>type="text"<text:line-break/> <text:s text:c="19"/>placeholder="+79001234567"<text:line-break/> <text:s text:c="19"/>:disabled="loading"<text:line-break/> <text:s text:c="15"/>/&gt;<text:line-break/> <text:s text:c="11"/>&lt;/div&gt;<text:line-break/> <text:s text:c="11"/>&lt;div class="form-group"&gt;<text:line-break/> <text:s text:c="15"/>&lt;label&gt;Email&lt;/label&gt;<text:line-break/> <text:s text:c="15"/>&lt;input<text:line-break/> <text:s text:c="19"/>v-model="regData.email"<text:line-break/> <text:s text:c="19"/>type="email"<text:line-break/> <text:s text:c="19"/>placeholder="example@mail.ru"<text:line-break/> <text:s text:c="19"/>:disabled="loading"<text:line-break/> <text:s text:c="15"/>/&gt;<text:line-break/> <text:s text:c="11"/>&lt;/div&gt;<text:line-break/> <text:s text:c="11"/>&lt;div class="form-group"&gt;<text:line-break/> <text:s text:c="15"/>&lt;label&gt;Пароль&lt;/label&gt;<text:line-break/> <text:s text:c="15"/>&lt;input<text:line-break/> <text:s text:c="19"/>v-model="regData.pass"<text:line-break/> <text:s text:c="19"/>type="password"<text:line-break/> <text:s text:c="19"/>placeholder="Минимум 8 символов"<text:line-break/> <text:s text:c="19"/>:disabled="loading"<text:line-break/> <text:s text:c="19"/>@keyup.enter="doRegister"<text:line-break/> <text:s text:c="15"/>/&gt;<text:line-break/> <text:s text:c="11"/>&lt;/div&gt;<text:line-break/> <text:s text:c="11"/>&lt;button<text:line-break/> <text:s text:c="15"/>class="auth-submit"<text:line-break/> <text:s text:c="15"/>@click="doRegister"<text:line-break/> <text:s text:c="15"/>:disabled="loading"<text:line-break/> <text:s text:c="11"/>&gt;<text:line-break/> <text:s text:c="15"/>{{ loading ? "Регистрация..." : "Зарегистрироваться" }}<text:line-break/> <text:s text:c="11"/>&lt;/button&gt;<text:line-break/> <text:s text:c="11"/>&lt;p class="auth-footer-text"&gt;<text:line-break/> <text:s text:c="15"/>Уже есть аккаунт?<text:line-break/> <text:s text:c="15"/>&lt;span class="auth-link" @click="activeTab = 'login'"<text:line-break/> <text:s text:c="19"/>&gt;Войти&lt;/span<text:line-break/> <text:s text:c="15"/>&gt;<text:line-break/> <text:s text:c="11"/>&lt;/p&gt;<text:line-break/> <text:s text:c="7"/>&lt;/div&gt;<text:line-break/> <text:s text:c="3"/>&lt;/div&gt;<text:line-break/>&lt;/div&gt;</text:p>
      <text:p text:style-name="P21"><text:span text:style-name="Source_20_Text"><text:span text:style-name="T4">components/elements/BaseModal.vue</text:span></text:span><text:span text:style-name="T4"/></text:p>
      <text:p text:style-name="P22"><text:soft-page-break/>&lt;script setup lang="ts"&gt;</text:p>
      <text:p text:style-name="P22">defineProps&lt;{ show: boolean; title: string; maxWidth?: string }&gt;();</text:p>
      <text:p text:style-name="P22">const emit = defineEmits&lt;{ close: [] }&gt;();</text:p>
      <text:p text:style-name="P22">&lt;/script&gt;</text:p>
      <text:p text:style-name="P22"/>
      <text:p text:style-name="P22">&lt;template&gt;</text:p>
      <text:p text:style-name="P22"><text:s text:c="4"/>&lt;Teleport to="body"&gt;</text:p>
      <text:p text:style-name="P22"><text:s text:c="8"/>&lt;div v-if="show" class="modal-overlay" @click.self="emit('close')"&gt;</text:p>
      <text:p text:style-name="P22"><text:s text:c="12"/>&lt;div class="modal" :style="maxWidth ? `max-width:${maxWidth}` : ''"&gt;</text:p>
      <text:p text:style-name="P22"><text:s text:c="16"/>&lt;div class="modal-header"&gt;</text:p>
      <text:p text:style-name="P22"><text:s text:c="20"/>&lt;span class="modal-title"&gt;{{ title }}&lt;/span&gt;</text:p>
      <text:p text:style-name="P22"><text:s text:c="20"/>&lt;button class="modal-close" @click="emit('close')"&gt;</text:p>
      <text:p text:style-name="P22"><text:s text:c="24"/>✕</text:p>
      <text:p text:style-name="P22"><text:s text:c="20"/>&lt;/button&gt;</text:p>
      <text:p text:style-name="P22"><text:s text:c="16"/>&lt;/div&gt;</text:p>
      <text:p text:style-name="P22"><text:s text:c="16"/>&lt;div class="modal-body"&gt;</text:p>
      <text:p text:style-name="P22"><text:s text:c="20"/>&lt;slot /&gt;</text:p>
      <text:p text:style-name="P22"><text:s text:c="16"/>&lt;/div&gt;</text:p>
      <text:p text:style-name="P22"><text:s text:c="16"/>&lt;div class="modal-footer" v-if="$slots.footer"&gt;</text:p>
      <text:p text:style-name="P22"><text:s text:c="20"/>&lt;slot name="footer" /&gt;</text:p>
      <text:p text:style-name="P22"><text:s text:c="16"/>&lt;/div&gt;</text:p>
      <text:p text:style-name="P22"><text:s text:c="12"/>&lt;/div&gt;</text:p>
      <text:p text:style-name="P22"><text:s text:c="8"/>&lt;/div&gt;</text:p>
      <text:p text:style-name="P22"><text:s text:c="4"/>&lt;/Teleport&gt;</text:p>
      <text:p text:style-name="P22">&lt;/template&gt;</text:p>
      <text:p text:style-name="P22"/>
      <text:p text:style-name="P22">&lt;style scoped&gt;</text:p>
      <text:p text:style-name="P22">.modal-overlay {</text:p>
      <text:p text:style-name="P22"><text:s text:c="4"/>position: fixed;</text:p>
      <text:p text:style-name="P22"><text:s text:c="4"/>inset: 0;</text:p>
      <text:p text:style-name="P22"><text:s text:c="4"/>background: rgba(0, 0, 0, 0.4);</text:p>
      <text:p text:style-name="P22"><text:s text:c="4"/>z-index: 1000;</text:p>
      <text:p text:style-name="P22"><text:s text:c="4"/>display: flex;</text:p>
      <text:p text:style-name="P22"><text:s text:c="4"/>align-items: center;</text:p>
      <text:p text:style-name="P22"><text:s text:c="4"/>justify-content: center;</text:p>
      <text:p text:style-name="P22"><text:s text:c="4"/>padding: 20px;</text:p>
      <text:p text:style-name="P22">}</text:p>
      <text:p text:style-name="P22">.modal {</text:p>
      <text:p text:style-name="P22"><text:s text:c="4"/>background: var(--surface);</text:p>
      <text:p text:style-name="P22"><text:s text:c="4"/>border: 1px solid var(--border);</text:p>
      <text:p text:style-name="P22"><text:s text:c="4"/>border-radius: 10px;</text:p>
      <text:p text:style-name="P22"><text:s text:c="4"/>width: 100%;</text:p>
      <text:p text:style-name="P22"><text:s text:c="4"/>max-width: 520px;</text:p>
      <text:p text:style-name="P22"><text:s text:c="4"/>overflow: hidden;</text:p>
      <text:p text:style-name="P22"><text:s text:c="4"/>animation: fadeIn 0.15s ease;</text:p>
      <text:p text:style-name="P22">}</text:p>
      <text:p text:style-name="P22">.modal-header {</text:p>
      <text:p text:style-name="P22"><text:soft-page-break/><text:s text:c="4"/>padding: 14px 16px;</text:p>
      <text:p text:style-name="P22"><text:s text:c="4"/>border-bottom: 1px solid var(--border);</text:p>
      <text:p text:style-name="P22"><text:s text:c="4"/>display: flex;</text:p>
      <text:p text:style-name="P22"><text:s text:c="4"/>align-items: center;</text:p>
      <text:p text:style-name="P22"><text:s text:c="4"/>justify-content: space-between;</text:p>
      <text:p text:style-name="P22">}</text:p>
      <text:p text:style-name="P22">.modal-title {</text:p>
      <text:p text:style-name="P22"><text:s text:c="4"/>font-size: 14px;</text:p>
      <text:p text:style-name="P22"><text:s text:c="4"/>font-weight: 600;</text:p>
      <text:p text:style-name="P22">}</text:p>
      <text:p text:style-name="P22">.modal-close {</text:p>
      <text:p text:style-name="P22"><text:s text:c="4"/>background: none;</text:p>
      <text:p text:style-name="P22"><text:s text:c="4"/>border: none;</text:p>
      <text:p text:style-name="P22"><text:s text:c="4"/>color: var(--text3);</text:p>
      <text:p text:style-name="P22"><text:s text:c="4"/>cursor: pointer;</text:p>
      <text:p text:style-name="P22"><text:s text:c="4"/>font-size: 14px;</text:p>
      <text:p text:style-name="P22"><text:s text:c="4"/>padding: 2px 6px;</text:p>
      <text:p text:style-name="P22"><text:s text:c="4"/>border-radius: 4px;</text:p>
      <text:p text:style-name="P22"><text:s text:c="4"/>transition: background 0.15s;</text:p>
      <text:p text:style-name="P22">}</text:p>
      <text:p text:style-name="P22">.modal-close:hover {</text:p>
      <text:p text:style-name="P22"><text:s text:c="4"/>background: var(--surface3);</text:p>
      <text:p text:style-name="P22"><text:s text:c="4"/>color: var(--text);</text:p>
      <text:p text:style-name="P22">}</text:p>
      <text:p text:style-name="P22">.modal-body {</text:p>
      <text:p text:style-name="P22"><text:s text:c="4"/>padding: 16px;</text:p>
      <text:p text:style-name="P22">}</text:p>
      <text:p text:style-name="P22">.modal-footer {</text:p>
      <text:p text:style-name="P22"><text:s text:c="4"/>padding: 12px 16px;</text:p>
      <text:p text:style-name="P22"><text:s text:c="4"/>border-top: 1px solid var(--border);</text:p>
      <text:p text:style-name="P22"><text:s text:c="4"/>display: flex;</text:p>
      <text:p text:style-name="P22"><text:s text:c="4"/>justify-content: flex-end;</text:p>
      <text:p text:style-name="P22"><text:s text:c="4"/>gap: 8px;</text:p>
      <text:p text:style-name="P22">}</text:p>
      <text:p text:style-name="P22">&lt;/style&gt;</text:p>
      <text:p text:style-name="P9"><text:span text:style-name="Emphasis"><text:span text:style-name="T1">components/user</text:span></text:span></text:p>
      <text:p text:style-name="P9"><text:span text:style-name="Source_20_Text"><text:span text:style-name="T1">components/user/BookPage.vue</text:span></text:span><text:span text:style-name="T1"/></text:p>
      <text:h text:style-name="P23" text:outline-level="1">Записаться на визит</text:h>
      <text:p text:style-name="P24">Выберите время для посещения клиники</text:p>
      <text:p text:style-name="P25">&lt;div class="card booking-card"&gt;<text:line-break/> &lt;div class="card-body"&gt;<text:line-break/> &lt;div class="booking-row"&gt;<text:line-break/> &lt;div class="form-group"&gt;<text:line-break/><text:soft-page-break/> <text:s text:c="19"/>&lt;label&gt;Питомец *&lt;/label&gt;<text:line-break/> <text:s text:c="19"/>&lt;select v-model.number="form.petId"&gt;<text:line-break/> <text:s text:c="23"/>&lt;option :value="null"&gt;— Выбрать —&lt;/option&gt;<text:line-break/> <text:s text:c="23"/>&lt;option v-for="p in pets" :key="p.id" :value="p.id"&gt;<text:line-break/> <text:s text:c="27"/>{{ p.avatar }} {{ p.name }}<text:line-break/> <text:s text:c="23"/>&lt;/option&gt;<text:line-break/> <text:s text:c="19"/>&lt;/select&gt;<text:line-break/> <text:s text:c="15"/>&lt;/div&gt;<text:line-break/> <text:s text:c="15"/>&lt;div class="form-group"&gt;<text:line-break/> <text:s text:c="19"/>&lt;label&gt;Цель визита&lt;/label&gt;<text:line-break/> <text:s text:c="19"/>&lt;select v-model.number="form.serviceId"&gt;<text:line-break/> <text:s text:c="23"/>&lt;option :value="null"&gt;— Осмотр —&lt;/option&gt;<text:line-break/> <text:s text:c="23"/>&lt;option<text:line-break/> <text:s text:c="27"/>v-for="s in services"<text:line-break/> <text:s text:c="27"/>:key="s.id"<text:line-break/> <text:s text:c="27"/>:value="s.id"<text:line-break/> <text:s text:c="23"/>&gt;<text:line-break/> <text:s text:c="27"/>{{ s.name }} ({{ s.price }}₽)<text:line-break/> <text:s text:c="23"/>&lt;/option&gt;<text:line-break/> <text:s text:c="19"/>&lt;/select&gt;<text:line-break/> <text:s text:c="15"/>&lt;/div&gt;<text:line-break/> <text:s text:c="15"/>&lt;div class="form-group"&gt;<text:line-break/> <text:s text:c="19"/>&lt;label&gt;Направление *&lt;/label&gt;<text:line-break/> <text:s text:c="19"/>&lt;select v-model="form.specialization"&gt;<text:line-break/> <text:s text:c="23"/>&lt;option value=""&gt;— Профиль —&lt;/option&gt;<text:line-break/> <text:s text:c="23"/>&lt;option<text:line-break/> <text:s text:c="27"/>v-for="s in specializations"<text:line-break/> <text:s text:c="27"/>:key="s"<text:line-break/> <text:s text:c="27"/>:value="s"<text:line-break/> <text:s text:c="23"/>&gt;<text:line-break/> <text:s text:c="27"/>{{ s }}<text:line-break/> <text:s text:c="23"/>&lt;/option&gt;<text:line-break/> <text:s text:c="19"/>&lt;/select&gt;<text:line-break/> <text:s text:c="15"/>&lt;/div&gt;<text:line-break/> <text:s text:c="15"/>&lt;div class="form-group"&gt;<text:line-break/> <text:s text:c="19"/>&lt;label&gt;Врач *&lt;/label&gt;<text:line-break/> <text:s text:c="19"/>&lt;select<text:line-break/> <text:s text:c="23"/>v-model.number="form.doctorId"<text:line-break/> <text:s text:c="23"/>:disabled="!form.specialization"<text:line-break/> <text:s text:c="19"/>&gt;<text:line-break/> <text:s text:c="23"/>&lt;option :value="null"&gt;— Выберите —&lt;/option&gt;<text:line-break/> <text:s text:c="23"/>&lt;option<text:line-break/> <text:s text:c="27"/>v-for="d in filteredDoctors"<text:line-break/> <text:s text:c="27"/>:key="d.doctorId"<text:line-break/> <text:s text:c="27"/>:value="d.doctorId"<text:line-break/> <text:s text:c="23"/>&gt;<text:line-break/> <text:s text:c="27"/>{{ d.lastName }} {{ d.firstName }}<text:line-break/><text:soft-page-break/> <text:s text:c="23"/>&lt;/option&gt;<text:line-break/> <text:s text:c="19"/>&lt;/select&gt;<text:line-break/> <text:s text:c="15"/>&lt;/div&gt;<text:line-break/> <text:s text:c="15"/>&lt;div class="form-group"&gt;<text:line-break/> <text:s text:c="19"/>&lt;label&gt;Дата *&lt;/label&gt;<text:line-break/> <text:s text:c="19"/>&lt;input v-model="form.date" type="date" :min="minDate" /&gt;<text:line-break/> <text:s text:c="15"/>&lt;/div&gt;<text:line-break/> <text:s text:c="15"/>&lt;div class="form-group"&gt;<text:line-break/> <text:s text:c="19"/>&lt;label&gt;Время *&lt;/label&gt;<text:line-break/> <text:s text:c="19"/>&lt;select<text:line-break/> <text:s text:c="23"/>v-model="form.time"<text:line-break/> <text:s text:c="23"/>:disabled="!form.date || !form.doctorId"<text:line-break/> <text:s text:c="19"/>&gt;<text:line-break/> <text:s text:c="23"/>&lt;option value=""&gt;--:--&lt;/option&gt;<text:line-break/> <text:s text:c="23"/>&lt;option<text:line-break/> <text:s text:c="27"/>v-for="s in TIME_SLOTS"<text:line-break/> <text:s text:c="27"/>:key="s"<text:line-break/> <text:s text:c="27"/>:value="s"<text:line-break/> <text:s text:c="27"/>:disabled="busySlots.includes(s)"<text:line-break/> <text:s text:c="23"/>&gt;<text:line-break/> <text:s text:c="27"/>{{ s }}<text:line-break/> <text:s text:c="27"/>{{ busySlots.includes(s) ? "(занято)" : "" }}<text:line-break/> <text:s text:c="23"/>&lt;/option&gt;<text:line-break/> <text:s text:c="19"/>&lt;/select&gt;<text:line-break/> <text:s text:c="15"/>&lt;/div&gt;<text:line-break/> <text:s text:c="11"/>&lt;/div&gt;<text:line-break/><text:line-break/> <text:s text:c="11"/>&lt;div class="form-group mt-16"&gt;<text:line-break/> <text:s text:c="15"/>&lt;label&gt;Комментарий&lt;/label&gt;<text:line-break/> <text:s text:c="15"/>&lt;textarea<text:line-break/> <text:s text:c="19"/>v-model="form.comment"<text:line-break/> <text:s text:c="19"/>rows="2"<text:line-break/> <text:s text:c="19"/>placeholder="Опишите жалобы или причину обращения..."<text:line-break/> <text:s text:c="15"/>&gt;&lt;/textarea&gt;<text:line-break/> <text:s text:c="11"/>&lt;/div&gt;<text:line-break/><text:line-break/> <text:s text:c="11"/>&lt;div<text:line-break/> <text:s text:c="15"/>v-if="form.date &amp;&amp; form.time &amp;&amp; form.doctorId"<text:line-break/> <text:s text:c="15"/>class="summary-plate"<text:line-break/> <text:s text:c="11"/>&gt;<text:line-break/> <text:s text:c="15"/>&lt;div class="summary-info"&gt;<text:line-break/> <text:s text:c="19"/>&lt;div class="summary-date"&gt;<text:line-break/> <text:s text:c="23"/>{{ form.date.split("-").reverse().join(".") }} в<text:line-break/> <text:s text:c="23"/>{{ form.time }}<text:line-break/> <text:s text:c="19"/>&lt;/div&gt;<text:line-break/> <text:s text:c="19"/>&lt;div class="summary-details"&gt;<text:line-break/> <text:s text:c="23"/>Врач: {{ selectedDoctor?.lastName }}<text:line-break/><text:soft-page-break/> <text:s text:c="23"/>{{ selectedDoctor?.firstName }}<text:line-break/> <text:s text:c="23"/>&lt;span v-if="selectedService"&gt;<text:line-break/> <text:s text:c="27"/>• {{ selectedService.name }}&lt;/span<text:line-break/> <text:s text:c="23"/>&gt;<text:line-break/> <text:s text:c="19"/>&lt;/div&gt;<text:line-break/> <text:s text:c="15"/>&lt;/div&gt;<text:line-break/> <text:s text:c="15"/>&lt;div class="summary-price" v-if="selectedService"&gt;<text:line-break/> <text:s text:c="19"/>{{ selectedService.price }} ₽<text:line-break/> <text:s text:c="15"/>&lt;/div&gt;<text:line-break/> <text:s text:c="11"/>&lt;/div&gt;<text:line-break/><text:line-break/> <text:s text:c="11"/>&lt;div class="row mt-20" style="gap: 12px"&gt;<text:line-break/> <text:s text:c="15"/>&lt;button<text:line-break/> <text:s text:c="19"/>class="btn btn-primary"<text:line-break/> <text:s text:c="19"/>:disabled="loading"<text:line-break/> <text:s text:c="19"/>@click="sendRequest"<text:line-break/> <text:s text:c="15"/>&gt;<text:line-break/> <text:s text:c="19"/>{{ loading ? "Отправка..." : "✓ Подтвердить запись" }}<text:line-break/> <text:s text:c="15"/>&lt;/button&gt;<text:line-break/> <text:s text:c="15"/>&lt;button<text:line-break/> <text:s text:c="19"/>class="btn btn-ghost"<text:line-break/> <text:s text:c="19"/>@click="emit('navigate', 'dashboard')"<text:line-break/> <text:s text:c="15"/>&gt;<text:line-break/> <text:s text:c="19"/>Отмена<text:line-break/> <text:s text:c="15"/>&lt;/button&gt;<text:line-break/> <text:s text:c="11"/>&lt;/div&gt;<text:line-break/> <text:s text:c="7"/>&lt;/div&gt;<text:line-break/> <text:s text:c="3"/>&lt;/div&gt;<text:line-break/>&lt;/div&gt;</text:p>
      <text:p text:style-name="P26"><text:span text:style-name="Source_20_Text"><text:span text:style-name="T4">components/user/AppointmentsPage.vue</text:span></text:span><text:span text:style-name="T4"/></text:p>
      <text:h text:style-name="P23" text:outline-level="1">Мои визиты</text:h>
      <text:p text:style-name="P24">История посещений и медицинские заключения </text:p>
      <text:p text:style-name="Text_20_body"><text:s text:c="4"/>&lt;div v-if="loading" class="text-muted py-40 center"&gt;Загрузка...&lt;/div&gt;<text:line-break/> <text:s text:c="3"/>&lt;div v-else-if="!appointments.length" class="card py-40 center"&gt;<text:line-break/> <text:s text:c="7"/>&lt;p class="text-muted"&gt;Записей не найдено&lt;/p&gt;<text:line-break/> <text:s text:c="3"/>&lt;/div&gt;<text:line-break/> <text:s text:c="3"/>&lt;div v-else class="table-wrap"&gt;<text:line-break/> <text:s text:c="7"/>&lt;table&gt;<text:line-break/> <text:s text:c="11"/>&lt;thead&gt;<text:line-break/> <text:s text:c="15"/>&lt;tr&gt;<text:line-break/> <text:s text:c="19"/>&lt;th&gt;Питомец&lt;/th&gt;<text:line-break/> <text:s text:c="19"/>&lt;th&gt;Дата и время&lt;/th&gt;<text:line-break/> <text:s text:c="19"/>&lt;th&gt;Врач&lt;/th&gt;<text:line-break/> <text:s text:c="19"/>&lt;th&gt;Статус&lt;/th&gt;<text:line-break/> <text:s text:c="19"/>&lt;th&gt;&lt;/th&gt;<text:line-break/><text:soft-page-break/> <text:s text:c="15"/>&lt;/tr&gt;<text:line-break/> <text:s text:c="11"/>&lt;/thead&gt;<text:line-break/> <text:s text:c="11"/>&lt;tbody&gt;<text:line-break/> <text:s text:c="15"/>&lt;tr v-for="app in appointments" :key="app.id"&gt;<text:line-break/> <text:s text:c="19"/>&lt;td class="td-main"&gt;{{ app.petName }}&lt;/td&gt;<text:line-break/> <text:s text:c="19"/>&lt;td&gt;<text:line-break/> <text:s text:c="23"/>&lt;div class="mono" style="font-size: 13px"&gt;<text:line-break/> <text:s text:c="27"/>{{ app.date }}<text:line-break/> <text:s text:c="23"/>&lt;/div&gt;<text:line-break/> <text:s text:c="23"/>&lt;div class="text-muted" style="font-size: 11px"&gt;<text:line-break/> <text:s text:c="27"/>{{ app.time }}<text:line-break/> <text:s text:c="23"/>&lt;/div&gt;<text:line-break/> <text:s text:c="19"/>&lt;/td&gt;<text:line-break/> <text:s text:c="19"/>&lt;td&gt;{{ app.doctorName }}&lt;/td&gt;<text:line-break/> <text:s text:c="19"/>&lt;td&gt;<text:line-break/> <text:s text:c="23"/>&lt;span<text:line-break/> <text:s text:c="27"/>v-if="statusMap[app.status]"<text:line-break/> <text:s text:c="27"/>:class="['badge', statusMap[app.status].cls]"<text:line-break/> <text:s text:c="23"/>&gt;<text:line-break/> <text:s text:c="27"/>{{ statusMap[app.status].label }}<text:line-break/> <text:s text:c="23"/>&lt;/span&gt;<text:line-break/> <text:s text:c="19"/>&lt;/td&gt;<text:line-break/> <text:s text:c="19"/>&lt;td style="text-align: right"&gt;<text:line-break/> <text:s text:c="23"/>&lt;button<text:line-break/> <text:s text:c="27"/>v-if="app.status === 'done'"<text:line-break/> <text:s text:c="27"/>class="btn btn-primary btn-sm"<text:line-break/> <text:s text:c="27"/>@click="showProtocol(app)"<text:line-break/> <text:s text:c="23"/>&gt;<text:line-break/> <text:s text:c="27"/>Протокол<text:line-break/> <text:s text:c="23"/>&lt;/button&gt;<text:line-break/> <text:s text:c="19"/>&lt;/td&gt;<text:line-break/> <text:s text:c="15"/>&lt;/tr&gt;<text:line-break/> <text:s text:c="11"/>&lt;/tbody&gt;<text:line-break/> <text:s text:c="7"/>&lt;/table&gt;<text:line-break/> <text:s text:c="3"/>&lt;/div&gt;<text:line-break/><text:line-break/> <text:s text:c="3"/>&lt;BaseModal<text:line-break/> <text:s text:c="7"/>:show="isProtocolOpen"<text:line-break/> <text:s text:c="7"/>title="Медицинское заключение"<text:line-break/> <text:s text:c="7"/>@close="isProtocolOpen = false"<text:line-break/> <text:s text:c="3"/>&gt;<text:line-break/> <text:s text:c="7"/>&lt;div class="protocol-view" v-if="selectedProtocol"&gt;<text:line-break/> <text:s text:c="11"/>&lt;template v-if="selectedProtocol.protocol"&gt;<text:line-break/> <text:s text:c="15"/>&lt;div class="p-summary"&gt;<text:line-break/> <text:s text:c="19"/>&lt;div class="p-summary-item"&gt;<text:line-break/> <text:s text:c="23"/>&lt;label&gt;Пациент&lt;/label&gt;<text:line-break/> <text:s text:c="23"/>&lt;span&gt;{{ selectedProtocol.petName }}&lt;/span&gt;<text:line-break/><text:soft-page-break/> <text:s text:c="19"/>&lt;/div&gt;<text:line-break/> <text:s text:c="19"/>&lt;div class="p-summary-item"&gt;<text:line-break/> <text:s text:c="23"/>&lt;label&gt;Вес&lt;/label&gt;<text:line-break/> <text:s text:c="23"/>&lt;span<text:line-break/> <text:s text:c="27"/>&gt;{{<text:line-break/> <text:s text:c="31"/>selectedProtocol.protocol.weight ||<text:line-break/> <text:s text:c="31"/>selectedProtocol.protocol.weight_at_visit<text:line-break/> <text:s text:c="27"/>}}<text:line-break/> <text:s text:c="27"/>кг&lt;/span<text:line-break/> <text:s text:c="23"/>&gt;<text:line-break/> <text:s text:c="19"/>&lt;/div&gt;<text:line-break/> <text:s text:c="15"/>&lt;/div&gt;<text:line-break/> <text:s text:c="15"/>&lt;div class="p-section"&gt;<text:line-break/> <text:s text:c="19"/>&lt;label&gt;Поставленный диагноз&lt;/label&gt;<text:line-break/> <text:s text:c="19"/>&lt;div class="p-val diagnosis-tags"&gt;<text:line-break/> <text:s text:c="23"/>&lt;span<text:line-break/> <text:s text:c="27"/>v-for="d in selectedProtocol.protocol.diagnoses"<text:line-break/> <text:s text:c="27"/>:key="d.id"<text:line-break/> <text:s text:c="27"/>class="diagnosis-tag-readonly"<text:line-break/> <text:s text:c="23"/>&gt;<text:line-break/> <text:s text:c="27"/>{{ d.name }}<text:line-break/> <text:s text:c="23"/>&lt;/span&gt;<text:line-break/> <text:s text:c="23"/>&lt;span<text:line-break/> <text:s text:c="27"/>v-if="<text:line-break/> <text:s text:c="31"/>!selectedProtocol.protocol.diagnoses?.length<text:line-break/> <text:s text:c="27"/>"<text:line-break/> <text:s text:c="27"/>class="text-muted"<text:line-break/> <text:s text:c="23"/>&gt;<text:line-break/> <text:s text:c="27"/>Диагноз не указан<text:line-break/> <text:s text:c="23"/>&lt;/span&gt;<text:line-break/> <text:s text:c="19"/>&lt;/div&gt;<text:line-break/> <text:s text:c="15"/>&lt;/div&gt;<text:line-break/> <text:s text:c="15"/>&lt;div class="p-section"&gt;<text:line-break/> <text:s text:c="19"/>&lt;label&gt;Рекомендации и лечение&lt;/label&gt;<text:line-break/> <text:s text:c="19"/>&lt;div class="p-val"&gt;<text:line-break/> <text:s text:c="23"/>{{ selectedProtocol.protocol.treatment }}<text:line-break/> <text:s text:c="19"/>&lt;/div&gt;<text:line-break/> <text:s text:c="15"/>&lt;/div&gt;<text:line-break/> <text:s text:c="15"/>&lt;button<text:line-break/> <text:s text:c="19"/>class="btn btn-accent full mt-20"<text:line-break/> <text:s text:c="19"/>@click="printProtocol"<text:line-break/> <text:s text:c="15"/>&gt;<text:line-break/> <text:s text:c="19"/>🖨 Сохранить в PDF<text:line-break/> <text:s text:c="15"/>&lt;/button&gt;<text:line-break/> <text:s text:c="11"/>&lt;/template&gt;<text:line-break/> <text:s text:c="11"/>&lt;div v-else class="center py-20"&gt;<text:line-break/> <text:s text:c="15"/>&lt;p class="text-muted"&gt;<text:line-break/><text:soft-page-break/> <text:s text:c="19"/>Протокол приема еще не заполнен врачом.<text:line-break/> <text:s text:c="15"/>&lt;/p&gt;<text:line-break/> <text:s text:c="11"/>&lt;/div&gt;<text:line-break/> <text:s text:c="7"/>&lt;/div&gt;<text:line-break/> <text:s text:c="3"/>&lt;/BaseModal&gt;<text:line-break/><text:line-break/> <text:s text:c="3"/>&lt;div style="position: absolute; left: -9999px; top: 0"&gt;<text:line-break/> <text:s text:c="7"/>&lt;div ref="protocolRef" class="pdf-document"&gt;<text:line-break/> <text:s text:c="11"/>&lt;div class="pdf-header"&gt;<text:line-break/> <text:s text:c="15"/>&lt;div class="pdf-logo"&gt;🐾&lt;/div&gt;<text:line-break/> <text:s text:c="15"/>&lt;div class="pdf-clinic-info"&gt;<text:line-break/> <text:s text:c="19"/>&lt;h2&gt;ВЕТЕРИНАРНЫЙ ЦЕНТР "ВетКлиника"&lt;/h2&gt;<text:line-break/> <text:s text:c="19"/>&lt;p&gt;Лицензия № ВЕТ-77-01-000842 | petcare-clinic.ru&lt;/p&gt;<text:line-break/> <text:s text:c="19"/>&lt;p&gt;<text:line-break/> <text:s text:c="23"/>г. Москва, ул. Ветеринарная, 12 | +7 (495) 000-00-00<text:line-break/> <text:s text:c="19"/>&lt;/p&gt;<text:line-break/> <text:s text:c="15"/>&lt;/div&gt;<text:line-break/> <text:s text:c="11"/>&lt;/div&gt;<text:line-break/><text:line-break/> <text:s text:c="11"/>&lt;h1 class="pdf-title"&gt;<text:line-break/> <text:s text:c="15"/>МЕДИЦИНСКОЕ ЗАКЛЮЧЕНИЕ №{{ selectedProtocol?.id }}<text:line-break/> <text:s text:c="11"/>&lt;/h1&gt;<text:line-break/><text:line-break/> <text:s text:c="11"/>&lt;div class="pdf-meta-grid"&gt;<text:line-break/> <text:s text:c="15"/>&lt;div class="pdf-meta-item"&gt;<text:line-break/> <text:s text:c="19"/>&lt;strong&gt;Пациент:&lt;/strong&gt;<text:line-break/> <text:s text:c="19"/>{{ selectedProtocol?.petName }}<text:line-break/> <text:s text:c="15"/>&lt;/div&gt;<text:line-break/> <text:s text:c="15"/>&lt;div class="pdf-meta-item"&gt;<text:line-break/> <text:s text:c="19"/>&lt;strong&gt;Вид животного:&lt;/strong&gt;<text:line-break/> <text:s text:c="19"/>{{<text:line-break/> <text:s text:c="23"/>selectedProtocol?.petSpecies || "Домашнее животное"<text:line-break/> <text:s text:c="19"/>}}<text:line-break/> <text:s text:c="15"/>&lt;/div&gt;<text:line-break/> <text:s text:c="15"/>&lt;div class="pdf-meta-item"&gt;<text:line-break/> <text:s text:c="19"/>&lt;strong&gt;Дата приема:&lt;/strong&gt;<text:line-break/> <text:s text:c="19"/>{{ selectedProtocol?.date }}<text:line-break/> <text:s text:c="15"/>&lt;/div&gt;<text:line-break/> <text:s text:c="15"/>&lt;div class="pdf-meta-item"&gt;<text:line-break/> <text:s text:c="19"/>&lt;strong&gt;Вес пациента:&lt;/strong&gt;<text:line-break/> <text:s text:c="19"/>{{<text:line-break/> <text:s text:c="23"/>selectedProtocol?.protocol?.weight ||<text:line-break/> <text:s text:c="23"/>selectedProtocol?.protocol?.weight_at_visit<text:line-break/> <text:s text:c="19"/>}}<text:line-break/> <text:s text:c="19"/>кг<text:line-break/> <text:s text:c="15"/>&lt;/div&gt;<text:line-break/> <text:s text:c="15"/>&lt;div class="pdf-meta-item"&gt;<text:line-break/><text:soft-page-break/> <text:s text:c="19"/>&lt;strong&gt;Лечащий врач:&lt;/strong&gt;<text:line-break/> <text:s text:c="19"/>{{ selectedProtocol?.doctorName }}<text:line-break/> <text:s text:c="15"/>&lt;/div&gt;<text:line-break/> <text:s text:c="11"/>&lt;/div&gt;<text:line-break/><text:line-break/> <text:s text:c="11"/>&lt;div class="pdf-content-block"&gt;<text:line-break/> <text:s text:c="15"/>&lt;h3 class="pdf-section-h"&gt;1. Анамнез и диагноз&lt;/h3&gt;<text:line-break/> <text:s text:c="15"/>&lt;div class="pdf-text-box"&gt;<text:line-break/> <text:s text:c="19"/>{{ diagnosisNames(selectedProtocol?.protocol) }}<text:line-break/> <text:s text:c="15"/>&lt;/div&gt;<text:line-break/> <text:s text:c="11"/>&lt;/div&gt;<text:line-break/><text:line-break/> <text:s text:c="11"/>&lt;div class="pdf-content-block"&gt;<text:line-break/> <text:s text:c="15"/>&lt;h3 class="pdf-section-h"&gt;<text:line-break/> <text:s text:c="19"/>2. Назначенное лечение и рекомендации<text:line-break/> <text:s text:c="15"/>&lt;/h3&gt;<text:line-break/> <text:s text:c="15"/>&lt;div class="pdf-text-box"&gt;<text:line-break/> <text:s text:c="19"/>{{ selectedProtocol?.protocol?.treatment }}<text:line-break/> <text:s text:c="15"/>&lt;/div&gt;<text:line-break/> <text:s text:c="11"/>&lt;/div&gt;<text:line-break/><text:line-break/> <text:s text:c="11"/>&lt;div<text:line-break/> <text:s text:c="15"/>class="pdf-content-block"<text:line-break/> <text:s text:c="15"/>v-if="selectedProtocol?.protocol?.medications"<text:line-break/> <text:s text:c="11"/>&gt;<text:line-break/> <text:s text:c="15"/>&lt;h3 class="pdf-section-h"&gt;3. Медикаментозные назначения&lt;/h3&gt;<text:line-break/> <text:s text:c="15"/>&lt;div class="pdf-text-box highlight"&gt;<text:line-break/> <text:s text:c="19"/>{{ selectedProtocol?.protocol?.medications }}<text:line-break/> <text:s text:c="15"/>&lt;/div&gt;<text:line-break/> <text:s text:c="11"/>&lt;/div&gt;<text:line-break/><text:line-break/> <text:s text:c="11"/>&lt;div class="pdf-footer"&gt;<text:line-break/> <text:s text:c="15"/>&lt;div class="pdf-signature"&gt;<text:line-break/> <text:s text:c="19"/>&lt;div class="pdf-sig-line"&gt;&lt;/div&gt;<text:line-break/> <text:s text:c="19"/>&lt;p&gt;<text:line-break/> <text:s text:c="23"/>Подпись врача: ____________________ /<text:line-break/> <text:s text:c="23"/>{{ selectedProtocol?.doctorName }} /<text:line-break/> <text:s text:c="19"/>&lt;/p&gt;<text:line-break/> <text:s text:c="15"/>&lt;/div&gt;<text:line-break/> <text:s text:c="15"/>&lt;div class="pdf-stamp"&gt;ДЛЯ ДОКУМЕНТОВ&lt;/div&gt;<text:line-break/> <text:s text:c="11"/>&lt;/div&gt;<text:line-break/> <text:s text:c="7"/>&lt;/div&gt;<text:line-break/> <text:s text:c="3"/>&lt;/div&gt;<text:line-break/>&lt;/div&gt;</text:p>
      <text:p text:style-name="Text_20_body"/>
      <text:p text:style-name="P27"><text:span text:style-name="Emphasis"><text:span text:style-name="T1">components/doctor</text:span></text:span></text:p>
      <text:p text:style-name="P27"><text:soft-page-break/><text:span text:style-name="Source_20_Text"><text:span text:style-name="T1">components/doctor/SchedulePage.vue</text:span></text:span><text:span text:style-name="T1"/></text:p>
      <text:p text:style-name="P28">&lt;script setup lang="ts"&gt;</text:p>
      <text:p text:style-name="P28">import { ref, reactive, computed, onMounted } from "vue";</text:p>
      <text:p text:style-name="P28">import BaseModal from "../elements/BaseModal.vue";</text:p>
      <text:p text:style-name="P28">import { useToast } from "../../utils/useToast";</text:p>
      <text:p text:style-name="P28">const { showToast } = useToast();</text:p>
      <text:p text:style-name="P28"/>
      <text:p text:style-name="P28">// --- СОСТОЯНИЕ ---</text:p>
      <text:p text:style-name="P28">const appointments = ref&lt;any[]&gt;([]);</text:p>
      <text:p text:style-name="P28">const diagnosesList = ref&lt;{ id: number; name: string }[]&gt;([]);</text:p>
      <text:p text:style-name="P28">const loading = ref(false);</text:p>
      <text:p text:style-name="P28">const isReportModalOpen = ref(false);</text:p>
      <text:p text:style-name="P28">const selectedApp = ref&lt;any&gt;(null);</text:p>
      <text:p text:style-name="P28">const isDiagnosisPickerOpen = ref(false);</text:p>
      <text:p text:style-name="P28">const availableDiagnoses = computed(() =&gt;</text:p>
      <text:p text:style-name="P28"><text:s text:c="4"/>diagnosesList.value.filter((d) =&gt; !reportForm.diagnosisIds.includes(d.id)),</text:p>
      <text:p text:style-name="P28">);</text:p>
      <text:p text:style-name="P28"/>
      <text:p text:style-name="P28">const reportForm = reactive({</text:p>
      <text:p text:style-name="P28"><text:s text:c="4"/>weight: "",</text:p>
      <text:p text:style-name="P28"><text:soft-page-break/><text:s text:c="4"/>diagnosisIds: [] as number[],</text:p>
      <text:p text:style-name="P28"><text:s text:c="4"/>treatment: "",</text:p>
      <text:p text:style-name="P28"><text:s text:c="4"/>medications: "",</text:p>
      <text:p text:style-name="P28">});</text:p>
      <text:p text:style-name="P28"/>
      <text:p text:style-name="P28">const statusMap: Record&lt;string, { label: string; cls: string }&gt; = {</text:p>
      <text:p text:style-name="P28"><text:s text:c="4"/>waiting: { label: "Ожидает", cls: "badge-waiting" },</text:p>
      <text:p text:style-name="P28"><text:s text:c="4"/>confirmed: { label: "Принята", cls: "badge-confirmed" },</text:p>
      <text:p text:style-name="P28"><text:s text:c="4"/>rejected: { label: "Отклонена", cls: "badge-rejected" },</text:p>
      <text:p text:style-name="P28"><text:s text:c="4"/>done: { label: "Завершена", cls: "badge-info" },</text:p>
      <text:p text:style-name="P28">};</text:p>
      <text:p text:style-name="P28"/>
      <text:p text:style-name="P28">const token = localStorage.getItem("token");</text:p>
      <text:p text:style-name="P28">const doctorId = JSON.parse(localStorage.getItem("user") || "{}")?.id;</text:p>
      <text:p text:style-name="P28"/>
      <text:p text:style-name="P28">async function loadSchedule() {</text:p>
      <text:p text:style-name="P28"><text:s text:c="4"/>loading.value = true;</text:p>
      <text:p text:style-name="P28"><text:s text:c="4"/>try {</text:p>
      <text:p text:style-name="P28"><text:s text:c="8"/>const res = await fetch(`/api/doctor/schedule?doctor_id=${doctorId}`, {</text:p>
      <text:p text:style-name="P28"><text:s text:c="12"/>headers: {</text:p>
      <text:p text:style-name="P28"><text:soft-page-break/><text:s text:c="16"/>Authorization: `Bearer ${token}`,</text:p>
      <text:p text:style-name="P28"><text:s text:c="12"/>},</text:p>
      <text:p text:style-name="P28"><text:s text:c="8"/>});</text:p>
      <text:p text:style-name="P28"><text:s text:c="8"/>if (res.ok) {</text:p>
      <text:p text:style-name="P28"><text:s text:c="12"/>appointments.value = await res.json();</text:p>
      <text:p text:style-name="P28"><text:s text:c="8"/>} else {</text:p>
      <text:p text:style-name="P28"><text:s text:c="12"/>appointments.value = [];</text:p>
      <text:p text:style-name="P28"><text:s text:c="8"/>}</text:p>
      <text:p text:style-name="P28"><text:s text:c="4"/>} catch (err) {</text:p>
      <text:p text:style-name="P28"><text:s text:c="8"/>console.error("Ошибка загрузки расписания:", err);</text:p>
      <text:p text:style-name="P28"><text:s text:c="8"/>appointments.value = [];</text:p>
      <text:p text:style-name="P28"><text:s text:c="4"/>} finally {</text:p>
      <text:p text:style-name="P28"><text:s text:c="8"/>loading.value = false;</text:p>
      <text:p text:style-name="P28"><text:s text:c="4"/>}</text:p>
      <text:p text:style-name="P28">}</text:p>
      <text:p text:style-name="P28"/>
      <text:p text:style-name="P28">async function loadDiagnoses() {</text:p>
      <text:p text:style-name="P28"><text:s text:c="4"/>try {</text:p>
      <text:p text:style-name="P28"><text:s text:c="8"/>const res = await fetch(`/api/diagnoses`, {</text:p>
      <text:p text:style-name="P28"><text:s text:c="12"/>headers: { Authorization: `Bearer ${token}` },</text:p>
      <text:p text:style-name="P28"><text:soft-page-break/><text:s text:c="8"/>});</text:p>
      <text:p text:style-name="P28"><text:s text:c="8"/>if (res.ok) {</text:p>
      <text:p text:style-name="P28"><text:s text:c="12"/>diagnosesList.value = await res.json();</text:p>
      <text:p text:style-name="P28"><text:s text:c="8"/>}</text:p>
      <text:p text:style-name="P28"><text:s text:c="4"/>} catch (err) {</text:p>
      <text:p text:style-name="P28"><text:s text:c="8"/>console.error("Ошибка загрузки справочника диагнозов:", err);</text:p>
      <text:p text:style-name="P28"><text:s text:c="4"/>}</text:p>
      <text:p text:style-name="P28">}</text:p>
      <text:p text:style-name="P28"/>
      <text:p text:style-name="P28">function openCompleteModal(app: any) {</text:p>
      <text:p text:style-name="P28"><text:s text:c="4"/>selectedApp.value = app;</text:p>
      <text:p text:style-name="P28"><text:s text:c="4"/>Object.assign(reportForm, {</text:p>
      <text:p text:style-name="P28"><text:s text:c="8"/>weight: "",</text:p>
      <text:p text:style-name="P28"><text:s text:c="8"/>diagnosisIds: [],</text:p>
      <text:p text:style-name="P28"><text:s text:c="8"/>treatment: "",</text:p>
      <text:p text:style-name="P28"><text:s text:c="8"/>medications: "",</text:p>
      <text:p text:style-name="P28"><text:s text:c="4"/>});</text:p>
      <text:p text:style-name="P28"><text:s text:c="4"/>isDiagnosisPickerOpen.value = false;</text:p>
      <text:p text:style-name="P28"><text:s text:c="4"/>if (!diagnosesList.value.length) {</text:p>
      <text:p text:style-name="P28"><text:s text:c="8"/>loadDiagnoses();</text:p>
      <text:p text:style-name="P28"><text:soft-page-break/><text:s text:c="4"/>}</text:p>
      <text:p text:style-name="P28"><text:s text:c="4"/>isReportModalOpen.value = true;</text:p>
      <text:p text:style-name="P28">}</text:p>
      <text:p text:style-name="P28">async function saveProtocol() {</text:p>
      <text:p text:style-name="P28"><text:s text:c="4"/>if (!reportForm.weight || !reportForm.diagnosisIds.length)</text:p>
      <text:p text:style-name="P28"><text:s text:c="8"/>return showToast(</text:p>
      <text:p text:style-name="P28"><text:s text:c="12"/>"Поле 'Вес' и хотя бы один диагноз обязательны для заполнения",</text:p>
      <text:p text:style-name="P28"><text:s text:c="12"/>"info",</text:p>
      <text:p text:style-name="P28"><text:s text:c="8"/>);</text:p>
      <text:p text:style-name="P28"/>
      <text:p text:style-name="P28"><text:s text:c="4"/>try {</text:p>
      <text:p text:style-name="P28"><text:s text:c="8"/>const res = await fetch(</text:p>
      <text:p text:style-name="P28"><text:s text:c="12"/>`/api/appointments/${selectedApp.value.id}/complete`,</text:p>
      <text:p text:style-name="P28"><text:s text:c="12"/>{</text:p>
      <text:p text:style-name="P28"><text:s text:c="16"/>method: "PATCH",</text:p>
      <text:p text:style-name="P28"><text:s text:c="16"/>headers: {</text:p>
      <text:p text:style-name="P28"><text:s text:c="20"/>"Content-Type": "application/json",</text:p>
      <text:p text:style-name="P28"><text:s text:c="20"/>Authorization: `Bearer ${token}`,</text:p>
      <text:p text:style-name="P28"><text:s text:c="16"/>},</text:p>
      <text:p text:style-name="P28"><text:s text:c="16"/>body: JSON.stringify({</text:p>
      <text:p text:style-name="P28"><text:soft-page-break/><text:s text:c="20"/>weight: Number(reportForm.weight),</text:p>
      <text:p text:style-name="P28"><text:s text:c="20"/>diagnosis_ids: reportForm.diagnosisIds,</text:p>
      <text:p text:style-name="P28"><text:s text:c="20"/>treatment: reportForm.treatment,</text:p>
      <text:p text:style-name="P28"><text:s text:c="20"/>medications: reportForm.medications,</text:p>
      <text:p text:style-name="P28"><text:s text:c="16"/>}),</text:p>
      <text:p text:style-name="P28"><text:s text:c="12"/>},</text:p>
      <text:p text:style-name="P28"><text:s text:c="8"/>);</text:p>
      <text:p text:style-name="P28"/>
      <text:p text:style-name="P28"><text:s text:c="8"/>if (res.ok) {</text:p>
      <text:p text:style-name="P28"><text:s text:c="12"/>isReportModalOpen.value = false;</text:p>
      <text:p text:style-name="P28"><text:s text:c="12"/>await loadSchedule();</text:p>
      <text:p text:style-name="P28"><text:s text:c="8"/>} else {</text:p>
      <text:p text:style-name="P28"><text:s text:c="12"/>const err = await res.json();</text:p>
      <text:p text:style-name="P28"><text:s text:c="12"/>alert(err.message || "Ошибка при сохранении протокола");</text:p>
      <text:p text:style-name="P28"><text:s text:c="8"/>}</text:p>
      <text:p text:style-name="P28"><text:s text:c="4"/>} catch (err) {</text:p>
      <text:p text:style-name="P28"><text:s text:c="8"/>alert("Ошибка связи с сервером");</text:p>
      <text:p text:style-name="P28"><text:s text:c="4"/>}</text:p>
      <text:p text:style-name="P28">}</text:p>
      <text:p text:style-name="P28"/>
      <text:p text:style-name="P28"><text:soft-page-break/>async function updateStatus(appId: number, status: string) {</text:p>
      <text:p text:style-name="P28"><text:s text:c="4"/>try {</text:p>
      <text:p text:style-name="P28"><text:s text:c="8"/>const res = await fetch(`/api/appointments/${appId}/status`, {</text:p>
      <text:p text:style-name="P28"><text:s text:c="12"/>method: "PATCH",</text:p>
      <text:p text:style-name="P28"><text:s text:c="12"/>headers: {</text:p>
      <text:p text:style-name="P28"><text:s text:c="16"/>"Content-Type": "application/json",</text:p>
      <text:p text:style-name="P28"><text:s text:c="16"/>Authorization: `Bearer ${token}`,</text:p>
      <text:p text:style-name="P28"><text:s text:c="12"/>},</text:p>
      <text:p text:style-name="P28"><text:s text:c="12"/>body: JSON.stringify({ status }),</text:p>
      <text:p text:style-name="P28"><text:s text:c="8"/>});</text:p>
      <text:p text:style-name="P28"><text:s text:c="8"/>if (res.ok) {</text:p>
      <text:p text:style-name="P28"><text:s text:c="12"/>await loadSchedule();</text:p>
      <text:p text:style-name="P28"><text:s text:c="8"/>}</text:p>
      <text:p text:style-name="P28"><text:s text:c="4"/>} catch (err) {</text:p>
      <text:p text:style-name="P28"><text:s text:c="8"/>alert("Ошибка при обновлении статуса");</text:p>
      <text:p text:style-name="P28"><text:s text:c="4"/>}</text:p>
      <text:p text:style-name="P28">}</text:p>
      <text:p text:style-name="P28"/>
      <text:p text:style-name="P28">function getDiagnosisName(id: number) {</text:p>
      <text:p text:style-name="P28"><text:s text:c="4"/>return diagnosesList.value.find((d) =&gt; d.id === id)?.name || "";</text:p>
      <text:p text:style-name="P28"><text:soft-page-break/>}</text:p>
      <text:p text:style-name="P28"/>
      <text:p text:style-name="P28">function toggleDiagnosisPicker() {</text:p>
      <text:p text:style-name="P28"><text:s text:c="4"/>isDiagnosisPickerOpen.value = !isDiagnosisPickerOpen.value;</text:p>
      <text:p text:style-name="P28">}</text:p>
      <text:p text:style-name="P28"/>
      <text:p text:style-name="P28">function addDiagnosis(id: number) {</text:p>
      <text:p text:style-name="P28"><text:s text:c="4"/>reportForm.diagnosisIds.push(id);</text:p>
      <text:p text:style-name="P28"><text:s text:c="4"/>isDiagnosisPickerOpen.value = false;</text:p>
      <text:p text:style-name="P28">}</text:p>
      <text:p text:style-name="P28"/>
      <text:p text:style-name="P28">function removeDiagnosis(id: number) {</text:p>
      <text:p text:style-name="P28"><text:s text:c="4"/>reportForm.diagnosisIds = reportForm.diagnosisIds.filter((x) =&gt; x !== id);</text:p>
      <text:p text:style-name="P28">}</text:p>
      <text:p text:style-name="P28"/>
      <text:p text:style-name="P28">onMounted(loadSchedule);</text:p>
      <text:p text:style-name="P28">&lt;/script&gt;</text:p>
      <text:p text:style-name="P28"/>
      <text:p text:style-name="P28">&lt;template&gt;</text:p>
      <text:p text:style-name="P28"><text:s text:c="4"/>&lt;div class="page"&gt;</text:p>
      <text:p text:style-name="P28"><text:soft-page-break/><text:s text:c="8"/>&lt;div class="page-header"&gt;</text:p>
      <text:p text:style-name="P28"><text:s text:c="12"/>&lt;div&gt;</text:p>
      <text:p text:style-name="P28"><text:s text:c="16"/>&lt;h1 class="page-title"&gt;Приём пациентов&lt;/h1&gt;</text:p>
      <text:p text:style-name="P28"><text:s text:c="16"/>&lt;p class="page-sub"&gt;</text:p>
      <text:p text:style-name="P28"><text:s text:c="20"/>Управление текущими визитами и заполнение мед. карт</text:p>
      <text:p text:style-name="P28"><text:s text:c="16"/>&lt;/p&gt;</text:p>
      <text:p text:style-name="P28"><text:s text:c="12"/>&lt;/div&gt;</text:p>
      <text:p text:style-name="P28"><text:s text:c="12"/>&lt;button</text:p>
      <text:p text:style-name="P28"><text:s text:c="16"/>class="btn btn-ghost"</text:p>
      <text:p text:style-name="P28"><text:s text:c="16"/>@click="loadSchedule"</text:p>
      <text:p text:style-name="P28"><text:s text:c="16"/>:disabled="loading"</text:p>
      <text:p text:style-name="P28"><text:s text:c="12"/>&gt;</text:p>
      <text:p text:style-name="P28"><text:s text:c="16"/>{{ loading ? "Обновление..." : "🔄 Обновить" }}</text:p>
      <text:p text:style-name="P28"><text:s text:c="12"/>&lt;/button&gt;</text:p>
      <text:p text:style-name="P28"><text:s text:c="8"/>&lt;/div&gt;</text:p>
      <text:p text:style-name="P28"/>
      <text:p text:style-name="P28"><text:s text:c="8"/>&lt;div</text:p>
      <text:p text:style-name="P28"><text:s text:c="12"/>v-if="loading &amp;&amp; !appointments.length"</text:p>
      <text:p text:style-name="P28"><text:s text:c="12"/>class="text-muted py-40 center"</text:p>
      <text:p text:style-name="P28"><text:s text:c="8"/>&gt;</text:p>
      <text:p text:style-name="P28"><text:soft-page-break/><text:s text:c="12"/>Загрузка расписания...</text:p>
      <text:p text:style-name="P28"><text:s text:c="8"/>&lt;/div&gt;</text:p>
      <text:p text:style-name="P28"/>
      <text:p text:style-name="P28"><text:s text:c="8"/>&lt;div v-else-if="!appointments.length" class="card py-40 center"&gt;</text:p>
      <text:p text:style-name="P28"><text:s text:c="12"/>&lt;p class="text-muted"&gt;На сегодня записей нет&lt;/p&gt;</text:p>
      <text:p text:style-name="P28"><text:s text:c="8"/>&lt;/div&gt;</text:p>
      <text:p text:style-name="P28"/>
      <text:p text:style-name="P28"><text:s text:c="8"/>&lt;div v-else class="schedule-list"&gt;</text:p>
      <text:p text:style-name="P28"><text:s text:c="12"/>&lt;div</text:p>
      <text:p text:style-name="P28"><text:s text:c="16"/>v-for="app in appointments"</text:p>
      <text:p text:style-name="P28"><text:s text:c="16"/>:key="app.id"</text:p>
      <text:p text:style-name="P28"><text:s text:c="16"/>class="card app-card-doctor"</text:p>
      <text:p text:style-name="P28"><text:s text:c="12"/>&gt;</text:p>
      <text:p text:style-name="P28"><text:s text:c="16"/>&lt;div class="row-between"&gt;</text:p>
      <text:p text:style-name="P28"><text:s text:c="20"/>&lt;div class="app-main-info"&gt;</text:p>
      <text:p text:style-name="P28"><text:s text:c="24"/>&lt;span class="app-time-tag"&gt;{{ app.time }}&lt;/span&gt;</text:p>
      <text:p text:style-name="P28"><text:s text:c="24"/>&lt;span class="app-pet-name"&gt;{{ app.petName }}&lt;/span&gt;</text:p>
      <text:p text:style-name="P28"><text:s text:c="24"/>&lt;span class="app-owner-name"</text:p>
      <text:p text:style-name="P28"><text:s text:c="28"/>&gt;({{ app.ownerName }})&lt;/span</text:p>
      <text:p text:style-name="P28"><text:s text:c="24"/>&gt;</text:p>
      <text:p text:style-name="P28"><text:soft-page-break/><text:s text:c="20"/>&lt;/div&gt;</text:p>
      <text:p text:style-name="P28"/>
      <text:p text:style-name="P28"><text:s text:c="20"/>&lt;div class="app-actions"&gt;</text:p>
      <text:p text:style-name="P28"><text:s text:c="24"/>&lt;span</text:p>
      <text:p text:style-name="P28"><text:s text:c="28"/>v-if="statusMap[app.status]"</text:p>
      <text:p text:style-name="P28"><text:s text:c="28"/>:class="['badge', statusMap[app.status].cls]"</text:p>
      <text:p text:style-name="P28"><text:s text:c="24"/>&gt;</text:p>
      <text:p text:style-name="P28"><text:s text:c="28"/>{{ statusMap[app.status].label }}</text:p>
      <text:p text:style-name="P28"><text:s text:c="24"/>&lt;/span&gt;</text:p>
      <text:p text:style-name="P28"/>
      <text:p text:style-name="P28"><text:s text:c="24"/>&lt;!-- Действия для новых записей --&gt;</text:p>
      <text:p text:style-name="P28"><text:s text:c="24"/>&lt;div</text:p>
      <text:p text:style-name="P28"><text:s text:c="28"/>v-if="app.status === 'waiting'"</text:p>
      <text:p text:style-name="P28"><text:s text:c="28"/>class="btn-group-mini"</text:p>
      <text:p text:style-name="P28"><text:s text:c="24"/>&gt;</text:p>
      <text:p text:style-name="P28"><text:s text:c="28"/>&lt;button</text:p>
      <text:p text:style-name="P28"><text:s text:c="32"/>class="btn btn-primary btn-sm"</text:p>
      <text:p text:style-name="P28"><text:s text:c="32"/>@click="updateStatus(app.id, 'confirmed')"</text:p>
      <text:p text:style-name="P28"><text:s text:c="28"/>&gt;</text:p>
      <text:p text:style-name="P28"><text:s text:c="32"/>Принять</text:p>
      <text:p text:style-name="P28"><text:soft-page-break/><text:s text:c="28"/>&lt;/button&gt;</text:p>
      <text:p text:style-name="P28"><text:s text:c="28"/>&lt;button</text:p>
      <text:p text:style-name="P28"><text:s text:c="32"/>class="btn btn-ghost btn-sm text-red"</text:p>
      <text:p text:style-name="P28"><text:s text:c="32"/>@click="updateStatus(app.id, 'rejected')"</text:p>
      <text:p text:style-name="P28"><text:s text:c="28"/>&gt;</text:p>
      <text:p text:style-name="P28"><text:s text:c="32"/>Отклонить</text:p>
      <text:p text:style-name="P28"><text:s text:c="28"/>&lt;/button&gt;</text:p>
      <text:p text:style-name="P28"><text:s text:c="24"/>&lt;/div&gt;</text:p>
      <text:p text:style-name="P28"/>
      <text:p text:style-name="P28"><text:s text:c="24"/>&lt;!-- Действие для подтвержденных (завершение приема) --&gt;</text:p>
      <text:p text:style-name="P28"><text:s text:c="24"/>&lt;button</text:p>
      <text:p text:style-name="P28"><text:s text:c="28"/>v-if="app.status === 'confirmed'"</text:p>
      <text:p text:style-name="P28"><text:s text:c="28"/>class="btn btn-primary btn-sm"</text:p>
      <text:p text:style-name="P28"><text:s text:c="28"/>@click="openCompleteModal(app)"</text:p>
      <text:p text:style-name="P28"><text:s text:c="24"/>&gt;</text:p>
      <text:p text:style-name="P28"><text:s text:c="28"/>Завершить приём</text:p>
      <text:p text:style-name="P28"><text:s text:c="24"/>&lt;/button&gt;</text:p>
      <text:p text:style-name="P28"><text:s text:c="20"/>&lt;/div&gt;</text:p>
      <text:p text:style-name="P28"><text:s text:c="16"/>&lt;/div&gt;</text:p>
      <text:p text:style-name="P28"><text:s text:c="12"/>&lt;/div&gt;</text:p>
      <text:p text:style-name="P28"><text:soft-page-break/><text:s text:c="8"/>&lt;/div&gt;</text:p>
      <text:p text:style-name="P28"/>
      <text:p text:style-name="P28"><text:s text:c="8"/>&lt;!-- Модалка Протокола --&gt;</text:p>
      <text:p text:style-name="P28"><text:s text:c="8"/>&lt;BaseModal</text:p>
      <text:p text:style-name="P28"><text:s text:c="12"/>:show="isReportModalOpen"</text:p>
      <text:p text:style-name="P28"><text:s text:c="12"/>title="Медицинский протокол"</text:p>
      <text:p text:style-name="P28"><text:s text:c="12"/>@close="isReportModalOpen = false"</text:p>
      <text:p text:style-name="P28"><text:s text:c="8"/>&gt;</text:p>
      <text:p text:style-name="P28"><text:s text:c="12"/>&lt;div class="form-grid" v-if="selectedApp"&gt;</text:p>
      <text:p text:style-name="P28"><text:s text:c="16"/>&lt;div class="form-group"&gt;</text:p>
      <text:p text:style-name="P28"><text:s text:c="20"/>&lt;label&gt;Вес питомца (кг) *&lt;/label&gt;</text:p>
      <text:p text:style-name="P28"><text:s text:c="20"/>&lt;input</text:p>
      <text:p text:style-name="P28"><text:s text:c="24"/>v-model="reportForm.weight"</text:p>
      <text:p text:style-name="P28"><text:s text:c="24"/>type="number"</text:p>
      <text:p text:style-name="P28"><text:s text:c="24"/>step="0.1"</text:p>
      <text:p text:style-name="P28"><text:s text:c="24"/>placeholder="Например: 5.4"</text:p>
      <text:p text:style-name="P28"><text:s text:c="20"/>/&gt;</text:p>
      <text:p text:style-name="P28"><text:s text:c="16"/>&lt;/div&gt;</text:p>
      <text:p text:style-name="P28"><text:s text:c="16"/>&lt;div class="form-group full"&gt;</text:p>
      <text:p text:style-name="P28"><text:s text:c="20"/>&lt;label&gt;Диагноз *&lt;/label&gt;</text:p>
      <text:p text:style-name="P28"><text:soft-page-break/><text:s text:c="20"/>&lt;div class="diagnosis-box"&gt;</text:p>
      <text:p text:style-name="P28"><text:s text:c="24"/>&lt;span</text:p>
      <text:p text:style-name="P28"><text:s text:c="28"/>v-for="id in reportForm.diagnosisIds"</text:p>
      <text:p text:style-name="P28"><text:s text:c="28"/>:key="id"</text:p>
      <text:p text:style-name="P28"><text:s text:c="28"/>class="diagnosis-tag"</text:p>
      <text:p text:style-name="P28"><text:s text:c="24"/>&gt;</text:p>
      <text:p text:style-name="P28"><text:s text:c="28"/>{{ getDiagnosisName(id) }}</text:p>
      <text:p text:style-name="P28"><text:s text:c="28"/>&lt;button</text:p>
      <text:p text:style-name="P28"><text:s text:c="32"/>type="button"</text:p>
      <text:p text:style-name="P28"><text:s text:c="32"/>class="tag-remove"</text:p>
      <text:p text:style-name="P28"><text:s text:c="32"/>@click="removeDiagnosis(id)"</text:p>
      <text:p text:style-name="P28"><text:s text:c="28"/>&gt;</text:p>
      <text:p text:style-name="P28"><text:s text:c="32"/>×</text:p>
      <text:p text:style-name="P28"><text:s text:c="28"/>&lt;/button&gt;</text:p>
      <text:p text:style-name="P28"><text:s text:c="24"/>&lt;/span&gt;</text:p>
      <text:p text:style-name="P28"/>
      <text:p text:style-name="P28"><text:s text:c="24"/>&lt;div class="diagnosis-add"&gt;</text:p>
      <text:p text:style-name="P28"><text:s text:c="28"/>&lt;button</text:p>
      <text:p text:style-name="P28"><text:s text:c="32"/>type="button"</text:p>
      <text:p text:style-name="P28"><text:s text:c="32"/>class="tag-add-btn"</text:p>
      <text:p text:style-name="P28"><text:soft-page-break/><text:s text:c="32"/>@click="toggleDiagnosisPicker"</text:p>
      <text:p text:style-name="P28"><text:s text:c="28"/>&gt;</text:p>
      <text:p text:style-name="P28"><text:s text:c="32"/>+</text:p>
      <text:p text:style-name="P28"><text:s text:c="28"/>&lt;/button&gt;</text:p>
      <text:p text:style-name="P28"/>
      <text:p text:style-name="P28"><text:s text:c="28"/>&lt;div</text:p>
      <text:p text:style-name="P28"><text:s text:c="32"/>v-if="isDiagnosisPickerOpen"</text:p>
      <text:p text:style-name="P28"><text:s text:c="32"/>class="diagnosis-dropdown"</text:p>
      <text:p text:style-name="P28"><text:s text:c="28"/>&gt;</text:p>
      <text:p text:style-name="P28"><text:s text:c="32"/>&lt;div</text:p>
      <text:p text:style-name="P28"><text:s text:c="36"/>v-for="d in availableDiagnoses"</text:p>
      <text:p text:style-name="P28"><text:s text:c="36"/>:key="d.id"</text:p>
      <text:p text:style-name="P28"><text:s text:c="36"/>class="diagnosis-option"</text:p>
      <text:p text:style-name="P28"><text:s text:c="36"/>@click="addDiagnosis(d.id)"</text:p>
      <text:p text:style-name="P28"><text:s text:c="32"/>&gt;</text:p>
      <text:p text:style-name="P28"><text:s text:c="36"/>{{ d.name }}</text:p>
      <text:p text:style-name="P28"><text:s text:c="32"/>&lt;/div&gt;</text:p>
      <text:p text:style-name="P28"><text:s text:c="32"/>&lt;div</text:p>
      <text:p text:style-name="P28"><text:s text:c="36"/>v-if="!availableDiagnoses.length"</text:p>
      <text:p text:style-name="P28"><text:s text:c="36"/>class="diagnosis-empty"</text:p>
      <text:p text:style-name="P28"><text:soft-page-break/><text:s text:c="32"/>&gt;</text:p>
      <text:p text:style-name="P28"><text:s text:c="36"/>{{</text:p>
      <text:p text:style-name="P28"><text:s text:c="40"/>diagnosesList.length</text:p>
      <text:p text:style-name="P28"><text:s text:c="44"/>? "Все диагнозы добавлены"</text:p>
      <text:p text:style-name="P28"><text:s text:c="44"/>: "Загрузка..."</text:p>
      <text:p text:style-name="P28"><text:s text:c="36"/>}}</text:p>
      <text:p text:style-name="P28"><text:s text:c="32"/>&lt;/div&gt;</text:p>
      <text:p text:style-name="P28"><text:s text:c="28"/>&lt;/div&gt;</text:p>
      <text:p text:style-name="P28"><text:s text:c="24"/>&lt;/div&gt;</text:p>
      <text:p text:style-name="P28"><text:s text:c="20"/>&lt;/div&gt;</text:p>
      <text:p text:style-name="P28"><text:s text:c="16"/>&lt;/div&gt;</text:p>
      <text:p text:style-name="P28"><text:s text:c="16"/>&lt;div class="form-group full"&gt;</text:p>
      <text:p text:style-name="P28"><text:s text:c="20"/>&lt;label&gt;Рекомендации и лечение&lt;/label&gt;</text:p>
      <text:p text:style-name="P28"><text:s text:c="20"/>&lt;textarea</text:p>
      <text:p text:style-name="P28"><text:s text:c="24"/>v-model="reportForm.treatment"</text:p>
      <text:p text:style-name="P28"><text:s text:c="24"/>rows="2"</text:p>
      <text:p text:style-name="P28"><text:s text:c="24"/>placeholder="Манипуляции, советы по уходу..."</text:p>
      <text:p text:style-name="P28"><text:s text:c="20"/>&gt;&lt;/textarea&gt;</text:p>
      <text:p text:style-name="P28"><text:s text:c="16"/>&lt;/div&gt;</text:p>
      <text:p text:style-name="P28"><text:s text:c="16"/>&lt;div class="form-group full"&gt;</text:p>
      <text:p text:style-name="P28"><text:soft-page-break/><text:s text:c="20"/>&lt;label&gt;Назначенные препараты&lt;/label&gt;</text:p>
      <text:p text:style-name="P28"><text:s text:c="20"/>&lt;input</text:p>
      <text:p text:style-name="P28"><text:s text:c="24"/>v-model="reportForm.medications"</text:p>
      <text:p text:style-name="P28"><text:s text:c="24"/>type="text"</text:p>
      <text:p text:style-name="P28"><text:s text:c="24"/>placeholder="Лекарства, дозировка, длительность"</text:p>
      <text:p text:style-name="P28"><text:s text:c="20"/>/&gt;</text:p>
      <text:p text:style-name="P28"><text:s text:c="16"/>&lt;/div&gt;</text:p>
      <text:p text:style-name="P28"><text:s text:c="12"/>&lt;/div&gt;</text:p>
      <text:p text:style-name="P28"><text:s text:c="12"/>&lt;template #footer&gt;</text:p>
      <text:p text:style-name="P28"><text:s text:c="16"/>&lt;button class="btn btn-primary" @click="saveProtocol"&gt;</text:p>
      <text:p text:style-name="P28"><text:s text:c="20"/>Подтвердить и закрыть визит</text:p>
      <text:p text:style-name="P28"><text:s text:c="16"/>&lt;/button&gt;</text:p>
      <text:p text:style-name="P28"><text:s text:c="12"/>&lt;/template&gt;</text:p>
      <text:p text:style-name="P28"><text:s text:c="8"/>&lt;/BaseModal&gt;</text:p>
      <text:p text:style-name="P28"><text:s text:c="4"/>&lt;/div&gt;</text:p>
      <text:p text:style-name="P28">&lt;/template&gt;</text:p>
      <text:p text:style-name="P28"/>
      <text:p text:style-name="P28">&lt;style scoped&gt;</text:p>
      <text:p text:style-name="P28">.center {</text:p>
      <text:p text:style-name="P28"><text:s text:c="4"/>text-align: center;</text:p>
      <text:p text:style-name="P28"><text:soft-page-break/>}</text:p>
      <text:p text:style-name="P28">.py-40 {</text:p>
      <text:p text:style-name="P28"><text:s text:c="4"/>padding: 40px 0;</text:p>
      <text:p text:style-name="P28">}</text:p>
      <text:p text:style-name="P28">.text-red {</text:p>
      <text:p text:style-name="P28"><text:s text:c="4"/>color: var(--red);</text:p>
      <text:p text:style-name="P28">}</text:p>
      <text:p text:style-name="P28">.btn-group-mini {</text:p>
      <text:p text:style-name="P28"><text:s text:c="4"/>display: flex;</text:p>
      <text:p text:style-name="P28"><text:s text:c="4"/>gap: 8px;</text:p>
      <text:p text:style-name="P28">}</text:p>
      <text:p text:style-name="P28"/>
      <text:p text:style-name="P28">.app-card-doctor {</text:p>
      <text:p text:style-name="P28"><text:s text:c="4"/>padding: 16px 20px;</text:p>
      <text:p text:style-name="P28"><text:s text:c="4"/>margin-bottom: 12px;</text:p>
      <text:p text:style-name="P28"><text:s text:c="4"/>border-radius: 12px;</text:p>
      <text:p text:style-name="P28"><text:s text:c="4"/>transition: transform 0.2s;</text:p>
      <text:p text:style-name="P28">}</text:p>
      <text:p text:style-name="P28">.app-card-doctor:hover {</text:p>
      <text:p text:style-name="P28"><text:s text:c="4"/>transform: translateX(4px);</text:p>
      <text:p text:style-name="P28"><text:soft-page-break/>}</text:p>
      <text:p text:style-name="P28"/>
      <text:p text:style-name="P28">.app-time-tag {</text:p>
      <text:p text:style-name="P28"><text:s text:c="4"/>font-family: var(--mono);</text:p>
      <text:p text:style-name="P28"><text:s text:c="4"/>font-weight: 800;</text:p>
      <text:p text:style-name="P28"><text:s text:c="4"/>color: var(--accent);</text:p>
      <text:p text:style-name="P28"><text:s text:c="4"/>margin-right: 15px;</text:p>
      <text:p text:style-name="P28"><text:s text:c="4"/>font-size: 16px;</text:p>
      <text:p text:style-name="P28">}</text:p>
      <text:p text:style-name="P28">.app-pet-name {</text:p>
      <text:p text:style-name="P28"><text:s text:c="4"/>font-weight: 700;</text:p>
      <text:p text:style-name="P28"><text:s text:c="4"/>font-size: 15px;</text:p>
      <text:p text:style-name="P28"><text:s text:c="4"/>margin-right: 5px;</text:p>
      <text:p text:style-name="P28">}</text:p>
      <text:p text:style-name="P28">.app-owner-name {</text:p>
      <text:p text:style-name="P28"><text:s text:c="4"/>color: var(--text3);</text:p>
      <text:p text:style-name="P28"><text:s text:c="4"/>font-size: 13px;</text:p>
      <text:p text:style-name="P28">}</text:p>
      <text:p text:style-name="P28">.app-actions {</text:p>
      <text:p text:style-name="P28"><text:s text:c="4"/>display: flex;</text:p>
      <text:p text:style-name="P28"><text:soft-page-break/><text:s text:c="4"/>align-items: center;</text:p>
      <text:p text:style-name="P28"><text:s text:c="4"/>gap: 15px;</text:p>
      <text:p text:style-name="P28">}</text:p>
      <text:p text:style-name="P28"/>
      <text:p text:style-name="P28">.diagnosis-box {</text:p>
      <text:p text:style-name="P28"><text:s text:c="4"/>display: flex;</text:p>
      <text:p text:style-name="P28"><text:s text:c="4"/>flex-wrap: wrap;</text:p>
      <text:p text:style-name="P28"><text:s text:c="4"/>align-items: center;</text:p>
      <text:p text:style-name="P28"><text:s text:c="4"/>gap: 8px;</text:p>
      <text:p text:style-name="P28"><text:s text:c="4"/>min-height: 44px;</text:p>
      <text:p text:style-name="P28"><text:s text:c="4"/>padding: 8px;</text:p>
      <text:p text:style-name="P28"><text:s text:c="4"/>border: 1px solid var(--border, #e0e0e0);</text:p>
      <text:p text:style-name="P28"><text:s text:c="4"/>border-radius: 10px;</text:p>
      <text:p text:style-name="P28">}</text:p>
      <text:p text:style-name="P28"/>
      <text:p text:style-name="P28">.diagnosis-tag {</text:p>
      <text:p text:style-name="P28"><text:s text:c="4"/>display: flex;</text:p>
      <text:p text:style-name="P28"><text:s text:c="4"/>align-items: center;</text:p>
      <text:p text:style-name="P28"><text:s text:c="4"/>gap: 6px;</text:p>
      <text:p text:style-name="P28"><text:s text:c="4"/>font-size: 13px;</text:p>
      <text:p text:style-name="P28"><text:soft-page-break/><text:s text:c="4"/>padding: 6px 10px;</text:p>
      <text:p text:style-name="P28"><text:s text:c="4"/>border-radius: 999px;</text:p>
      <text:p text:style-name="P28"><text:s text:c="4"/>background: var(--accent-soft, #e6f4ea);</text:p>
      <text:p text:style-name="P28"><text:s text:c="4"/>color: var(--accent, #1a8f4c);</text:p>
      <text:p text:style-name="P28"><text:s text:c="4"/>font-weight: 600;</text:p>
      <text:p text:style-name="P28">}</text:p>
      <text:p text:style-name="P28"/>
      <text:p text:style-name="P28">.tag-remove {</text:p>
      <text:p text:style-name="P28"><text:s text:c="4"/>border: none;</text:p>
      <text:p text:style-name="P28"><text:s text:c="4"/>background: none;</text:p>
      <text:p text:style-name="P28"><text:s text:c="4"/>cursor: pointer;</text:p>
      <text:p text:style-name="P28"><text:s text:c="4"/>font-size: 14px;</text:p>
      <text:p text:style-name="P28"><text:s text:c="4"/>line-height: 1;</text:p>
      <text:p text:style-name="P28"><text:s text:c="4"/>color: inherit;</text:p>
      <text:p text:style-name="P28"><text:s text:c="4"/>opacity: 0.7;</text:p>
      <text:p text:style-name="P28"><text:s text:c="4"/>padding: 0;</text:p>
      <text:p text:style-name="P28">}</text:p>
      <text:p text:style-name="P28">.tag-remove:hover {</text:p>
      <text:p text:style-name="P28"><text:s text:c="4"/>opacity: 1;</text:p>
      <text:p text:style-name="P28">}</text:p>
      <text:p text:style-name="P28"><text:soft-page-break/></text:p>
      <text:p text:style-name="P28">.diagnosis-add {</text:p>
      <text:p text:style-name="P28"><text:s text:c="4"/>position: relative;</text:p>
      <text:p text:style-name="P28">}</text:p>
      <text:p text:style-name="P28"/>
      <text:p text:style-name="P28">.tag-add-btn {</text:p>
      <text:p text:style-name="P28"><text:s text:c="4"/>width: 32px;</text:p>
      <text:p text:style-name="P28"><text:s text:c="4"/>height: 32px;</text:p>
      <text:p text:style-name="P28"><text:s text:c="4"/>border-radius: 50%;</text:p>
      <text:p text:style-name="P28"><text:s text:c="4"/>border: 2px solid var(--accent, #1a8f4c);</text:p>
      <text:p text:style-name="P28"><text:s text:c="4"/>color: var(--accent, #1a8f4c);</text:p>
      <text:p text:style-name="P28"><text:s text:c="4"/>background: transparent;</text:p>
      <text:p text:style-name="P28"><text:s text:c="4"/>font-size: 18px;</text:p>
      <text:p text:style-name="P28"><text:s text:c="4"/>line-height: 1;</text:p>
      <text:p text:style-name="P28"><text:s text:c="4"/>cursor: pointer;</text:p>
      <text:p text:style-name="P28"><text:s text:c="4"/>display: flex;</text:p>
      <text:p text:style-name="P28"><text:s text:c="4"/>align-items: center;</text:p>
      <text:p text:style-name="P28"><text:s text:c="4"/>justify-content: center;</text:p>
      <text:p text:style-name="P28">}</text:p>
      <text:p text:style-name="P28">.tag-add-btn:hover {</text:p>
      <text:p text:style-name="P28"><text:soft-page-break/><text:s text:c="4"/>background: var(--accent-soft, #e6f4ea);</text:p>
      <text:p text:style-name="P28">}</text:p>
      <text:p text:style-name="P28"/>
      <text:p text:style-name="P28">.diagnosis-dropdown {</text:p>
      <text:p text:style-name="P28"><text:s text:c="4"/>position: absolute;</text:p>
      <text:p text:style-name="P28"><text:s text:c="4"/>top: 40px;</text:p>
      <text:p text:style-name="P28"><text:s text:c="4"/>left: 0;</text:p>
      <text:p text:style-name="P28"><text:s text:c="4"/>z-index: 20;</text:p>
      <text:p text:style-name="P28"><text:s text:c="4"/>min-width: 220px;</text:p>
      <text:p text:style-name="P28"><text:s text:c="4"/>max-height: 220px;</text:p>
      <text:p text:style-name="P28"><text:s text:c="4"/>overflow-y: auto;</text:p>
      <text:p text:style-name="P28"><text:s text:c="4"/>background: var(--surface, #fff);</text:p>
      <text:p text:style-name="P28"><text:s text:c="4"/>border: 1px solid var(--border, #e0e0e0);</text:p>
      <text:p text:style-name="P28"><text:s text:c="4"/>border-radius: 10px;</text:p>
      <text:p text:style-name="P28"><text:s text:c="4"/>box-shadow: 0 8px 24px rgba(0, 0, 0, 0.12);</text:p>
      <text:p text:style-name="P28"><text:s text:c="4"/>padding: 6px;</text:p>
      <text:p text:style-name="P28">}</text:p>
      <text:p text:style-name="P28"/>
      <text:p text:style-name="P28">.diagnosis-option {</text:p>
      <text:p text:style-name="P28"><text:s text:c="4"/>padding: 8px 10px;</text:p>
      <text:p text:style-name="P28"><text:soft-page-break/><text:s text:c="4"/>border-radius: 6px;</text:p>
      <text:p text:style-name="P28"><text:s text:c="4"/>font-size: 13px;</text:p>
      <text:p text:style-name="P28"><text:s text:c="4"/>cursor: pointer;</text:p>
      <text:p text:style-name="P28">}</text:p>
      <text:p text:style-name="P28">.diagnosis-option:hover {</text:p>
      <text:p text:style-name="P28"><text:s text:c="4"/>background: var(--bg2, #f5f5f5);</text:p>
      <text:p text:style-name="P28">}</text:p>
      <text:p text:style-name="P28"/>
      <text:p text:style-name="P28">.diagnosis-empty {</text:p>
      <text:p text:style-name="P28"><text:s text:c="4"/>padding: 8px 10px;</text:p>
      <text:p text:style-name="P28"><text:s text:c="4"/>font-size: 13px;</text:p>
      <text:p text:style-name="P28"><text:s text:c="4"/>color: var(--text3, #999);</text:p>
      <text:p text:style-name="P28">}</text:p>
      <text:p text:style-name="P28">&lt;/style&gt;</text:p>
      <text:p text:style-name="P29"><text:span text:style-name="Source_20_Text"><text:span text:style-name="T2">components/doctor/PatientsPage.vue</text:span></text:span></text:p>
      <text:h text:style-name="Heading_20_1" text:outline-level="1"><text:span text:style-name="Source_20_Text"><text:span text:style-name="T5">Картотека пациентов</text:span></text:span></text:h>
      <text:p text:style-name="P30">Поиск владельцев и медицинская история питомцев </text:p>
      <text:p text:style-name="Text_20_body"><text:span text:style-name="Source_20_Text"><text:s text:c="4"/>&lt;!-- Поиск --&gt;<text:line-break/> <text:s text:c="3"/>&lt;div class="search-panel card"&gt;<text:line-break/> <text:s text:c="7"/>&lt;input<text:line-break/> <text:s text:c="11"/>v-model="search"<text:line-break/> <text:s text:c="11"/>type="text"<text:line-break/> <text:s text:c="11"/>placeholder="Поиск по ФИО или номеру телефона..."<text:line-break/> <text:s text:c="11"/>@input="loadPatients"<text:line-break/> <text:s text:c="7"/>/&gt;<text:line-break/></text:span><text:soft-page-break/><text:span text:style-name="Source_20_Text"> <text:s text:c="3"/>&lt;/div&gt;<text:line-break/><text:line-break/> <text:s text:c="3"/>&lt;!-- Таблица --&gt;<text:line-break/> <text:s text:c="3"/>&lt;div class="table-wrap mt-20"&gt;<text:line-break/> <text:s text:c="7"/>&lt;div v-if="loading" class="text-muted py-40 center"&gt;<text:line-break/> <text:s text:c="11"/>Поиск в базе данных...<text:line-break/> <text:s text:c="7"/>&lt;/div&gt;<text:line-break/><text:line-break/> <text:s text:c="7"/>&lt;table v-else&gt;<text:line-break/> <text:s text:c="11"/>&lt;thead&gt;<text:line-break/> <text:s text:c="15"/>&lt;tr&gt;<text:line-break/> <text:s text:c="19"/>&lt;th&gt;Владелец&lt;/th&gt;<text:line-break/> <text:s text:c="19"/>&lt;th&gt;Контакты&lt;/th&gt;<text:line-break/> <text:s text:c="19"/>&lt;th&gt;Питомцев&lt;/th&gt;<text:line-break/> <text:s text:c="19"/>&lt;th&gt;Последний визит&lt;/th&gt;<text:line-break/> <text:s text:c="19"/>&lt;th&gt;&lt;/th&gt;<text:line-break/> <text:s text:c="15"/>&lt;/tr&gt;<text:line-break/> <text:s text:c="11"/>&lt;/thead&gt;<text:line-break/> <text:s text:c="11"/>&lt;tbody&gt;<text:line-break/> <text:s text:c="15"/>&lt;tr v-if="patients.length === 0"&gt;<text:line-break/> <text:s text:c="19"/>&lt;td colspan="5" class="center py-40 text-muted"&gt;<text:line-break/> <text:s text:c="23"/>Совпадений не найдено<text:line-break/> <text:s text:c="19"/>&lt;/td&gt;<text:line-break/> <text:s text:c="15"/>&lt;/tr&gt;<text:line-break/> <text:s text:c="15"/>&lt;tr v-for="p in patients" :key="p.id"&gt;<text:line-break/> <text:s text:c="19"/>&lt;td&gt;<text:line-break/> <text:s text:c="23"/>&lt;div class="td-main"&gt;{{ p.fullName }}&lt;/div&gt;<text:line-break/> <text:s text:c="19"/>&lt;/td&gt;<text:line-break/> <text:s text:c="19"/>&lt;td&gt;<text:line-break/> <text:s text:c="23"/>&lt;div class="td-phone"&gt;{{ p.phone }}&lt;/div&gt;<text:line-break/> <text:s text:c="23"/>&lt;div class="td-sub"&gt;{{ p.email }}&lt;/div&gt;<text:line-break/> <text:s text:c="19"/>&lt;/td&gt;<text:line-break/> <text:s text:c="19"/>&lt;td&gt;<text:line-break/> <text:s text:c="23"/>&lt;span class="tag"&gt;{{ p.petsCount }}&lt;/span&gt;<text:line-break/> <text:s text:c="19"/>&lt;/td&gt;<text:line-break/> <text:s text:c="19"/>&lt;td&gt;{{ p.lastVisit || "—" }}&lt;/td&gt;<text:line-break/> <text:s text:c="19"/>&lt;td style="text-align: right"&gt;<text:line-break/> <text:s text:c="23"/>&lt;button<text:line-break/> <text:s text:c="27"/>class="btn btn-ghost btn-sm"<text:line-break/> <text:s text:c="27"/>@click="openHistory(p)"<text:line-break/> <text:s text:c="23"/>&gt;<text:line-break/> <text:s text:c="27"/>Медкарта<text:line-break/></text:span><text:soft-page-break/><text:span text:style-name="Source_20_Text"> <text:s text:c="23"/>&lt;/button&gt;<text:line-break/> <text:s text:c="19"/>&lt;/td&gt;<text:line-break/> <text:s text:c="15"/>&lt;/tr&gt;<text:line-break/> <text:s text:c="11"/>&lt;/tbody&gt;<text:line-break/> <text:s text:c="7"/>&lt;/table&gt;<text:line-break/> <text:s text:c="3"/>&lt;/div&gt;<text:line-break/><text:line-break/> <text:s text:c="3"/>&lt;!-- Модалка истории (Медкарта) --&gt;<text:line-break/> <text:s text:c="3"/>&lt;BaseModal<text:line-break/> <text:s text:c="7"/>:show="isHistoryOpen"<text:line-break/> <text:s text:c="7"/>title="Медицинская история"<text:line-break/> <text:s text:c="7"/>@close="isHistoryOpen = false"<text:line-break/> <text:s text:c="3"/>&gt;<text:line-break/> <text:s text:c="7"/>&lt;div v-if="selectedOwner" class="history-content"&gt;<text:line-break/> <text:s text:c="11"/>&lt;div class="owner-summary mb-20"&gt;<text:line-break/> <text:s text:c="15"/>&lt;h3&gt;{{ selectedOwner.fullName }}&lt;/h3&gt;<text:line-break/> <text:s text:c="15"/>&lt;p class="text-muted"&gt;{{ selectedOwner.phone }}&lt;/p&gt;<text:line-break/> <text:s text:c="11"/>&lt;/div&gt;<text:line-break/><text:line-break/> <text:s text:c="11"/>&lt;div v-if="historyLoading" class="center py-20 text-muted"&gt;<text:line-break/> <text:s text:c="15"/>Загрузка медицинских записей...<text:line-break/> <text:s text:c="11"/>&lt;/div&gt;<text:line-break/><text:line-break/> <text:s text:c="11"/>&lt;div<text:line-break/> <text:s text:c="15"/>v-else-if="ownerHistory.length === 0"<text:line-break/> <text:s text:c="15"/>class="center py-20 text-muted"<text:line-break/> <text:s text:c="11"/>&gt;<text:line-break/> <text:s text:c="15"/>История визитов пуста<text:line-break/> <text:s text:c="11"/>&lt;/div&gt;<text:line-break/><text:line-break/> <text:s text:c="11"/>&lt;div<text:line-break/> <text:s text:c="15"/>v-for="pet in ownerHistory"<text:line-break/> <text:s text:c="15"/>:key="pet.petName"<text:line-break/> <text:s text:c="15"/>class="pet-history-item"<text:line-break/> <text:s text:c="11"/>&gt;<text:line-break/> <text:s text:c="15"/>&lt;div class="pet-header"&gt;<text:line-break/> <text:s text:c="19"/>&lt;span class="pet-icon"&gt;{{ pet.petIcon || "🐾" }}&lt;/span&gt;<text:line-break/> <text:s text:c="19"/>&lt;span class="pet-name"&gt;{{ pet.petName }}&lt;/span&gt;<text:line-break/> <text:s text:c="15"/>&lt;/div&gt;<text:line-break/><text:line-break/> <text:s text:c="15"/>&lt;div class="history-timeline"&gt;<text:line-break/> <text:s text:c="19"/>&lt;div<text:line-break/> <text:s text:c="23"/>v-for="visit in pet.visits"<text:line-break/></text:span><text:soft-page-break/><text:span text:style-name="Source_20_Text"> <text:s text:c="23"/>:key="visit.id"<text:line-break/> <text:s text:c="23"/>class="timeline-point"<text:line-break/> <text:s text:c="19"/>&gt;<text:line-break/> <text:s text:c="23"/>&lt;div class="t-date"&gt;{{ visit.date }}&lt;/div&gt;<text:line-break/> <text:s text:c="23"/>&lt;div class="t-info"&gt;<text:line-break/> <text:s text:c="27"/>&lt;div class="t-diagnoses"&gt;<text:line-break/> <text:s text:c="31"/>&lt;span<text:line-break/> <text:s text:c="35"/>v-for="d in visit.diagnoses"<text:line-break/> <text:s text:c="35"/>:key="d.id"<text:line-break/> <text:s text:c="35"/>class="t-diagnosis-tag"<text:line-break/> <text:s text:c="31"/>&gt;<text:line-break/> <text:s text:c="35"/>{{ d.name }}<text:line-break/> <text:s text:c="31"/>&lt;/span&gt;<text:line-break/> <text:s text:c="31"/>&lt;span<text:line-break/> <text:s text:c="35"/>v-if="!visit.diagnoses.length"<text:line-break/> <text:s text:c="35"/>class="text-muted"<text:line-break/> <text:s text:c="31"/>&gt;<text:line-break/> <text:s text:c="35"/>Диагноз не указан<text:line-break/> <text:s text:c="31"/>&lt;/span&gt;<text:line-break/> <text:s text:c="27"/>&lt;/div&gt;<text:line-break/> <text:s text:c="27"/>&lt;p&gt;{{ visit.treatment }}&lt;/p&gt;<text:line-break/> <text:s text:c="23"/>&lt;/div&gt;<text:line-break/> <text:s text:c="19"/>&lt;/div&gt;<text:line-break/> <text:s text:c="15"/>&lt;/div&gt;<text:line-break/> <text:s text:c="11"/>&lt;/div&gt;<text:line-break/> <text:s text:c="7"/>&lt;/div&gt;<text:line-break/> <text:s text:c="3"/>&lt;/BaseModal&gt;<text:line-break/>&lt;/div&gt;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379cm" fo:margin-top="0.284cm" fo:margin-bottom="0cm" style:contextual-spacing="false" fo:text-indent="0.998cm" style:auto-text-indent="fals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Абзац_20_списка_20_Знак" style:display-name="Абзац списка Знак" style:family="text" loext:linked-style-name="List_20_Paragraph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style:font-family-generic="roman" style:font-pitch="variable" style:font-charset="x-symbol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family-generic="roman" style:font-pitch="variable" style:font-charset="x-symbo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74cm" fo:margin-left="2.387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504cm" fo:margin-left="1.37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2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6.17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8.05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94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83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71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5.6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64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8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8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8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6cm" fo:text-indent="-0.318cm" fo:margin-left="4.0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7cm" fo:text-indent="-0.318cm" fo:margin-left="7.8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68cm" fo:text-indent="-0.318cm" fo:margin-left="11.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3</meta:editing-cycles>
    <meta:creation-date>2026-06-21T14:14:43.359499012</meta:creation-date>
    <meta:editing-duration>PT1M48S</meta:editing-duration>
    <meta:generator>LibreOffice/26.2.4.2$Linux_X86_64 LibreOffice_project/f4d82cf4d44730936b3f1a72d05a6253f577d3e9</meta:generator>
    <dc:title>Задание</dc:title>
    <dc:date>2026-06-21T14:26:56.822093347</dc:date>
    <meta:document-statistic meta:table-count="0" meta:image-count="0" meta:object-count="0" meta:page-count="84" meta:paragraph-count="1331" meta:word-count="5343" meta:character-count="68762" meta:non-whitespace-character-count="47026"/>
    <meta:user-defined meta:name="AppVersion">16.0000</meta:user-defined>
    <meta:template xlink:type="simple" xlink:actuate="onRequest" xlink:title="Задание" xlink:href="../../../../.config/libreoffice/4/user/template/Задание.ott" meta:date="2026-06-21T14:14:42.657438418"/>
  </office:meta>
</office:document-meta>
</file>